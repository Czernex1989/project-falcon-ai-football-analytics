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.8896in" fo:margin-top="0in" fo:margin-bottom="0in" table:align="center" style:writing-mode="lr-tb"/>
    </style:style>
    <style:style style:name="Table1.A" style:family="table-column">
      <style:table-column-properties style:column-width="2.296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f3a5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8896in" fo:margin-left="-0.075in" fo:margin-top="0in" fo:margin-bottom="0in" table:align="left" style:writing-mode="lr-tb"/>
    </style:style>
    <style:style style:name="Table2.A" style:family="table-column">
      <style:table-column-properties style:column-width="2.296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f3a5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="0.5pt solid #000000" style:writing-mode="lr-tb"/>
    </style:style>
    <style:style style:name="Table2.B2" style:family="table-cell">
      <style:table-cell-properties fo:padding-left="0.075in" fo:padding-right="0.075in" fo:padding-top="0in" fo:padding-bottom="0in" fo:border="0.5pt solid #000000" style:writing-mode="lr-tb"/>
    </style:style>
    <style:style style:name="Table2.C2" style:family="table-cell">
      <style:table-cell-properties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fo:padding-left="0.075in" fo:padding-right="0.075in" fo:padding-top="0in" fo:padding-bottom="0in" fo:border="0.5pt solid #000000" style:writing-mode="lr-tb"/>
    </style:style>
    <style:style style:name="Table2.B3" style:family="table-cell">
      <style:table-cell-properties fo:padding-left="0.075in" fo:padding-right="0.075in" fo:padding-top="0in" fo:padding-bottom="0in" fo:border="0.5pt solid #000000" style:writing-mode="lr-tb"/>
    </style:style>
    <style:style style:name="Table2.C3" style:family="table-cell">
      <style:table-cell-properties fo:padding-left="0.075in" fo:padding-right="0.075in" fo:padding-top="0in" fo:padding-bottom="0in" fo:border="0.5pt solid #000000" style:writing-mode="lr-tb"/>
    </style:style>
    <style:style style:name="Table2.A4" style:family="table-cell">
      <style:table-cell-properties fo:padding-left="0.075in" fo:padding-right="0.075in" fo:padding-top="0in" fo:padding-bottom="0in" fo:border="0.5pt solid #000000" style:writing-mode="lr-tb"/>
    </style:style>
    <style:style style:name="Table2.B4" style:family="table-cell">
      <style:table-cell-properties fo:padding-left="0.075in" fo:padding-right="0.075in" fo:padding-top="0in" fo:padding-bottom="0in" fo:border="0.5pt solid #000000" style:writing-mode="lr-tb"/>
    </style:style>
    <style:style style:name="Table2.C4" style:family="table-cell">
      <style:table-cell-properties fo:padding-left="0.075in" fo:padding-right="0.075in" fo:padding-top="0in" fo:padding-bottom="0in" fo:border="0.5pt solid #000000" style:writing-mode="lr-tb"/>
    </style:style>
    <style:style style:name="Table2.A5" style:family="table-cell">
      <style:table-cell-properties fo:padding-left="0.075in" fo:padding-right="0.075in" fo:padding-top="0in" fo:padding-bottom="0in" fo:border="0.5pt solid #000000" style:writing-mode="lr-tb"/>
    </style:style>
    <style:style style:name="Table2.B5" style:family="table-cell">
      <style:table-cell-properties fo:padding-left="0.075in" fo:padding-right="0.075in" fo:padding-top="0in" fo:padding-bottom="0in" fo:border="0.5pt solid #000000" style:writing-mode="lr-tb"/>
    </style:style>
    <style:style style:name="Table2.C5" style:family="table-cell">
      <style:table-cell-properties fo:padding-left="0.075in" fo:padding-right="0.075in" fo:padding-top="0in" fo:padding-bottom="0in" fo:border="0.5pt solid #000000" style:writing-mode="lr-tb"/>
    </style:style>
    <style:style style:name="Table2.A6" style:family="table-cell">
      <style:table-cell-properties fo:padding-left="0.075in" fo:padding-right="0.075in" fo:padding-top="0in" fo:padding-bottom="0in" fo:border="0.5pt solid #000000" style:writing-mode="lr-tb"/>
    </style:style>
    <style:style style:name="Table2.B6" style:family="table-cell">
      <style:table-cell-properties fo:padding-left="0.075in" fo:padding-right="0.075in" fo:padding-top="0in" fo:padding-bottom="0in" fo:border="0.5pt solid #000000" style:writing-mode="lr-tb"/>
    </style:style>
    <style:style style:name="Table2.C6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8903in" fo:margin-left="-0.075in" fo:margin-top="0in" fo:margin-bottom="0in" table:align="left" style:writing-mode="lr-tb"/>
    </style:style>
    <style:style style:name="Table3.A" style:family="table-column">
      <style:table-column-properties style:column-width="3.4451in"/>
    </style:style>
    <style:style style:name="Table3.B" style:family="table-column">
      <style:table-column-properties style:column-width="3.444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1f3a5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" style:family="table-cell">
      <style:table-cell-properties fo:padding-left="0.075in" fo:padding-right="0.075in" fo:padding-top="0in" fo:padding-bottom="0in" fo:border="0.5pt solid #000000" style:writing-mode="lr-tb"/>
    </style:style>
    <style:style style:name="Table3.A4" style:family="table-cell">
      <style:table-cell-properties fo:padding-left="0.075in" fo:padding-right="0.075in" fo:padding-top="0in" fo:padding-bottom="0in" fo:border="0.5pt solid #000000" style:writing-mode="lr-tb"/>
    </style:style>
    <style:style style:name="Table3.B4" style:family="table-cell">
      <style:table-cell-properties fo:padding-left="0.075in" fo:padding-right="0.075in" fo:padding-top="0in" fo:padding-bottom="0in" fo:border="0.5pt solid #000000" style:writing-mode="lr-tb"/>
    </style:style>
    <style:style style:name="Table3.A5" style:family="table-cell">
      <style:table-cell-properties fo:padding-left="0.075in" fo:padding-right="0.075in" fo:padding-top="0in" fo:padding-bottom="0in" fo:border="0.5pt solid #000000" style:writing-mode="lr-tb"/>
    </style:style>
    <style:style style:name="Table3.B5" style:family="table-cell">
      <style:table-cell-properties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fo:padding-left="0.075in" fo:padding-right="0.075in" fo:padding-top="0in" fo:padding-bottom="0in" fo:border="0.5pt solid #000000" style:writing-mode="lr-tb"/>
    </style:style>
    <style:style style:name="Table3.B6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1.6665in" fo:margin-bottom="0.0555in" style:contextual-spacing="false"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.4445in" fo:margin-bottom="0.0555in" style:contextual-spacing="false" fo:text-align="center" style:justify-single-word="false"/>
    </style:style>
    <style:style style:name="P4" style:family="paragraph" style:parent-style-name="Heading_20_1">
      <style:paragraph-properties fo:margin-top="0in" fo:margin-bottom="0.0835in" style:contextual-spacing="false" fo:break-before="page" fo:padding-left="0in" fo:padding-right="0in" fo:padding-top="0in" fo:padding-bottom="0.0835in" fo:border-left="none" fo:border-right="none" fo:border-top="none" fo:border-bottom="0.74pt solid #1f3a5f"/>
    </style:style>
    <style:style style:name="P5" style:family="paragraph" style:parent-style-name="Standard">
      <style:paragraph-properties fo:margin-top="0in" fo:margin-bottom="0.0555in" style:contextual-spacing="false" fo:line-height="108%"/>
    </style:style>
    <style:style style:name="P6" style:family="paragraph" style:parent-style-name="Heading_20_2">
      <style:paragraph-properties fo:margin-top="0.0835in" fo:margin-bottom="0.0417in" style:contextual-spacing="false"/>
    </style:style>
    <style:style style:name="P7" style:family="paragraph" style:parent-style-name="List_20_1" style:list-style-name="WWNum1">
      <style:paragraph-properties fo:margin-top="0in" fo:margin-bottom="0.028in" style:contextual-spacing="true"/>
    </style:style>
    <style:style style:name="P8" style:family="paragraph" style:parent-style-name="Heading_20_1">
      <style:paragraph-properties fo:margin-top="0.111in" fo:margin-bottom="0.0835in" style:contextual-spacing="false" fo:padding-left="0in" fo:padding-right="0in" fo:padding-top="0in" fo:padding-bottom="0.0835in" fo:border-left="none" fo:border-right="none" fo:border-top="none" fo:border-bottom="0.74pt solid #1f3a5f"/>
    </style:style>
    <style:style style:name="P9" style:family="paragraph" style:parent-style-name="Standard">
      <loext:graphic-properties draw:fill="solid" draw:fill-color="#f3f6fa"/>
      <style:paragraph-properties fo:margin-left="0.15in" fo:margin-right="0.15in" fo:margin-top="0.0417in" fo:margin-bottom="0.0693in" style:contextual-spacing="false" fo:background-color="#f3f6fa"/>
    </style:style>
    <style:style style:name="P10" style:family="paragraph" style:parent-style-name="Standard">
      <style:paragraph-properties fo:margin-top="0in" fo:margin-bottom="0.0555in" style:contextual-spacing="false" fo:line-height="100%" fo:text-align="start" style:justify-single-word="false" fo:orphans="2" fo:widows="2"/>
      <style:text-properties fo:language="en" fo:country="US" style:letter-kerning="false" style:language-asian="en" style:country-asian="US" style:font-name-complex="F" style:font-size-complex="11pt" style:language-complex="ar" style:country-complex="SA"/>
    </style:style>
    <style:style style:name="P11" style:family="paragraph" style:parent-style-name="Standard">
      <style:paragraph-properties fo:margin-top="0in" fo:margin-bottom="0.028in" style:contextual-spacing="false"/>
    </style:style>
    <style:style style:name="P12" style:family="paragraph" style:parent-style-name="Standard">
      <style:paragraph-properties fo:margin-top="0.25in" fo:margin-bottom="0.0555in" style:contextual-spacing="false" fo:text-align="center" style:justify-single-word="false"/>
    </style:style>
    <style:style style:name="T1" style:family="text">
      <style:text-properties fo:color="#1f3a5f" loext:opacity="100%" fo:font-size="34pt" fo:font-weight="bold" style:font-size-asian="34pt" style:font-weight-asian="bold"/>
    </style:style>
    <style:style style:name="T2" style:family="text">
      <style:text-properties fo:color="#1f3a5f" loext:opacity="100%" fo:font-size="22pt" fo:font-weight="bold" style:font-size-asian="22pt" style:font-weight-asian="bold"/>
    </style:style>
    <style:style style:name="T3" style:family="text">
      <style:text-properties fo:color="#404040" loext:opacity="100%" fo:font-size="12pt" style:font-size-asian="12pt"/>
    </style:style>
    <style:style style:name="T4" style:family="text">
      <style:text-properties fo:font-size="12pt" style:font-size-asian="12pt"/>
    </style:style>
    <style:style style:name="T5" style:family="text">
      <style:text-properties fo:font-size="10pt" style:font-size-asian="10pt"/>
    </style:style>
    <style:style style:name="T6" style:family="text">
      <style:text-properties fo:color="#5a5a5a" loext:opacity="100%" fo:font-size="9pt" fo:font-style="italic" style:font-size-asian="9pt" style:font-style-asian="italic"/>
    </style:style>
    <style:style style:name="T7" style:family="text">
      <style:text-properties fo:color="#1f3a5f" loext:opacity="100%" fo:font-size="18pt" style:font-size-asian="18pt"/>
    </style:style>
    <style:style style:name="T8" style:family="text">
      <style:text-properties fo:color="#202020" loext:opacity="100%" fo:font-size="14pt" style:font-size-asian="14pt"/>
    </style:style>
    <style:style style:name="T9" style:family="text">
      <style:text-properties fo:font-family="'Liberation Mono'" style:font-family-generic="roman" style:font-pitch="variable" fo:font-size="9pt" style:font-family-asian="'Liberation Mono'" style:font-family-generic-asian="system" style:font-pitch-asian="variable" style:font-size-asian="9pt"/>
    </style:style>
    <style:style style:name="T10" style:family="text">
      <style:text-properties fo:font-family="'Liberation Mono'" style:font-family-generic="roman" style:font-pitch="variable" fo:font-size="7.5pt" style:font-family-asian="'Liberation Mono'" style:font-family-generic-asian="system" style:font-pitch-asian="variable" style:font-size-asian="7.5pt"/>
    </style:style>
    <style:style style:name="T11" style:family="text">
      <style:text-properties fo:color="#ffffff" loext:opacity="100%" fo:font-weight="bold" style:font-weight-asian="bold"/>
    </style:style>
    <style:style style:name="T12" style:family="text">
      <style:text-properties fo:font-family="'Liberation Mono'" style:font-family-generic="roman" style:font-pitch="variable" fo:font-size="7pt" style:font-family-asian="'Liberation Mono'" style:font-family-generic-asian="system" style:font-pitch-asian="variable" style:font-size-asian="7pt"/>
    </style:style>
    <style:style style:name="T13" style:family="text">
      <style:text-properties fo:font-family="'Liberation Mono'" style:font-family-generic="roman" style:font-pitch="variable" fo:font-size="8pt" style:font-family-asian="'Liberation Mono'" style:font-family-generic-asian="system" style:font-pitch-asian="variable" style:font-size-asian="8pt"/>
    </style:style>
    <style:style style:name="T14" style:family="text">
      <style:text-properties fo:font-weight="bold" style:font-weight-asian="bold"/>
    </style:style>
    <style:style style:name="T15" style:family="text">
      <style:text-properties fo:color="#1f3a5f" loext:opacity="100%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ALCON</text:span></text:p>
      <text:p text:style-name="P2"><text:span text:style-name="T2">GitHub Structure v1.0</text:span></text:p>
      <text:p text:style-name="P2"><text:span text:style-name="T3">AI • DATA • FOOTBALL ANALYTICS</text:span></text:p>
      <text:p text:style-name="P3"><text:span text:style-name="T4">Artur Czernek</text:span></text:p>
      <text:p text:style-name="P2"><text:span text:style-name="T5">July 2026</text:span></text:p>
      <text:p text:style-name="P1"><text:span text:style-name="T6">Purpose: turn Project FALCON into visible public proof of work.</text:span></text:p>
      <text:p text:style-name="Standard"/>
      <text:h text:style-name="P4" text:outline-level="1"><text:span text:style-name="T7">1. CEL DOKUMENTU</text:span></text:h>
      <text:p text:style-name="P5">Ten dokument ustala, jak ma wyglądać GitHub dla projektu FALCON. GitHub nie ma być magazynem przypadkowych plików. Ma być publicznym dowodem pracy: uporządkowanym, prostym i zrozumiałym dla rekrutera, osoby technicznej albo kogoś z branży Football Analytics.</text:p>
      <text:p text:style-name="P5">Na tym etapie GitHub ma pokazać trzy rzeczy: kierunek, systematyczność i pierwsze konkretne efekty. Nie udajemy seniora. Pokazujemy człowieka, który świadomie buduje kompetencje w AI, danych i Football Analytics.</text:p>
      <text:h text:style-name="P6" text:outline-level="2"><text:span text:style-name="T8">Główna zasada</text:span></text:h>
      <text:p text:style-name="P5">GitHub ma rosnąć razem z FALCONEM. Najpierw prosta struktura. Potem pierwsze ćwiczenia. Potem projekty. Potem portfolio.</text:p>
      <text:h text:style-name="P6" text:outline-level="2"><text:span text:style-name="T8">Efekt po wdrożeniu</text:span></text:h>
      <text:list text:style-name="WWNum1">
        <text:list-item>
          <text:p text:style-name="P7">jedno główne repozytorium projektu FALCON,</text:p>
        </text:list-item>
        <text:list-item>
          <text:p text:style-name="P7">czytelny plik README.md po angielsku,</text:p>
        </text:list-item>
        <text:list-item>
          <text:p text:style-name="P7">foldery pod SQL, Python, Football Analytics, raporty i dokumentację,</text:p>
        </text:list-item>
        <text:list-item>
          <text:p text:style-name="P7">pierwszy plan commitów,</text:p>
        </text:list-item>
        <text:list-item>
          <text:p text:style-name="P7">jasne zasady, czego wrzucać nie wolno.</text:p>
        </text:list-item>
      </text:list>
      <text:h text:style-name="P8" text:outline-level="1"><text:span text:style-name="T7">2. NAZWA REPOZYTORIUM</text:span></text:h>
      <text:p text:style-name="P5">Rekomendowana nazwa repozytorium:</text:p>
      <text:p text:style-name="P9"><text:span text:style-name="T9">project-falcon-ai-football-analytics</text:span><text:line-break/></text:p>
      <text:p text:style-name="P5">Dlaczego taka nazwa? Jest prosta, po angielsku i od razu mówi, o co chodzi. Nie ma polskich znaków, spacji ani ozdobników. GitHub lubi prostotę. I dobrze, bo przynajmniej jedna część internetu zachowuje resztki rozsądku.</text:p>
      <text:h text:style-name="P6" text:outline-level="2"><text:span text:style-name="T8">Alternatywy</text:span></text:h>
      <text:list text:continue-numbering="true" text:style-name="WWNum1">
        <text:list-item>
          <text:p text:style-name="P7">project-falcon</text:p>
        </text:list-item>
        <text:list-item>
          <text:p text:style-name="P7">falcon-ai-career-roadmap</text:p>
        </text:list-item>
        <text:list-item>
          <text:p text:style-name="P7">falcon-football-analytics</text:p>
        </text:list-item>
      </text:list>
      <text:p text:style-name="P5">Najlepszy wybór na start: project-falcon-ai-football-analytics.</text:p>
      <text:p text:style-name="Standard"/>
      <text:h text:style-name="P4" text:outline-level="1"><text:span text:style-name="T7">3. STRUKTURA REPOZYTORIUM</text:span></text:h>
      <text:p text:style-name="P5">Na GitHubie nie wrzucamy całego bałaganu z komputera. Repozytorium ma być czyste i przeznaczone do pokazania publicznie.</text:p>
      <text:p text:style-name="P9"><text:span text:style-name="T10">project-falcon-ai-football-analytics/</text:span><text:line-break/><text:span text:style-name="T10">|</text:span><text:line-break/><text:span text:style-name="T10">|-- README.md</text:span><text:line-break/><text:span text:style-name="T10">|-- 01_sql/</text:span><text:line-break/><text:span text:style-name="T10">| <text:s text:c="2"/>|-- exercises/</text:span><text:line-break/><text:span text:style-name="T10">| <text:s text:c="2"/>|-- mini_projects/</text:span><text:line-break/><text:span text:style-name="T10">| <text:s text:c="2"/>`-- notes/</text:span><text:line-break/><text:span text:style-name="T10">|</text:span><text:line-break/><text:span text:style-name="T10">|-- 02_python/</text:span><text:line-break/><text:span text:style-name="T10">| <text:s text:c="2"/>|-- exercises/</text:span><text:line-break/><text:span text:style-name="T10">| <text:s text:c="2"/>|-- notebooks/</text:span><text:line-break/><text:span text:style-name="T10">| <text:s text:c="2"/>|-- scripts/</text:span><text:line-break/><text:span text:style-name="T10">| <text:s text:c="2"/>`-- notes/</text:span><text:line-break/><text:span text:style-name="T10">|</text:span><text:line-break/><text:span text:style-name="T10">|-- 03_football_analytics/</text:span><text:line-break/><text:span text:style-name="T10">| <text:s text:c="2"/>|-- match_reports/</text:span><text:line-break/><text:span text:style-name="T10">| <text:s text:c="2"/>|-- player_reports/</text:span><text:line-break/><text:span text:style-name="T10">| <text:s text:c="2"/>|-- team_reports/</text:span><text:line-break/><text:span text:style-name="T10">| <text:s text:c="2"/>`-- data_projects/</text:span><text:line-break/><text:span text:style-name="T10">|</text:span><text:line-break/><text:span text:style-name="T10">|-- 04_ai_evaluation/</text:span><text:line-break/><text:span text:style-name="T10">| <text:s text:c="2"/>|-- notes/</text:span><text:line-break/><text:span text:style-name="T10">| <text:s text:c="2"/>`-- learning_log/</text:span><text:line-break/><text:span text:style-name="T10">|</text:span><text:line-break/><text:span text:style-name="T10">|-- 05_portfolio/</text:span><text:line-break/><text:span text:style-name="T10">| <text:s text:c="2"/>|-- project_summaries/</text:span><text:line-break/><text:span text:style-name="T10">| <text:s text:c="2"/>`-- screenshots/</text:span><text:line-break/><text:span text:style-name="T10">|</text:span><text:line-break/><text:span text:style-name="T10">|-- 06_docs/</text:span><text:line-break/><text:span text:style-name="T10">| <text:s text:c="2"/>|-- roadmap/</text:span><text:line-break/><text:span text:style-name="T10">| <text:s text:c="2"/>`-- templates/</text:span><text:line-break/><text:span text:style-name="T10">|</text:span><text:line-break/><text:span text:style-name="T10">|-- data/</text:span><text:line-break/><text:span text:style-name="T10">| <text:s text:c="2"/>`-- sample_data_only/</text:span><text:line-break/><text:span text:style-name="T10">|</text:span><text:line-break/><text:span text:style-name="T10">`-- .gitignore</text:span><text:line-break/></text:p>
      <text:p text:style-name="P5">Ta struktura ma jeden cel: osoba oglądająca repozytorium ma od razu wiedzieć, gdzie wejść i co zobaczyć. Zero archeologii cyfrowej.</text:p>
      <text:h text:style-name="P8" text:outline-level="1"><text:span text:style-name="T7">4. MAPOWANIE FOLDERÓW LOKALNYCH NA GITHUB</text:span></text:h>
      <text:p text:style-name="P5">Folder na laptopie i folder na GitHubie nie muszą być identyczne. Lokalnie możesz mieć backupy, PDF-y, wersje robocze i materiały. Publicznie pokazujemy tylko wybrane elementy.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0"><text:span text:style-name="T11">Folder lokalny</text:span></text:p>
          </table:table-cell>
          <table:table-cell table:style-name="Table1.A1" office:value-type="string">
            <text:p text:style-name="P10"><text:span text:style-name="T11">Folder GitHub</text:span></text:p>
          </table:table-cell>
          <table:table-cell table:style-name="Table1.A1" office:value-type="string">
            <text:p text:style-name="P10"><text:span text:style-name="T11">Co trafia publicznie</text:span></text:p>
          </table:table-cell>
        </table:table-row>
        <table:table-row table:style-name="Table1.1">
          <table:table-cell table:style-name="Table1.A2" office:value-type="string">
            <text:p text:style-name="P10">03_SQL</text:p>
          </table:table-cell>
          <table:table-cell table:style-name="Table1.A2" office:value-type="string">
            <text:p text:style-name="P10">01_sql</text:p>
          </table:table-cell>
          <table:table-cell table:style-name="Table1.A2" office:value-type="string">
            <text:p text:style-name="P10">ćwiczenia, mini-projekty, notatki bez danych prywatnych</text:p>
          </table:table-cell>
        </table:table-row>
        <table:table-row table:style-name="Table1.1">
          <table:table-cell table:style-name="Table1.A2" office:value-type="string">
            <text:p text:style-name="P10">04_Python</text:p>
          </table:table-cell>
          <table:table-cell table:style-name="Table1.A2" office:value-type="string">
            <text:p text:style-name="P10">02_python</text:p>
          </table:table-cell>
          <table:table-cell table:style-name="Table1.A2" office:value-type="string">
            <text:p text:style-name="P10">skrypty, notebooki, ćwiczenia</text:p>
          </table:table-cell>
        </table:table-row>
        <table:table-row table:style-name="Table1.1">
          <table:table-cell table:style-name="Table1.A2" office:value-type="string">
            <text:p text:style-name="P10">05_Football_Analytics</text:p>
          </table:table-cell>
          <table:table-cell table:style-name="Table1.A2" office:value-type="string">
            <text:p text:style-name="P10">03_football_analytics</text:p>
          </table:table-cell>
          <table:table-cell table:style-name="Table1.A2" office:value-type="string">
            <text:p text:style-name="P10">raporty i projekty nadające się do pokazania</text:p>
          </table:table-cell>
        </table:table-row>
        <table:table-row table:style-name="Table1.1">
          <table:table-cell table:style-name="Table1.A2" office:value-type="string">
            <text:p text:style-name="P10">10_AI_TASKS</text:p>
          </table:table-cell>
          <table:table-cell table:style-name="Table1.A2" office:value-type="string">
            <text:p text:style-name="P10">04_ai_evaluation</text:p>
          </table:table-cell>
          <table:table-cell table:style-name="Table1.A2" office:value-type="string">
            <text:p text:style-name="P10">tylko notatki ogólne, bez treści tasków i NDA</text:p>
          </table:table-cell>
        </table:table-row>
        <table:table-row table:style-name="Table1.1">
          <table:table-cell table:style-name="Table1.A2" office:value-type="string">
            <text:p text:style-name="P10">07_Portfolio</text:p>
          </table:table-cell>
          <table:table-cell table:style-name="Table1.A2" office:value-type="string">
            <text:p text:style-name="P10">05_portfolio</text:p>
          </table:table-cell>
          <table:table-cell table:style-name="Table1.A2" office:value-type="string">
            <text:p text:style-name="P10">podsumowania projektów, screeny, linki</text:p>
          </table:table-cell>
        </table:table-row>
        <table:table-row table:style-name="Table1.1">
          <table:table-cell table:style-name="Table1.A2" office:value-type="string">
            <text:p text:style-name="P10">01_Master / 02_60_Day_Plan</text:p>
          </table:table-cell>
          <table:table-cell table:style-name="Table1.A2" office:value-type="string">
            <text:p text:style-name="P10">06_docs</text:p>
          </table:table-cell>
          <table:table-cell table:style-name="Table1.A2" office:value-type="string">
            <text:p text:style-name="P10">publiczne wersje wybranych dokumentów, jeśli uznasz, że warto</text:p>
          </table:table-cell>
        </table:table-row>
      </table:table>
      <text:p text:style-name="P5">Ważne: CV z numerem telefonu i prywatnym adresem e-mail nie powinno trafiać do publicznego repozytorium bez wcześniejszego przemyślenia. GitHub to nie sejf. To wystawa za szybą.</text:p>
      <text:p text:style-name="Standard"/>
      <text:h text:style-name="P4" text:outline-level="1"><text:span text:style-name="T7">5. README.MD - GŁÓWNY TEKST</text:span></text:h>
      <text:p text:style-name="P5">README to najważniejszy plik w repozytorium. To pierwsza rzecz, którą zobaczy ktoś z zewnątrz. Musi być krótki, konkretny i po angielsku.</text:p>
      <text:p text:style-name="P5">Poniżej gotowa wersja startowa do pliku README.md.</text:p>
      <text:p text:style-name="P9"><text:span text:style-name="T12"># Project FALCON</text:span><text:line-break/><text:line-break/><text:span text:style-name="T12">Project FALCON is a structured career-transition project focused on AI evaluation, SQL, Python and football analytics.</text:span><text:line-break/><text:line-break/><text:span text:style-name="T12">The goal is to turn daily learning into visible work, visible work into portfolio proof, and portfolio proof into better career opportunities.</text:span><text:line-break/><text:line-break/><text:span text:style-name="T12">## Main Tracks</text:span><text:line-break/><text:line-break/><text:span text:style-name="T12">- AI Evaluation and Search Quality</text:span><text:line-break/><text:span text:style-name="T12">- SQL for Data Analysis</text:span><text:line-break/><text:span text:style-name="T12">- Python Foundations</text:span><text:line-break/><text:span text:style-name="T12">- Football Analytics</text:span><text:line-break/><text:span text:style-name="T12">- GitHub and Portfolio Development</text:span><text:line-break/><text:line-break/><text:span text:style-name="T12">## Current Focus</text:span><text:line-break/><text:line-break/><text:span text:style-name="T12">I am currently building practical foundations in SQL and Python while developing a football analytics portfolio. The project is based on a 60-day execution plan with daily work, small projects and regular documentation.</text:span><text:line-break/><text:line-break/><text:span text:style-name="T12">## Repository Structure</text:span><text:line-break/><text:line-break/><text:span text:style-name="T12">- `01_sql` - SQL exercises, notes and mini-projects</text:span><text:line-break/><text:span text:style-name="T12">- `02_python` - Python exercises, scripts and notebooks</text:span><text:line-break/><text:span text:style-name="T12">- `03_football_analytics` - match reports, player reports and football data projects</text:span><text:line-break/><text:span text:style-name="T12">- `04_ai_evaluation` - general notes on AI evaluation workflows and learning progress</text:span><text:line-break/><text:span text:style-name="T12">- `05_portfolio` - summaries of completed projects</text:span><text:line-break/><text:span text:style-name="T12">- `06_docs` - roadmap documents and templates</text:span><text:line-break/><text:span text:style-name="T12">- `data` - sample data only</text:span><text:line-break/><text:line-break/><text:span text:style-name="T12">## Target Roles</text:span><text:line-break/><text:line-break/><text:span text:style-name="T12">- AI Evaluator</text:span><text:line-break/><text:span text:style-name="T12">- Search Quality Rater</text:span><text:line-break/><text:span text:style-name="T12">- Data Annotation Specialist</text:span><text:line-break/><text:span text:style-name="T12">- Internet Research Analyst</text:span><text:line-break/><text:span text:style-name="T12">- Junior Data / AI Support Role</text:span><text:line-break/><text:span text:style-name="T12">- Future direction: Football Data Analyst / AI Football Analytics Specialist</text:span><text:line-break/><text:line-break/><text:span text:style-name="T12">## Status</text:span><text:line-break/><text:line-break/><text:span text:style-name="T12">Project status: active development</text:span><text:line-break/><text:span text:style-name="T12">Start date: July 2026</text:span><text:line-break/><text:line-break/><text:span text:style-name="T12">## Contact</text:span><text:line-break/><text:line-break/><text:span text:style-name="T12">LinkedIn: in progress</text:span><text:line-break/><text:span text:style-name="T12">Portfolio: in progress</text:span><text:line-break/></text:p>
      <text:p text:style-name="Standard"/>
      <text:h text:style-name="P4" text:outline-level="1"><text:span text:style-name="T7">6. PIERWSZY OPIS PROFILU GITHUB</text:span></text:h>
      <text:p text:style-name="P5">Jeżeli później zrobisz profilowe README na GitHubie, możesz użyć takiego tekstu:</text:p>
      <text:p text:style-name="P9"><text:span text:style-name="T13">Hi, I am Artur.</text:span><text:line-break/><text:line-break/><text:span text:style-name="T13">I am building Project FALCON, a structured career-transition project focused on AI evaluation, data skills and football analytics.</text:span><text:line-break/><text:line-break/><text:span text:style-name="T13">My current focus:</text:span><text:line-break/><text:span text:style-name="T13">- SQL foundations</text:span><text:line-break/><text:span text:style-name="T13">- Python foundations</text:span><text:line-break/><text:span text:style-name="T13">- AI evaluation and search quality</text:span><text:line-break/><text:span text:style-name="T13">- football analytics portfolio</text:span><text:line-break/><text:span text:style-name="T13">- practical project documentation</text:span><text:line-break/><text:line-break/><text:span text:style-name="T13">Long-term direction:</text:span><text:line-break/><text:span text:style-name="T13">AI Football Analytics Specialist.</text:span><text:line-break/></text:p>
      <text:p text:style-name="Standard"/>
      <text:h text:style-name="P4" text:outline-level="1"><text:span text:style-name="T7">7. CO WRZUCIĆ JAKO PIERWSZE</text:span></text:h>
      <text:p text:style-name="P5">Pierwszy upload nie musi być duży. Ma być czysty i logiczny.</text:p>
      <text:h text:style-name="P6" text:outline-level="2"><text:span text:style-name="T8">Pierwsza paczka na GitHub</text:span></text:h>
      <text:list text:continue-numbering="true" text:style-name="WWNum1">
        <text:list-item>
          <text:p text:style-name="P7">README.md</text:p>
        </text:list-item>
        <text:list-item>
          <text:p text:style-name="P7">.gitignore</text:p>
        </text:list-item>
        <text:list-item>
          <text:p text:style-name="P7">folder 01_sql z pustymi podfolderami i plikiem .gitkeep,</text:p>
        </text:list-item>
        <text:list-item>
          <text:p text:style-name="P7">folder 02_python z pustymi podfolderami i plikiem .gitkeep,</text:p>
        </text:list-item>
        <text:list-item>
          <text:p text:style-name="P7">folder 03_football_analytics z pustymi podfolderami i plikiem .gitkeep,</text:p>
        </text:list-item>
        <text:list-item>
          <text:p text:style-name="P7">folder 05_portfolio z krótkim opisem projektów w planie.</text:p>
        </text:list-item>
      </text:list>
      <text:h text:style-name="P6" text:outline-level="2"><text:span text:style-name="T8">Czego nie wrzucać na start</text:span></text:h>
      <text:list text:continue-numbering="true" text:style-name="WWNum1">
        <text:list-item>
          <text:p text:style-name="P7">prywatnych CV z numerem telefonu,</text:p>
        </text:list-item>
        <text:list-item>
          <text:p text:style-name="P7">screenów z platform AI,</text:p>
        </text:list-item>
        <text:list-item>
          <text:p text:style-name="P7">treści zadań objętych NDA albo regulaminem platform,</text:p>
        </text:list-item>
        <text:list-item>
          <text:p text:style-name="P7">losowych notatek bez opisu,</text:p>
        </text:list-item>
        <text:list-item>
          <text:p text:style-name="P7">plików tymczasowych, backupów i kopii typu final_final.</text:p>
        </text:list-item>
      </text:list>
      <text:h text:style-name="P8" text:outline-level="1"><text:span text:style-name="T7">8. .GITIGNORE</text:span></text:h>
      <text:p text:style-name="P5">Plik .gitignore chroni repo przed wrzucaniem śmieci technicznych. Startowa wersja:</text:p>
      <text:p text:style-name="P9"><text:span text:style-name="T13"># Python</text:span><text:line-break/><text:span text:style-name="T13">__pycache__/</text:span><text:line-break/><text:span text:style-name="T13">*.pyc</text:span><text:line-break/><text:span text:style-name="T13">.venv/</text:span><text:line-break/><text:span text:style-name="T13">venv/</text:span><text:line-break/><text:line-break/><text:span text:style-name="T13"># Jupyter</text:span><text:line-break/><text:span text:style-name="T13">.ipynb_checkpoints/</text:span><text:line-break/><text:line-break/><text:span text:style-name="T13"># System files</text:span><text:line-break/><text:span text:style-name="T13">.DS_Store</text:span><text:line-break/><text:span text:style-name="T13">Thumbs.db</text:span><text:line-break/><text:line-break/><text:span text:style-name="T13"># Office temporary files</text:span><text:line-break/><text:span text:style-name="T13">~$*.docx</text:span><text:line-break/><text:span text:style-name="T13">~$*.odt</text:span><text:line-break/><text:span text:style-name="T13">*.tmp</text:span><text:line-break/><text:line-break/><text:span text:style-name="T13"># Private files</text:span><text:line-break/><text:span text:style-name="T13">private/</text:span><text:line-break/><text:span text:style-name="T13">secrets/</text:span><text:line-break/><text:span text:style-name="T13">.env</text:span><text:line-break/><text:line-break/><text:span text:style-name="T13"># Large raw data</text:span><text:line-break/><text:span text:style-name="T13">raw_data/</text:span><text:line-break/></text:p>
      <text:p text:style-name="Standard"/>
      <text:h text:style-name="P4" text:outline-level="1"><text:span text:style-name="T7">9. PIERWSZE COMMITY</text:span></text:h>
      <text:p text:style-name="P5">Commity mają opowiadać historię rozwoju. Nie muszą być genialne. Mają być czytelne.</text:p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10"><text:span text:style-name="T11">Commit</text:span></text:p>
          </table:table-cell>
          <table:table-cell table:style-name="Table2.A1" office:value-type="string">
            <text:p text:style-name="P10"><text:span text:style-name="T11">Message</text:span></text:p>
          </table:table-cell>
          <table:table-cell table:style-name="Table2.A1" office:value-type="string">
            <text:p text:style-name="P10"><text:span text:style-name="T11">Co zawiera</text:span></text:p>
          </table:table-cell>
        </table:table-row>
        <table:table-row table:style-name="Table2.1">
          <table:table-cell table:style-name="Table2.A2" office:value-type="string">
            <text:p text:style-name="P10">1</text:p>
          </table:table-cell>
          <table:table-cell table:style-name="Table2.B2" office:value-type="string">
            <text:p text:style-name="P10">Initialize Project FALCON repository</text:p>
          </table:table-cell>
          <table:table-cell table:style-name="Table2.C2" office:value-type="string">
            <text:p text:style-name="P10">README, foldery, .gitignore</text:p>
          </table:table-cell>
        </table:table-row>
        <table:table-row table:style-name="Table2.1">
          <table:table-cell table:style-name="Table2.A3" office:value-type="string">
            <text:p text:style-name="P10">2</text:p>
          </table:table-cell>
          <table:table-cell table:style-name="Table2.B3" office:value-type="string">
            <text:p text:style-name="P10">Add SQL learning structure</text:p>
          </table:table-cell>
          <table:table-cell table:style-name="Table2.C3" office:value-type="string">
            <text:p text:style-name="P10">foldery SQL, pierwszy notes</text:p>
          </table:table-cell>
        </table:table-row>
        <table:table-row table:style-name="Table2.1">
          <table:table-cell table:style-name="Table2.A4" office:value-type="string">
            <text:p text:style-name="P10">3</text:p>
          </table:table-cell>
          <table:table-cell table:style-name="Table2.B4" office:value-type="string">
            <text:p text:style-name="P10">Add Python learning structure</text:p>
          </table:table-cell>
          <table:table-cell table:style-name="Table2.C4" office:value-type="string">
            <text:p text:style-name="P10">foldery Python, pierwszy notes</text:p>
          </table:table-cell>
        </table:table-row>
        <table:table-row table:style-name="Table2.1">
          <table:table-cell table:style-name="Table2.A5" office:value-type="string">
            <text:p text:style-name="P10">4</text:p>
          </table:table-cell>
          <table:table-cell table:style-name="Table2.B5" office:value-type="string">
            <text:p text:style-name="P10">Add football analytics structure</text:p>
          </table:table-cell>
          <table:table-cell table:style-name="Table2.C5" office:value-type="string">
            <text:p text:style-name="P10">foldery raportów i projektów piłkarskich</text:p>
          </table:table-cell>
        </table:table-row>
        <table:table-row table:style-name="Table2.1">
          <table:table-cell table:style-name="Table2.A6" office:value-type="string">
            <text:p text:style-name="P10">5</text:p>
          </table:table-cell>
          <table:table-cell table:style-name="Table2.B6" office:value-type="string">
            <text:p text:style-name="P10">Add first project roadmap</text:p>
          </table:table-cell>
          <table:table-cell table:style-name="Table2.C6" office:value-type="string">
            <text:p text:style-name="P10">opis pierwszych projektów do portfolio</text:p>
          </table:table-cell>
        </table:table-row>
      </table:table>
      <text:p text:style-name="P5">Nie rób jednego commita pod tytułem “wszystko”. To jest cyfrowy odpowiednik wrzucenia całej szafy do jednego kartonu z napisem “rzeczy”.</text:p>
      <text:p text:style-name="Standard"/>
      <text:h text:style-name="P4" text:outline-level="1"><text:span text:style-name="T7">10. PIERWSZE PROJEKTY W REPO</text:span></text:h>
      <text:p text:style-name="P5">Repozytorium nie może wiecznie być pustą strukturą. Dlatego od razu planujemy pierwsze małe projekty.</text:p>
      <text:h text:style-name="P6" text:outline-level="2"><text:span text:style-name="T8">Project 1: SQL Football Mini Analysis</text:span></text:h>
      <text:p text:style-name="P5">Prosty projekt z zapytaniami SQL: SELECT, WHERE, GROUP BY, JOIN. Dane przykładowe lub publiczne.</text:p>
      <text:h text:style-name="P6" text:outline-level="2"><text:span text:style-name="T8">Project 2: Python Match Data Notebook</text:span></text:h>
      <text:p text:style-name="P5">Notebook z wczytaniem CSV, prostą analizą i wykresem.</text:p>
      <text:h text:style-name="P6" text:outline-level="2"><text:span text:style-name="T8">Project 3: Football Match Report</text:span></text:h>
      <text:p text:style-name="P5">Raport meczowy w Markdown lub PDF. Krótki, konkretny, z wnioskami.</text:p>
      <text:h text:style-name="P6" text:outline-level="2"><text:span text:style-name="T8">Project 4: Player Profile Report</text:span></text:h>
      <text:p text:style-name="P5">Opis zawodnika: rola, mocne strony, ograniczenia, dane, wnioski.</text:p>
      <text:h text:style-name="P6" text:outline-level="2"><text:span text:style-name="T8">Project 5: FALCON Progress Log</text:span></text:h>
      <text:p text:style-name="P5">Tygodniowy zapis postępu: co zrobione, czego się nauczyłem, co dalej.</text:p>
      <text:h text:style-name="P8" text:outline-level="1"><text:span text:style-name="T7">11. SZABLON OPISU PROJEKTU</text:span></text:h>
      <text:p text:style-name="P5">Każdy projekt powinien mieć krótki opis. Ten szablon kopiujesz do README w folderze projektu.</text:p>
      <text:p text:style-name="P9"><text:span text:style-name="T13"># Project Title</text:span><text:line-break/><text:line-break/><text:span text:style-name="T13">## Goal</text:span><text:line-break/><text:span text:style-name="T13">What is the goal of this project?</text:span><text:line-break/><text:line-break/><text:span text:style-name="T13">## Tools</text:span><text:line-break/><text:span text:style-name="T13">- SQL / Python / Excel / Power BI / Markdown</text:span><text:line-break/><text:line-break/><text:span text:style-name="T13">## Data</text:span><text:line-break/><text:span text:style-name="T13">What data was used? Is it public, sample or manually created?</text:span><text:line-break/><text:line-break/><text:span text:style-name="T13">## What I did</text:span><text:line-break/><text:span text:style-name="T13">- Step 1</text:span><text:line-break/><text:span text:style-name="T13">- Step 2</text:span><text:line-break/><text:span text:style-name="T13">- Step 3</text:span><text:line-break/><text:line-break/><text:span text:style-name="T13">## Results</text:span><text:line-break/><text:span text:style-name="T13">What did I find or build?</text:span><text:line-break/><text:line-break/><text:span text:style-name="T13">## What I learned</text:span><text:line-break/><text:span text:style-name="T13">What new skill did this project develop?</text:span><text:line-break/><text:line-break/><text:span text:style-name="T13">## Next improvements</text:span><text:line-break/><text:span text:style-name="T13">What could be improved later?</text:span><text:line-break/></text:p>
      <text:p text:style-name="Standard"/>
      <text:h text:style-name="P4" text:outline-level="1"><text:span text:style-name="T7">12. ZASADY PUBLIKOWANIA</text:span></text:h>
      <text:p text:style-name="P5">GitHub ma budować wiarygodność, a nie robić bałagan. Dlatego obowiązują proste zasady.</text:p>
      <text:list text:continue-numbering="true" text:style-name="WWNum1">
        <text:list-item>
          <text:p text:style-name="P7">Każdy folder ma mieć cel.</text:p>
        </text:list-item>
        <text:list-item>
          <text:p text:style-name="P7">Każdy projekt ma mieć README.</text:p>
        </text:list-item>
        <text:list-item>
          <text:p text:style-name="P7">Nie wrzucam danych prywatnych.</text:p>
        </text:list-item>
        <text:list-item>
          <text:p text:style-name="P7">Nie wrzucam materiałów z platform AI, jeśli mogą być objęte regulaminem albo NDA.</text:p>
        </text:list-item>
        <text:list-item>
          <text:p text:style-name="P7">Nie wrzucam niedokończonych śmieci bez opisu.</text:p>
        </text:list-item>
        <text:list-item>
          <text:p text:style-name="P7">Nie kasuję historii projektu tylko dlatego, że pierwsza wersja była prosta.</text:p>
        </text:list-item>
        <text:list-item>
          <text:p text:style-name="P7">Raz w tygodniu aktualizuję progress log.</text:p>
        </text:list-item>
      </text:list>
      <text:h text:style-name="P8" text:outline-level="1"><text:span text:style-name="T7">13. DANE PRYWATNE I BEZPIECZEŃSTWO</text:span></text:h>
      <text:p text:style-name="P5">To ważne: GitHub jest publiczny. To, co wrzucisz, może zostać skopiowane, zarchiwizowane i znalezione później. Internet ma pamięć słonia i moralność automatu z hot dogami.</text:p>
      <text:h text:style-name="P6" text:outline-level="2"><text:span text:style-name="T8">Nie publikować</text:span></text:h>
      <text:list text:continue-numbering="true" text:style-name="WWNum1">
        <text:list-item>
          <text:p text:style-name="P7">numeru telefonu, jeśli nie jest potrzebny,</text:p>
        </text:list-item>
        <text:list-item>
          <text:p text:style-name="P7">adresu prywatnego,</text:p>
        </text:list-item>
        <text:list-item>
          <text:p text:style-name="P7">pełnych dokumentów z danymi osobowymi,</text:p>
        </text:list-item>
        <text:list-item>
          <text:p text:style-name="P7">screenshotów z platform z płatnymi taskami,</text:p>
        </text:list-item>
        <text:list-item>
          <text:p text:style-name="P7">treści zadań, benchmarków albo instrukcji z platform AI,</text:p>
        </text:list-item>
        <text:list-item>
          <text:p text:style-name="P7">plików z hasłami, tokenami albo kluczami API,</text:p>
        </text:list-item>
        <text:list-item>
          <text:p text:style-name="P7">surowych danych, jeśli nie masz prawa ich używać publicznie.</text:p>
        </text:list-item>
      </text:list>
      <text:h text:style-name="P6" text:outline-level="2"><text:span text:style-name="T8">Można publikować</text:span></text:h>
      <text:list text:continue-numbering="true" text:style-name="WWNum1">
        <text:list-item>
          <text:p text:style-name="P7">własne notatki ogólne,</text:p>
        </text:list-item>
        <text:list-item>
          <text:p text:style-name="P7"><text:soft-page-break/>własne ćwiczenia SQL/Python,</text:p>
        </text:list-item>
        <text:list-item>
          <text:p text:style-name="P7">projekty na danych publicznych albo przykładowych,</text:p>
        </text:list-item>
        <text:list-item>
          <text:p text:style-name="P7">raporty stworzone samodzielnie,</text:p>
        </text:list-item>
        <text:list-item>
          <text:p text:style-name="P7">opisy procesu nauki,</text:p>
        </text:list-item>
        <text:list-item>
          <text:p text:style-name="P7">wnioski z projektów bez ujawniania cudzych materiałów.</text:p>
        </text:list-item>
      </text:list>
      <text:h text:style-name="P8" text:outline-level="1"><text:span text:style-name="T7">14. JĘZYK REPOZYTORIUM</text:span></text:h>
      <text:p text:style-name="P5">Główne README i opisy projektów najlepiej pisać po angielsku. To zwiększa użyteczność repozytorium przy rolach AI i Data. Notatki robocze możesz mieć po polsku, ale projekty portfolio powinny mieć przynajmniej krótki opis po angielsku.</text:p>
      <text:p text:style-name="P5">Na start wystarczy prosty angielski. Nie chodzi o literackie fajerwerki. Chodzi o klarowność. GitHub to nie konkurs poezji, na szczęście.</text:p>
      <text:p text:style-name="Standard"/>
      <text:h text:style-name="P4" text:outline-level="1"><text:span text:style-name="T7">15. TYGODNIOWY WORKFLOW GITHUB</text:span></text:h>
      <text:p text:style-name="P5">GitHub ma być aktualizowany regularnie, ale bez obsesji. Nie musisz commitować każdego kaszlnięcia. Wystarczy sensowny rytm.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<text:span text:style-name="T11">Częstotliwość</text:span></text:p>
          </table:table-cell>
          <table:table-cell table:style-name="Table3.A1" office:value-type="string">
            <text:p text:style-name="P10"><text:span text:style-name="T11">Działanie</text:span></text:p>
          </table:table-cell>
        </table:table-row>
        <table:table-row table:style-name="Table3.1">
          <table:table-cell table:style-name="Table3.A2" office:value-type="string">
            <text:p text:style-name="P10">Codziennie</text:p>
          </table:table-cell>
          <table:table-cell table:style-name="Table3.B2" office:value-type="string">
            <text:p text:style-name="P10">zapis ćwiczeń lokalnie, jeśli było SQL/Python</text:p>
          </table:table-cell>
        </table:table-row>
        <table:table-row table:style-name="Table3.1">
          <table:table-cell table:style-name="Table3.A3" office:value-type="string">
            <text:p text:style-name="P10">2-3 razy w tygodniu</text:p>
          </table:table-cell>
          <table:table-cell table:style-name="Table3.B3" office:value-type="string">
            <text:p text:style-name="P10">commit małych zmian</text:p>
          </table:table-cell>
        </table:table-row>
        <table:table-row table:style-name="Table3.1">
          <table:table-cell table:style-name="Table3.A4" office:value-type="string">
            <text:p text:style-name="P10">Raz w tygodniu</text:p>
          </table:table-cell>
          <table:table-cell table:style-name="Table3.B4" office:value-type="string">
            <text:p text:style-name="P10">aktualizacja progress log</text:p>
          </table:table-cell>
        </table:table-row>
        <table:table-row table:style-name="Table3.1">
          <table:table-cell table:style-name="Table3.A5" office:value-type="string">
            <text:p text:style-name="P10">Raz na 2 tygodnie</text:p>
          </table:table-cell>
          <table:table-cell table:style-name="Table3.B5" office:value-type="string">
            <text:p text:style-name="P10">małe podsumowanie projektu</text:p>
          </table:table-cell>
        </table:table-row>
        <table:table-row table:style-name="Table3.1">
          <table:table-cell table:style-name="Table3.A6" office:value-type="string">
            <text:p text:style-name="P10">Po każdym projekcie</text:p>
          </table:table-cell>
          <table:table-cell table:style-name="Table3.B6" office:value-type="string">
            <text:p text:style-name="P10">README, opis, wnioski, screenshot jeśli ma sens</text:p>
          </table:table-cell>
        </table:table-row>
      </table:table>
      <text:h text:style-name="P8" text:outline-level="1"><text:span text:style-name="T7">16. PROGRESS LOG</text:span></text:h>
      <text:p text:style-name="P5">Progress log to prosty zapis rozwoju. Później może być bardzo przydatny do LinkedIna, CV i rozmów rekrutacyjnych.</text:p>
      <text:p text:style-name="P9"><text:span text:style-name="T13"># FALCON Progress Log</text:span><text:line-break/><text:line-break/><text:span text:style-name="T13">## Week 1</text:span><text:line-break/><text:line-break/><text:span text:style-name="T13">### Completed</text:span><text:line-break/><text:span text:style-name="T13">- Created GitHub repository structure</text:span><text:line-break/><text:span text:style-name="T13">- Started SQL foundations</text:span><text:line-break/><text:span text:style-name="T13">- Started Python foundations</text:span><text:line-break/><text:line-break/><text:span text:style-name="T13">### Learned</text:span><text:line-break/><text:span text:style-name="T13">- Basic SQL SELECT / WHERE / ORDER BY</text:span><text:line-break/><text:span text:style-name="T13">- Python variables and lists</text:span><text:line-break/><text:line-break/><text:span text:style-name="T13">### Portfolio progress</text:span><text:line-break/><text:span text:style-name="T13">- Repository initialized</text:span><text:line-break/><text:span text:style-name="T13">- First README created</text:span><text:line-break/><text:line-break/><text:span text:style-name="T13">### Next week</text:span><text:line-break/><text:span text:style-name="T13">- Continue SQL aggregation</text:span><text:line-break/><text:span text:style-name="T13">- Continue Python loops and functions</text:span><text:line-break/><text:span text:style-name="T13">- Start first football analytics report</text:span><text:line-break/></text:p>
      <text:h text:style-name="P8" text:outline-level="1"><text:span text:style-name="T7">17. GITHUB A LINKEDIN</text:span></text:h>
      <text:p text:style-name="P5">GitHub ma wspierać LinkedIn. Kiedy pojawi się pierwszy sensowny projekt, można zrobić krótki post. Nie wcześniej. Nie promujemy pustej struktury, bo to trochę jak zapraszać ludzi na budowę i pokazywać im tylko fundamenty.</text:p>
      <text:h text:style-name="P6" text:outline-level="2"><text:span text:style-name="T8">Pierwszy możliwy post</text:span></text:h>
      <text:p text:style-name="P9"><text:span text:style-name="T13">I have started Project FALCON on GitHub.</text:span><text:line-break/><text:line-break/><text:span text:style-name="T13">It is a structured career-transition project focused on AI evaluation, SQL, Python and football analytics.</text:span><text:line-break/><text:line-break/><text:span text:style-name="T13">The first stage is simple:</text:span><text:line-break/><text:span text:style-name="T13">- build SQL and Python foundations,</text:span><text:line-break/><text:span text:style-name="T13">- document learning progress,</text:span><text:line-break/><text:span text:style-name="T13">- create first football analytics reports,</text:span><text:line-break/><text:span text:style-name="T13">- turn learning into visible portfolio proof.</text:span><text:line-break/><text:line-break/><text:span text:style-name="T13">This is not a finished portfolio yet. It is the beginning of a structured process.</text:span><text:line-break/></text:p>
      <text:h text:style-name="P8" text:outline-level="1"><text:span text:style-name="T7">18. CHECKLISTA STARTOWA</text:span></text:h>
      <text:p text:style-name="P5">To jest lista rzeczy do wykonania przy zakładaniu GitHuba FALCON.</text:p>
      <text:p text:style-name="P11"><text:span text:style-name="T14">☐ </text:span>Założyć repozytorium project-falcon-ai-football-analytics.</text:p>
      <text:p text:style-name="P11"><text:span text:style-name="T14">☐ </text:span>Dodać README.md.</text:p>
      <text:p text:style-name="P11"><text:span text:style-name="T14">☐ </text:span>Dodać .gitignore.</text:p>
      <text:p text:style-name="P11"><text:span text:style-name="T14">☐ </text:span>Utworzyć foldery 01_sql, 02_python, 03_football_analytics.</text:p>
      <text:p text:style-name="P11"><text:soft-page-break/><text:span text:style-name="T14">☐ </text:span>Utworzyć foldery 04_ai_evaluation, 05_portfolio, 06_docs, data.</text:p>
      <text:p text:style-name="P11"><text:span text:style-name="T14">☐ </text:span>Dodać pliki .gitkeep do pustych folderów.</text:p>
      <text:p text:style-name="P11"><text:span text:style-name="T14">☐ </text:span>Dodać pierwszy commit: Initialize Project FALCON repository.</text:p>
      <text:p text:style-name="P11"><text:span text:style-name="T14">☐ </text:span>Sprawdzić publiczny widok repozytorium.</text:p>
      <text:p text:style-name="P11"><text:span text:style-name="T14">☐ </text:span>Nie wrzucać prywatnych CV ani danych osobowych.</text:p>
      <text:p text:style-name="P11"><text:span text:style-name="T14">☐ </text:span>Zapisać link do repozytorium w folderze 06_GitHub lokalnie.</text:p>
      <text:h text:style-name="P8" text:outline-level="1"><text:span text:style-name="T7">19. CO DALEJ</text:span></text:h>
      <text:p text:style-name="P5">Po stworzeniu struktury GitHuba kolejny krok to pierwszy realny materiał: SQL basics albo pierwszy prosty raport Football Analytics. Samo repozytorium jest tylko półką. Wartość pojawia się dopiero wtedy, gdy zaczynają trafiać na nią projekty.</text:p>
      <text:p text:style-name="P5">Najbliższy praktyczny krok FALCONA: przygotować pierwsze pliki do repozytorium i uruchomić Day 1 z 60-Day Execution Plan.</text:p>
      <text:p text:style-name="P12"><text:span text:style-name="T15">Nie buduję kariery jednym wielkim krokiem. Buduję ją jednym dobrze wykonanym dniem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555in" style:contextual-spacing="false" fo:line-height="115%" fo:text-align="start" style:justify-single-word="false" fo:orphans="2" fo:widows="2" style:writing-mode="lr-tb"/>
      <style:text-properties style:font-name="Liberation Sans" fo:font-family="'Liberation Sans'" style:font-family-generic="roman" style:font-pitch="variable" fo:font-size="9.5pt" style:font-name-asian="Liberation Sans2" style:font-family-asian="'Liberation Sans'" style:font-family-generic-asian="system" style:font-pitch-asian="variable" style:font-size-asian="9.5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0555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0555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0555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0555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0555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0555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0555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0555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0555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0555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color="#5a5a5a" loext:opacity="100%" fo:font-size="7.5pt" style:font-size-asian="7.5pt"/>
    </style:style>
    <style:page-layout style:name="Mpm1">
      <style:page-layout-properties fo:page-width="8.2681in" fo:page-height="11.6929in" style:num-format="1" style:print-orientation="portrait" fo:margin-top="0.6102in" fo:margin-bottom="0.5in" fo:margin-left="0.689in" fo:margin-right="0.68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1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516in" fo:margin-left="0in" fo:margin-right="0in" fo:margin-top="0.0126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FALCON GitHub Structure v1.0 | Artur Czernek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2.3.2$Linux_X86_64 LibreOffice_project/520$Build-2</meta:generator>
    <meta:document-statistic meta:table-count="3" meta:image-count="0" meta:object-count="0" meta:page-count="12" meta:paragraph-count="182" meta:word-count="1811" meta:character-count="12226" meta:non-whitespace-character-count="10555"/>
    <meta:user-defined meta:name="AppVersion">14.0000</meta:user-defined>
    <meta:template xlink:type="simple" xlink:actuate="onRequest" xlink:title="Normal.dotm" xlink:href=""/>
  </office:meta>
</office:document-meta>
</file>