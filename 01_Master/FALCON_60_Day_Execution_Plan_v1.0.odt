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8299in" fo:margin-top="0in" fo:margin-bottom="0in" table:align="center" style:writing-mode="lr-tb"/>
    </style:style>
    <style:style style:name="Table1.A" style:family="table-column">
      <style:table-column-properties style:column-width="6.8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af5ef" fo:padding-left="0.075in" fo:padding-right="0.075in" fo:padding-top="0in" fo:padding-bottom="0in" fo:border="0.75pt solid #a7c6b6" style:writing-mode="lr-tb">
        <style:background-image/>
      </style:table-cell-properties>
    </style:style>
    <style:style style:name="Table2" style:family="table">
      <style:table-properties style:width="6.8299in" fo:margin-top="0in" fo:margin-bottom="0in" table:align="center" style:writing-mode="lr-tb"/>
    </style:style>
    <style:style style:name="Table2.A" style:family="table-column">
      <style:table-column-properties style:column-width="3.4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" style:family="table">
      <style:table-properties style:width="6.8299in" fo:margin-top="0in" fo:margin-bottom="0in" table:align="center" style:writing-mode="lr-tb"/>
    </style:style>
    <style:style style:name="Table3.A" style:family="table-column">
      <style:table-column-properties style:column-width="3.414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.A7" style:family="table-cell">
      <style:table-cell-properties style:vertical-align="middle" fo:background-color="#fff7ed" fo:padding-left="0.075in" fo:padding-right="0.075in" fo:padding-top="0in" fo:padding-bottom="0in" fo:border="0.75pt solid #e7a968" style:writing-mode="lr-tb">
        <style:background-image/>
      </style:table-cell-properties>
    </style:style>
    <style:style style:name="Table4" style:family="table">
      <style:table-properties style:width="6.8299in" fo:margin-top="0in" fo:margin-bottom="0in" table:align="center" style:writing-mode="lr-tb"/>
    </style:style>
    <style:style style:name="Table4.A" style:family="table-column">
      <style:table-column-properties style:column-width="3.414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" style:family="table">
      <style:table-properties style:width="6.8299in" fo:margin-top="0in" fo:margin-bottom="0in" table:align="center" style:writing-mode="lr-tb"/>
    </style:style>
    <style:style style:name="Table5.A" style:family="table-column">
      <style:table-column-properties style:column-width="1.138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d4dee8" style:writing-mode="lr-tb"/>
    </style:style>
    <style:style style:name="Table5.B2" style:family="table-cell">
      <style:table-cell-properties fo:padding-left="0.075in" fo:padding-right="0.075in" fo:padding-top="0in" fo:padding-bottom="0in" fo:border="0.5pt solid #d4dee8" style:writing-mode="lr-tb"/>
    </style:style>
    <style:style style:name="Table5.C2" style:family="table-cell">
      <style:table-cell-properties fo:padding-left="0.075in" fo:padding-right="0.075in" fo:padding-top="0in" fo:padding-bottom="0in" fo:border="0.5pt solid #d4dee8" style:writing-mode="lr-tb"/>
    </style:style>
    <style:style style:name="Table5.D2" style:family="table-cell">
      <style:table-cell-properties fo:padding-left="0.075in" fo:padding-right="0.075in" fo:padding-top="0in" fo:padding-bottom="0in" fo:border="0.5pt solid #d4dee8" style:writing-mode="lr-tb"/>
    </style:style>
    <style:style style:name="Table5.E2" style:family="table-cell">
      <style:table-cell-properties fo:padding-left="0.075in" fo:padding-right="0.075in" fo:padding-top="0in" fo:padding-bottom="0in" fo:border="0.5pt solid #d4dee8" style:writing-mode="lr-tb"/>
    </style:style>
    <style:style style:name="Table5.F2" style:family="table-cell">
      <style:table-cell-properties fo:padding-left="0.075in" fo:padding-right="0.075in" fo:padding-top="0in" fo:padding-bottom="0in" fo:border="0.5pt solid #d4dee8" style:writing-mode="lr-tb"/>
    </style:style>
    <style:style style:name="Table5.A3" style:family="table-cell">
      <style:table-cell-properties fo:padding-left="0.075in" fo:padding-right="0.075in" fo:padding-top="0in" fo:padding-bottom="0in" fo:border="0.5pt solid #d4dee8" style:writing-mode="lr-tb"/>
    </style:style>
    <style:style style:name="Table5.B3" style:family="table-cell">
      <style:table-cell-properties fo:padding-left="0.075in" fo:padding-right="0.075in" fo:padding-top="0in" fo:padding-bottom="0in" fo:border="0.5pt solid #d4dee8" style:writing-mode="lr-tb"/>
    </style:style>
    <style:style style:name="Table5.C3" style:family="table-cell">
      <style:table-cell-properties fo:padding-left="0.075in" fo:padding-right="0.075in" fo:padding-top="0in" fo:padding-bottom="0in" fo:border="0.5pt solid #d4dee8" style:writing-mode="lr-tb"/>
    </style:style>
    <style:style style:name="Table5.D3" style:family="table-cell">
      <style:table-cell-properties fo:padding-left="0.075in" fo:padding-right="0.075in" fo:padding-top="0in" fo:padding-bottom="0in" fo:border="0.5pt solid #d4dee8" style:writing-mode="lr-tb"/>
    </style:style>
    <style:style style:name="Table5.E3" style:family="table-cell">
      <style:table-cell-properties fo:padding-left="0.075in" fo:padding-right="0.075in" fo:padding-top="0in" fo:padding-bottom="0in" fo:border="0.5pt solid #d4dee8" style:writing-mode="lr-tb"/>
    </style:style>
    <style:style style:name="Table5.F3" style:family="table-cell">
      <style:table-cell-properties fo:padding-left="0.075in" fo:padding-right="0.075in" fo:padding-top="0in" fo:padding-bottom="0in" fo:border="0.5pt solid #d4dee8" style:writing-mode="lr-tb"/>
    </style:style>
    <style:style style:name="Table5.A4" style:family="table-cell">
      <style:table-cell-properties fo:padding-left="0.075in" fo:padding-right="0.075in" fo:padding-top="0in" fo:padding-bottom="0in" fo:border="0.5pt solid #d4dee8" style:writing-mode="lr-tb"/>
    </style:style>
    <style:style style:name="Table5.B4" style:family="table-cell">
      <style:table-cell-properties fo:padding-left="0.075in" fo:padding-right="0.075in" fo:padding-top="0in" fo:padding-bottom="0in" fo:border="0.5pt solid #d4dee8" style:writing-mode="lr-tb"/>
    </style:style>
    <style:style style:name="Table5.C4" style:family="table-cell">
      <style:table-cell-properties fo:padding-left="0.075in" fo:padding-right="0.075in" fo:padding-top="0in" fo:padding-bottom="0in" fo:border="0.5pt solid #d4dee8" style:writing-mode="lr-tb"/>
    </style:style>
    <style:style style:name="Table5.D4" style:family="table-cell">
      <style:table-cell-properties fo:padding-left="0.075in" fo:padding-right="0.075in" fo:padding-top="0in" fo:padding-bottom="0in" fo:border="0.5pt solid #d4dee8" style:writing-mode="lr-tb"/>
    </style:style>
    <style:style style:name="Table5.E4" style:family="table-cell">
      <style:table-cell-properties fo:padding-left="0.075in" fo:padding-right="0.075in" fo:padding-top="0in" fo:padding-bottom="0in" fo:border="0.5pt solid #d4dee8" style:writing-mode="lr-tb"/>
    </style:style>
    <style:style style:name="Table5.F4" style:family="table-cell">
      <style:table-cell-properties fo:padding-left="0.075in" fo:padding-right="0.075in" fo:padding-top="0in" fo:padding-bottom="0in" fo:border="0.5pt solid #d4dee8" style:writing-mode="lr-tb"/>
    </style:style>
    <style:style style:name="Table5.A5" style:family="table-cell">
      <style:table-cell-properties fo:padding-left="0.075in" fo:padding-right="0.075in" fo:padding-top="0in" fo:padding-bottom="0in" fo:border="0.5pt solid #d4dee8" style:writing-mode="lr-tb"/>
    </style:style>
    <style:style style:name="Table5.B5" style:family="table-cell">
      <style:table-cell-properties fo:padding-left="0.075in" fo:padding-right="0.075in" fo:padding-top="0in" fo:padding-bottom="0in" fo:border="0.5pt solid #d4dee8" style:writing-mode="lr-tb"/>
    </style:style>
    <style:style style:name="Table5.C5" style:family="table-cell">
      <style:table-cell-properties fo:padding-left="0.075in" fo:padding-right="0.075in" fo:padding-top="0in" fo:padding-bottom="0in" fo:border="0.5pt solid #d4dee8" style:writing-mode="lr-tb"/>
    </style:style>
    <style:style style:name="Table5.D5" style:family="table-cell">
      <style:table-cell-properties fo:padding-left="0.075in" fo:padding-right="0.075in" fo:padding-top="0in" fo:padding-bottom="0in" fo:border="0.5pt solid #d4dee8" style:writing-mode="lr-tb"/>
    </style:style>
    <style:style style:name="Table5.E5" style:family="table-cell">
      <style:table-cell-properties fo:padding-left="0.075in" fo:padding-right="0.075in" fo:padding-top="0in" fo:padding-bottom="0in" fo:border="0.5pt solid #d4dee8" style:writing-mode="lr-tb"/>
    </style:style>
    <style:style style:name="Table5.F5" style:family="table-cell">
      <style:table-cell-properties fo:padding-left="0.075in" fo:padding-right="0.075in" fo:padding-top="0in" fo:padding-bottom="0in" fo:border="0.5pt solid #d4dee8" style:writing-mode="lr-tb"/>
    </style:style>
    <style:style style:name="Table5.A6" style:family="table-cell">
      <style:table-cell-properties fo:padding-left="0.075in" fo:padding-right="0.075in" fo:padding-top="0in" fo:padding-bottom="0in" fo:border="0.5pt solid #d4dee8" style:writing-mode="lr-tb"/>
    </style:style>
    <style:style style:name="Table5.B6" style:family="table-cell">
      <style:table-cell-properties fo:padding-left="0.075in" fo:padding-right="0.075in" fo:padding-top="0in" fo:padding-bottom="0in" fo:border="0.5pt solid #d4dee8" style:writing-mode="lr-tb"/>
    </style:style>
    <style:style style:name="Table5.C6" style:family="table-cell">
      <style:table-cell-properties fo:padding-left="0.075in" fo:padding-right="0.075in" fo:padding-top="0in" fo:padding-bottom="0in" fo:border="0.5pt solid #d4dee8" style:writing-mode="lr-tb"/>
    </style:style>
    <style:style style:name="Table5.D6" style:family="table-cell">
      <style:table-cell-properties fo:padding-left="0.075in" fo:padding-right="0.075in" fo:padding-top="0in" fo:padding-bottom="0in" fo:border="0.5pt solid #d4dee8" style:writing-mode="lr-tb"/>
    </style:style>
    <style:style style:name="Table5.E6" style:family="table-cell">
      <style:table-cell-properties fo:padding-left="0.075in" fo:padding-right="0.075in" fo:padding-top="0in" fo:padding-bottom="0in" fo:border="0.5pt solid #d4dee8" style:writing-mode="lr-tb"/>
    </style:style>
    <style:style style:name="Table5.F6" style:family="table-cell">
      <style:table-cell-properties fo:padding-left="0.075in" fo:padding-right="0.075in" fo:padding-top="0in" fo:padding-bottom="0in" fo:border="0.5pt solid #d4dee8" style:writing-mode="lr-tb"/>
    </style:style>
    <style:style style:name="Table5.A7" style:family="table-cell">
      <style:table-cell-properties fo:padding-left="0.075in" fo:padding-right="0.075in" fo:padding-top="0in" fo:padding-bottom="0in" fo:border="0.5pt solid #d4dee8" style:writing-mode="lr-tb"/>
    </style:style>
    <style:style style:name="Table5.B7" style:family="table-cell">
      <style:table-cell-properties fo:padding-left="0.075in" fo:padding-right="0.075in" fo:padding-top="0in" fo:padding-bottom="0in" fo:border="0.5pt solid #d4dee8" style:writing-mode="lr-tb"/>
    </style:style>
    <style:style style:name="Table5.C7" style:family="table-cell">
      <style:table-cell-properties fo:padding-left="0.075in" fo:padding-right="0.075in" fo:padding-top="0in" fo:padding-bottom="0in" fo:border="0.5pt solid #d4dee8" style:writing-mode="lr-tb"/>
    </style:style>
    <style:style style:name="Table5.D7" style:family="table-cell">
      <style:table-cell-properties fo:padding-left="0.075in" fo:padding-right="0.075in" fo:padding-top="0in" fo:padding-bottom="0in" fo:border="0.5pt solid #d4dee8" style:writing-mode="lr-tb"/>
    </style:style>
    <style:style style:name="Table5.E7" style:family="table-cell">
      <style:table-cell-properties fo:padding-left="0.075in" fo:padding-right="0.075in" fo:padding-top="0in" fo:padding-bottom="0in" fo:border="0.5pt solid #d4dee8" style:writing-mode="lr-tb"/>
    </style:style>
    <style:style style:name="Table5.F7" style:family="table-cell">
      <style:table-cell-properties fo:padding-left="0.075in" fo:padding-right="0.075in" fo:padding-top="0in" fo:padding-bottom="0in" fo:border="0.5pt solid #d4dee8" style:writing-mode="lr-tb"/>
    </style:style>
    <style:style style:name="Table5.A8" style:family="table-cell">
      <style:table-cell-properties fo:padding-left="0.075in" fo:padding-right="0.075in" fo:padding-top="0in" fo:padding-bottom="0in" fo:border="0.5pt solid #d4dee8" style:writing-mode="lr-tb"/>
    </style:style>
    <style:style style:name="Table5.B8" style:family="table-cell">
      <style:table-cell-properties fo:padding-left="0.075in" fo:padding-right="0.075in" fo:padding-top="0in" fo:padding-bottom="0in" fo:border="0.5pt solid #d4dee8" style:writing-mode="lr-tb"/>
    </style:style>
    <style:style style:name="Table5.C8" style:family="table-cell">
      <style:table-cell-properties fo:padding-left="0.075in" fo:padding-right="0.075in" fo:padding-top="0in" fo:padding-bottom="0in" fo:border="0.5pt solid #d4dee8" style:writing-mode="lr-tb"/>
    </style:style>
    <style:style style:name="Table5.D8" style:family="table-cell">
      <style:table-cell-properties fo:padding-left="0.075in" fo:padding-right="0.075in" fo:padding-top="0in" fo:padding-bottom="0in" fo:border="0.5pt solid #d4dee8" style:writing-mode="lr-tb"/>
    </style:style>
    <style:style style:name="Table5.E8" style:family="table-cell">
      <style:table-cell-properties fo:padding-left="0.075in" fo:padding-right="0.075in" fo:padding-top="0in" fo:padding-bottom="0in" fo:border="0.5pt solid #d4dee8" style:writing-mode="lr-tb"/>
    </style:style>
    <style:style style:name="Table5.F8" style:family="table-cell">
      <style:table-cell-properties fo:padding-left="0.075in" fo:padding-right="0.075in" fo:padding-top="0in" fo:padding-bottom="0in" fo:border="0.5pt solid #d4dee8" style:writing-mode="lr-tb"/>
    </style:style>
    <style:style style:name="Table5.A9" style:family="table-cell">
      <style:table-cell-properties fo:padding-left="0.075in" fo:padding-right="0.075in" fo:padding-top="0in" fo:padding-bottom="0in" fo:border="0.5pt solid #d4dee8" style:writing-mode="lr-tb"/>
    </style:style>
    <style:style style:name="Table5.B9" style:family="table-cell">
      <style:table-cell-properties fo:padding-left="0.075in" fo:padding-right="0.075in" fo:padding-top="0in" fo:padding-bottom="0in" fo:border="0.5pt solid #d4dee8" style:writing-mode="lr-tb"/>
    </style:style>
    <style:style style:name="Table5.C9" style:family="table-cell">
      <style:table-cell-properties fo:padding-left="0.075in" fo:padding-right="0.075in" fo:padding-top="0in" fo:padding-bottom="0in" fo:border="0.5pt solid #d4dee8" style:writing-mode="lr-tb"/>
    </style:style>
    <style:style style:name="Table5.D9" style:family="table-cell">
      <style:table-cell-properties fo:padding-left="0.075in" fo:padding-right="0.075in" fo:padding-top="0in" fo:padding-bottom="0in" fo:border="0.5pt solid #d4dee8" style:writing-mode="lr-tb"/>
    </style:style>
    <style:style style:name="Table5.E9" style:family="table-cell">
      <style:table-cell-properties fo:padding-left="0.075in" fo:padding-right="0.075in" fo:padding-top="0in" fo:padding-bottom="0in" fo:border="0.5pt solid #d4dee8" style:writing-mode="lr-tb"/>
    </style:style>
    <style:style style:name="Table5.F9" style:family="table-cell">
      <style:table-cell-properties fo:padding-left="0.075in" fo:padding-right="0.075in" fo:padding-top="0in" fo:padding-bottom="0in" fo:border="0.5pt solid #d4dee8" style:writing-mode="lr-tb"/>
    </style:style>
    <style:style style:name="Table6" style:family="table">
      <style:table-properties style:width="6.8299in" fo:margin-top="0in" fo:margin-bottom="0in" table:align="center" style:writing-mode="lr-tb"/>
    </style:style>
    <style:style style:name="Table6.A" style:family="table-column">
      <style:table-column-properties style:column-width="1.36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f5f4b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="0.5pt solid #000000" style:writing-mode="lr-tb"/>
    </style:style>
    <style:style style:name="Table6.E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6.E4" style:family="table-cell">
      <style:table-cell-properties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fo:padding-left="0.075in" fo:padding-right="0.075in" fo:padding-top="0in" fo:padding-bottom="0in" fo:border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="0.5pt solid #000000" style:writing-mode="lr-tb"/>
    </style:style>
    <style:style style:name="Table6.E5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fo:padding-left="0.075in" fo:padding-right="0.075in" fo:padding-top="0in" fo:padding-bottom="0in" fo:border="0.5pt solid #000000" style:writing-mode="lr-tb"/>
    </style:style>
    <style:style style:name="Table6.D6" style:family="table-cell">
      <style:table-cell-properties fo:padding-left="0.075in" fo:padding-right="0.075in" fo:padding-top="0in" fo:padding-bottom="0in" fo:border="0.5pt solid #000000" style:writing-mode="lr-tb"/>
    </style:style>
    <style:style style:name="Table6.E6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8299in" fo:margin-top="0in" fo:margin-bottom="0in" table:align="center" style:writing-mode="lr-tb"/>
    </style:style>
    <style:style style:name="Table7.A" style:family="table-column">
      <style:table-column-properties style:column-width="3.414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" style:family="table">
      <style:table-properties style:width="6.8299in" fo:margin-top="0in" fo:margin-bottom="0in" table:align="center" style:writing-mode="lr-tb"/>
    </style:style>
    <style:style style:name="Table8.A" style:family="table-column">
      <style:table-column-properties style:column-width="3.414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" style:family="table">
      <style:table-properties style:width="6.8299in" fo:margin-top="0in" fo:margin-bottom="0in" table:align="center" style:writing-mode="lr-tb"/>
    </style:style>
    <style:style style:name="Table9.A" style:family="table-column">
      <style:table-column-properties style:column-width="6.829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0" style:family="table">
      <style:table-properties style:width="6.8299in" fo:margin-top="0in" fo:margin-bottom="0in" table:align="center" style:writing-mode="lr-tb"/>
    </style:style>
    <style:style style:name="Table10.A" style:family="table-column">
      <style:table-column-properties style:column-width="3.414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" style:family="table">
      <style:table-properties style:width="6.8299in" fo:margin-top="0in" fo:margin-bottom="0in" table:align="center" style:writing-mode="lr-tb"/>
    </style:style>
    <style:style style:name="Table11.A" style:family="table-column">
      <style:table-column-properties style:column-width="6.829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2" style:family="table">
      <style:table-properties style:width="6.8299in" fo:margin-top="0in" fo:margin-bottom="0in" table:align="center" style:writing-mode="lr-tb"/>
    </style:style>
    <style:style style:name="Table12.A" style:family="table-column">
      <style:table-column-properties style:column-width="3.414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" style:family="table">
      <style:table-properties style:width="6.8299in" fo:margin-top="0in" fo:margin-bottom="0in" table:align="center" style:writing-mode="lr-tb"/>
    </style:style>
    <style:style style:name="Table13.A" style:family="table-column">
      <style:table-column-properties style:column-width="6.829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4" style:family="table">
      <style:table-properties style:width="6.8299in" fo:margin-top="0in" fo:margin-bottom="0in" table:align="center" style:writing-mode="lr-tb"/>
    </style:style>
    <style:style style:name="Table14.A" style:family="table-column">
      <style:table-column-properties style:column-width="3.414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5" style:family="table">
      <style:table-properties style:width="6.8299in" fo:margin-top="0in" fo:margin-bottom="0in" table:align="center" style:writing-mode="lr-tb"/>
    </style:style>
    <style:style style:name="Table15.A" style:family="table-column">
      <style:table-column-properties style:column-width="6.829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6" style:family="table">
      <style:table-properties style:width="6.8299in" fo:margin-top="0in" fo:margin-bottom="0in" table:align="center" style:writing-mode="lr-tb"/>
    </style:style>
    <style:style style:name="Table16.A" style:family="table-column">
      <style:table-column-properties style:column-width="3.4146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7" style:family="table">
      <style:table-properties style:width="6.8299in" fo:margin-top="0in" fo:margin-bottom="0in" table:align="center" style:writing-mode="lr-tb"/>
    </style:style>
    <style:style style:name="Table17.A" style:family="table-column">
      <style:table-column-properties style:column-width="6.8299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8" style:family="table">
      <style:table-properties style:width="6.8299in" fo:margin-top="0in" fo:margin-bottom="0in" table:align="center" style:writing-mode="lr-tb"/>
    </style:style>
    <style:style style:name="Table18.A" style:family="table-column">
      <style:table-column-properties style:column-width="3.4146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9" style:family="table">
      <style:table-properties style:width="6.8299in" fo:margin-top="0in" fo:margin-bottom="0in" table:align="center" style:writing-mode="lr-tb"/>
    </style:style>
    <style:style style:name="Table19.A" style:family="table-column">
      <style:table-column-properties style:column-width="6.829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20" style:family="table">
      <style:table-properties style:width="6.8299in" fo:margin-top="0in" fo:margin-bottom="0in" table:align="center" style:writing-mode="lr-tb"/>
    </style:style>
    <style:style style:name="Table20.A" style:family="table-column">
      <style:table-column-properties style:column-width="3.414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1" style:family="table">
      <style:table-properties style:width="6.8299in" fo:margin-top="0in" fo:margin-bottom="0in" table:align="center" style:writing-mode="lr-tb"/>
    </style:style>
    <style:style style:name="Table21.A" style:family="table-column">
      <style:table-column-properties style:column-width="6.829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22" style:family="table">
      <style:table-properties style:width="6.8299in" fo:margin-top="0in" fo:margin-bottom="0in" table:align="center" style:writing-mode="lr-tb"/>
    </style:style>
    <style:style style:name="Table22.A" style:family="table-column">
      <style:table-column-properties style:column-width="3.4146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2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2.B2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3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4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5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6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7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8" style:family="table-cell">
      <style:table-cell-properties fo:padding-left="0.075in" fo:padding-right="0.075in" fo:padding-top="0in" fo:padding-bottom="0in" fo:border="0.5pt solid #d4dee8" style:writing-mode="lr-tb"/>
    </style:style>
    <style:style style:name="Table22.B9" style:family="table-cell">
      <style:table-cell-properties fo:padding-left="0.075in" fo:padding-right="0.075in" fo:padding-top="0in" fo:padding-bottom="0in" fo:border="0.5pt solid #d4dee8" style:writing-mode="lr-tb"/>
    </style:style>
    <style:style style:name="Table23" style:family="table">
      <style:table-properties style:width="6.8299in" fo:margin-top="0in" fo:margin-bottom="0in" table:align="center" style:writing-mode="lr-tb"/>
    </style:style>
    <style:style style:name="Table23.A" style:family="table-column">
      <style:table-column-properties style:column-width="3.4146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3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3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" style:family="table">
      <style:table-properties style:width="6.8299in" fo:margin-top="0in" fo:margin-bottom="0in" table:align="center" style:writing-mode="lr-tb"/>
    </style:style>
    <style:style style:name="Table24.A" style:family="table-column">
      <style:table-column-properties style:column-width="3.4146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5" style:family="table">
      <style:table-properties style:width="6.8299in" fo:margin-top="0in" fo:margin-bottom="0in" table:align="center" style:writing-mode="lr-tb"/>
    </style:style>
    <style:style style:name="Table25.A" style:family="table-column">
      <style:table-column-properties style:column-width="6.829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26" style:family="table">
      <style:table-properties style:width="6.8299in" fo:margin-top="0in" fo:margin-bottom="0in" table:align="center" style:writing-mode="lr-tb"/>
    </style:style>
    <style:style style:name="Table26.A" style:family="table-column">
      <style:table-column-properties style:column-width="3.4146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7" style:family="table">
      <style:table-properties style:width="6.8299in" fo:margin-top="0in" fo:margin-bottom="0in" table:align="center" style:writing-mode="lr-tb"/>
    </style:style>
    <style:style style:name="Table27.A" style:family="table-column">
      <style:table-column-properties style:column-width="6.8299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28" style:family="table">
      <style:table-properties style:width="6.8299in" fo:margin-top="0in" fo:margin-bottom="0in" table:align="center" style:writing-mode="lr-tb"/>
    </style:style>
    <style:style style:name="Table28.A" style:family="table-column">
      <style:table-column-properties style:column-width="3.4146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29" style:family="table">
      <style:table-properties style:width="6.8299in" fo:margin-top="0in" fo:margin-bottom="0in" table:align="center" style:writing-mode="lr-tb"/>
    </style:style>
    <style:style style:name="Table29.A" style:family="table-column">
      <style:table-column-properties style:column-width="6.8299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30" style:family="table">
      <style:table-properties style:width="6.8299in" fo:margin-top="0in" fo:margin-bottom="0in" table:align="center" style:writing-mode="lr-tb"/>
    </style:style>
    <style:style style:name="Table30.A" style:family="table-column">
      <style:table-column-properties style:column-width="3.4146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1" style:family="table">
      <style:table-properties style:width="6.8299in" fo:margin-top="0in" fo:margin-bottom="0in" table:align="center" style:writing-mode="lr-tb"/>
    </style:style>
    <style:style style:name="Table31.A" style:family="table-column">
      <style:table-column-properties style:column-width="6.8299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32" style:family="table">
      <style:table-properties style:width="6.8299in" fo:margin-top="0in" fo:margin-bottom="0in" table:align="center" style:writing-mode="lr-tb"/>
    </style:style>
    <style:style style:name="Table32.A" style:family="table-column">
      <style:table-column-properties style:column-width="3.4146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3" style:family="table">
      <style:table-properties style:width="6.8299in" fo:margin-top="0in" fo:margin-bottom="0in" table:align="center" style:writing-mode="lr-tb"/>
    </style:style>
    <style:style style:name="Table33.A" style:family="table-column">
      <style:table-column-properties style:column-width="6.8299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34" style:family="table">
      <style:table-properties style:width="6.8299in" fo:margin-top="0in" fo:margin-bottom="0in" table:align="center" style:writing-mode="lr-tb"/>
    </style:style>
    <style:style style:name="Table34.A" style:family="table-column">
      <style:table-column-properties style:column-width="3.4146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5" style:family="table">
      <style:table-properties style:width="6.8299in" fo:margin-top="0in" fo:margin-bottom="0in" table:align="center" style:writing-mode="lr-tb"/>
    </style:style>
    <style:style style:name="Table35.A" style:family="table-column">
      <style:table-column-properties style:column-width="6.8299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36" style:family="table">
      <style:table-properties style:width="6.8299in" fo:margin-top="0in" fo:margin-bottom="0in" table:align="center" style:writing-mode="lr-tb"/>
    </style:style>
    <style:style style:name="Table36.A" style:family="table-column">
      <style:table-column-properties style:column-width="3.4146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7" style:family="table">
      <style:table-properties style:width="6.8299in" fo:margin-top="0in" fo:margin-bottom="0in" table:align="center" style:writing-mode="lr-tb"/>
    </style:style>
    <style:style style:name="Table37.A" style:family="table-column">
      <style:table-column-properties style:column-width="6.8299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38" style:family="table">
      <style:table-properties style:width="6.8299in" fo:margin-top="0in" fo:margin-bottom="0in" table:align="center" style:writing-mode="lr-tb"/>
    </style:style>
    <style:style style:name="Table38.A" style:family="table-column">
      <style:table-column-properties style:column-width="3.4146in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8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8.B2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3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4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5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6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7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8" style:family="table-cell">
      <style:table-cell-properties fo:padding-left="0.075in" fo:padding-right="0.075in" fo:padding-top="0in" fo:padding-bottom="0in" fo:border="0.5pt solid #d4dee8" style:writing-mode="lr-tb"/>
    </style:style>
    <style:style style:name="Table38.B9" style:family="table-cell">
      <style:table-cell-properties fo:padding-left="0.075in" fo:padding-right="0.075in" fo:padding-top="0in" fo:padding-bottom="0in" fo:border="0.5pt solid #d4dee8" style:writing-mode="lr-tb"/>
    </style:style>
    <style:style style:name="Table39" style:family="table">
      <style:table-properties style:width="6.8299in" fo:margin-top="0in" fo:margin-bottom="0in" table:align="center" style:writing-mode="lr-tb"/>
    </style:style>
    <style:style style:name="Table39.A" style:family="table-column">
      <style:table-column-properties style:column-width="3.4146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9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39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" style:family="table">
      <style:table-properties style:width="6.8299in" fo:margin-top="0in" fo:margin-bottom="0in" table:align="center" style:writing-mode="lr-tb"/>
    </style:style>
    <style:style style:name="Table40.A" style:family="table-column">
      <style:table-column-properties style:column-width="3.4146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1" style:family="table">
      <style:table-properties style:width="6.8299in" fo:margin-top="0in" fo:margin-bottom="0in" table:align="center" style:writing-mode="lr-tb"/>
    </style:style>
    <style:style style:name="Table41.A" style:family="table-column">
      <style:table-column-properties style:column-width="6.8299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42" style:family="table">
      <style:table-properties style:width="6.8299in" fo:margin-top="0in" fo:margin-bottom="0in" table:align="center" style:writing-mode="lr-tb"/>
    </style:style>
    <style:style style:name="Table42.A" style:family="table-column">
      <style:table-column-properties style:column-width="3.4146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3" style:family="table">
      <style:table-properties style:width="6.8299in" fo:margin-top="0in" fo:margin-bottom="0in" table:align="center" style:writing-mode="lr-tb"/>
    </style:style>
    <style:style style:name="Table43.A" style:family="table-column">
      <style:table-column-properties style:column-width="6.8299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44" style:family="table">
      <style:table-properties style:width="6.8299in" fo:margin-top="0in" fo:margin-bottom="0in" table:align="center" style:writing-mode="lr-tb"/>
    </style:style>
    <style:style style:name="Table44.A" style:family="table-column">
      <style:table-column-properties style:column-width="3.4146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5" style:family="table">
      <style:table-properties style:width="6.8299in" fo:margin-top="0in" fo:margin-bottom="0in" table:align="center" style:writing-mode="lr-tb"/>
    </style:style>
    <style:style style:name="Table45.A" style:family="table-column">
      <style:table-column-properties style:column-width="6.8299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46" style:family="table">
      <style:table-properties style:width="6.8299in" fo:margin-top="0in" fo:margin-bottom="0in" table:align="center" style:writing-mode="lr-tb"/>
    </style:style>
    <style:style style:name="Table46.A" style:family="table-column">
      <style:table-column-properties style:column-width="3.4146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7" style:family="table">
      <style:table-properties style:width="6.8299in" fo:margin-top="0in" fo:margin-bottom="0in" table:align="center" style:writing-mode="lr-tb"/>
    </style:style>
    <style:style style:name="Table47.A" style:family="table-column">
      <style:table-column-properties style:column-width="6.8299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48" style:family="table">
      <style:table-properties style:width="6.8299in" fo:margin-top="0in" fo:margin-bottom="0in" table:align="center" style:writing-mode="lr-tb"/>
    </style:style>
    <style:style style:name="Table48.A" style:family="table-column">
      <style:table-column-properties style:column-width="3.4146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49" style:family="table">
      <style:table-properties style:width="6.8299in" fo:margin-top="0in" fo:margin-bottom="0in" table:align="center" style:writing-mode="lr-tb"/>
    </style:style>
    <style:style style:name="Table49.A" style:family="table-column">
      <style:table-column-properties style:column-width="6.8299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50" style:family="table">
      <style:table-properties style:width="6.8299in" fo:margin-top="0in" fo:margin-bottom="0in" table:align="center" style:writing-mode="lr-tb"/>
    </style:style>
    <style:style style:name="Table50.A" style:family="table-column">
      <style:table-column-properties style:column-width="3.4146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1" style:family="table">
      <style:table-properties style:width="6.8299in" fo:margin-top="0in" fo:margin-bottom="0in" table:align="center" style:writing-mode="lr-tb"/>
    </style:style>
    <style:style style:name="Table51.A" style:family="table-column">
      <style:table-column-properties style:column-width="6.8299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52" style:family="table">
      <style:table-properties style:width="6.8299in" fo:margin-top="0in" fo:margin-bottom="0in" table:align="center" style:writing-mode="lr-tb"/>
    </style:style>
    <style:style style:name="Table52.A" style:family="table-column">
      <style:table-column-properties style:column-width="3.4146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3" style:family="table">
      <style:table-properties style:width="6.8299in" fo:margin-top="0in" fo:margin-bottom="0in" table:align="center" style:writing-mode="lr-tb"/>
    </style:style>
    <style:style style:name="Table53.A" style:family="table-column">
      <style:table-column-properties style:column-width="6.8299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54" style:family="table">
      <style:table-properties style:width="6.8299in" fo:margin-top="0in" fo:margin-bottom="0in" table:align="center" style:writing-mode="lr-tb"/>
    </style:style>
    <style:style style:name="Table54.A" style:family="table-column">
      <style:table-column-properties style:column-width="3.4146in"/>
    </style:style>
    <style:style style:name="Table54.1" style:family="table-row">
      <style:table-row-properties fo:keep-together="auto"/>
    </style:style>
    <style:style style:name="Table54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4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4.B2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3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4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5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6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7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8" style:family="table-cell">
      <style:table-cell-properties fo:padding-left="0.075in" fo:padding-right="0.075in" fo:padding-top="0in" fo:padding-bottom="0in" fo:border="0.5pt solid #d4dee8" style:writing-mode="lr-tb"/>
    </style:style>
    <style:style style:name="Table54.B9" style:family="table-cell">
      <style:table-cell-properties fo:padding-left="0.075in" fo:padding-right="0.075in" fo:padding-top="0in" fo:padding-bottom="0in" fo:border="0.5pt solid #d4dee8" style:writing-mode="lr-tb"/>
    </style:style>
    <style:style style:name="Table55" style:family="table">
      <style:table-properties style:width="6.8299in" fo:margin-top="0in" fo:margin-bottom="0in" table:align="center" style:writing-mode="lr-tb"/>
    </style:style>
    <style:style style:name="Table55.A" style:family="table-column">
      <style:table-column-properties style:column-width="3.4146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5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5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" style:family="table">
      <style:table-properties style:width="6.8299in" fo:margin-top="0in" fo:margin-bottom="0in" table:align="center" style:writing-mode="lr-tb"/>
    </style:style>
    <style:style style:name="Table56.A" style:family="table-column">
      <style:table-column-properties style:column-width="3.4146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7" style:family="table">
      <style:table-properties style:width="6.8299in" fo:margin-top="0in" fo:margin-bottom="0in" table:align="center" style:writing-mode="lr-tb"/>
    </style:style>
    <style:style style:name="Table57.A" style:family="table-column">
      <style:table-column-properties style:column-width="6.8299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58" style:family="table">
      <style:table-properties style:width="6.8299in" fo:margin-top="0in" fo:margin-bottom="0in" table:align="center" style:writing-mode="lr-tb"/>
    </style:style>
    <style:style style:name="Table58.A" style:family="table-column">
      <style:table-column-properties style:column-width="3.4146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59" style:family="table">
      <style:table-properties style:width="6.8299in" fo:margin-top="0in" fo:margin-bottom="0in" table:align="center" style:writing-mode="lr-tb"/>
    </style:style>
    <style:style style:name="Table59.A" style:family="table-column">
      <style:table-column-properties style:column-width="6.8299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60" style:family="table">
      <style:table-properties style:width="6.8299in" fo:margin-top="0in" fo:margin-bottom="0in" table:align="center" style:writing-mode="lr-tb"/>
    </style:style>
    <style:style style:name="Table60.A" style:family="table-column">
      <style:table-column-properties style:column-width="3.4146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1" style:family="table">
      <style:table-properties style:width="6.8299in" fo:margin-top="0in" fo:margin-bottom="0in" table:align="center" style:writing-mode="lr-tb"/>
    </style:style>
    <style:style style:name="Table61.A" style:family="table-column">
      <style:table-column-properties style:column-width="6.8299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62" style:family="table">
      <style:table-properties style:width="6.8299in" fo:margin-top="0in" fo:margin-bottom="0in" table:align="center" style:writing-mode="lr-tb"/>
    </style:style>
    <style:style style:name="Table62.A" style:family="table-column">
      <style:table-column-properties style:column-width="3.4146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3" style:family="table">
      <style:table-properties style:width="6.8299in" fo:margin-top="0in" fo:margin-bottom="0in" table:align="center" style:writing-mode="lr-tb"/>
    </style:style>
    <style:style style:name="Table63.A" style:family="table-column">
      <style:table-column-properties style:column-width="6.8299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64" style:family="table">
      <style:table-properties style:width="6.8299in" fo:margin-top="0in" fo:margin-bottom="0in" table:align="center" style:writing-mode="lr-tb"/>
    </style:style>
    <style:style style:name="Table64.A" style:family="table-column">
      <style:table-column-properties style:column-width="3.4146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5" style:family="table">
      <style:table-properties style:width="6.8299in" fo:margin-top="0in" fo:margin-bottom="0in" table:align="center" style:writing-mode="lr-tb"/>
    </style:style>
    <style:style style:name="Table65.A" style:family="table-column">
      <style:table-column-properties style:column-width="6.8299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66" style:family="table">
      <style:table-properties style:width="6.8299in" fo:margin-top="0in" fo:margin-bottom="0in" table:align="center" style:writing-mode="lr-tb"/>
    </style:style>
    <style:style style:name="Table66.A" style:family="table-column">
      <style:table-column-properties style:column-width="3.4146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7" style:family="table">
      <style:table-properties style:width="6.8299in" fo:margin-top="0in" fo:margin-bottom="0in" table:align="center" style:writing-mode="lr-tb"/>
    </style:style>
    <style:style style:name="Table67.A" style:family="table-column">
      <style:table-column-properties style:column-width="6.8299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68" style:family="table">
      <style:table-properties style:width="6.8299in" fo:margin-top="0in" fo:margin-bottom="0in" table:align="center" style:writing-mode="lr-tb"/>
    </style:style>
    <style:style style:name="Table68.A" style:family="table-column">
      <style:table-column-properties style:column-width="3.4146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69" style:family="table">
      <style:table-properties style:width="6.8299in" fo:margin-top="0in" fo:margin-bottom="0in" table:align="center" style:writing-mode="lr-tb"/>
    </style:style>
    <style:style style:name="Table69.A" style:family="table-column">
      <style:table-column-properties style:column-width="6.8299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70" style:family="table">
      <style:table-properties style:width="6.8299in" fo:margin-top="0in" fo:margin-bottom="0in" table:align="center" style:writing-mode="lr-tb"/>
    </style:style>
    <style:style style:name="Table70.A" style:family="table-column">
      <style:table-column-properties style:column-width="3.4146in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0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0.B2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3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4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5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6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7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8" style:family="table-cell">
      <style:table-cell-properties fo:padding-left="0.075in" fo:padding-right="0.075in" fo:padding-top="0in" fo:padding-bottom="0in" fo:border="0.5pt solid #d4dee8" style:writing-mode="lr-tb"/>
    </style:style>
    <style:style style:name="Table70.B9" style:family="table-cell">
      <style:table-cell-properties fo:padding-left="0.075in" fo:padding-right="0.075in" fo:padding-top="0in" fo:padding-bottom="0in" fo:border="0.5pt solid #d4dee8" style:writing-mode="lr-tb"/>
    </style:style>
    <style:style style:name="Table71" style:family="table">
      <style:table-properties style:width="6.8299in" fo:margin-top="0in" fo:margin-bottom="0in" table:align="center" style:writing-mode="lr-tb"/>
    </style:style>
    <style:style style:name="Table71.A" style:family="table-column">
      <style:table-column-properties style:column-width="3.4146in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1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1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" style:family="table">
      <style:table-properties style:width="6.8299in" fo:margin-top="0in" fo:margin-bottom="0in" table:align="center" style:writing-mode="lr-tb"/>
    </style:style>
    <style:style style:name="Table72.A" style:family="table-column">
      <style:table-column-properties style:column-width="3.4146in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3" style:family="table">
      <style:table-properties style:width="6.8299in" fo:margin-top="0in" fo:margin-bottom="0in" table:align="center" style:writing-mode="lr-tb"/>
    </style:style>
    <style:style style:name="Table73.A" style:family="table-column">
      <style:table-column-properties style:column-width="6.8299in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74" style:family="table">
      <style:table-properties style:width="6.8299in" fo:margin-top="0in" fo:margin-bottom="0in" table:align="center" style:writing-mode="lr-tb"/>
    </style:style>
    <style:style style:name="Table74.A" style:family="table-column">
      <style:table-column-properties style:column-width="3.4146in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5" style:family="table">
      <style:table-properties style:width="6.8299in" fo:margin-top="0in" fo:margin-bottom="0in" table:align="center" style:writing-mode="lr-tb"/>
    </style:style>
    <style:style style:name="Table75.A" style:family="table-column">
      <style:table-column-properties style:column-width="6.8299in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76" style:family="table">
      <style:table-properties style:width="6.8299in" fo:margin-top="0in" fo:margin-bottom="0in" table:align="center" style:writing-mode="lr-tb"/>
    </style:style>
    <style:style style:name="Table76.A" style:family="table-column">
      <style:table-column-properties style:column-width="3.4146in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7" style:family="table">
      <style:table-properties style:width="6.8299in" fo:margin-top="0in" fo:margin-bottom="0in" table:align="center" style:writing-mode="lr-tb"/>
    </style:style>
    <style:style style:name="Table77.A" style:family="table-column">
      <style:table-column-properties style:column-width="6.8299in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78" style:family="table">
      <style:table-properties style:width="6.8299in" fo:margin-top="0in" fo:margin-bottom="0in" table:align="center" style:writing-mode="lr-tb"/>
    </style:style>
    <style:style style:name="Table78.A" style:family="table-column">
      <style:table-column-properties style:column-width="3.4146in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79" style:family="table">
      <style:table-properties style:width="6.8299in" fo:margin-top="0in" fo:margin-bottom="0in" table:align="center" style:writing-mode="lr-tb"/>
    </style:style>
    <style:style style:name="Table79.A" style:family="table-column">
      <style:table-column-properties style:column-width="6.8299in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80" style:family="table">
      <style:table-properties style:width="6.8299in" fo:margin-top="0in" fo:margin-bottom="0in" table:align="center" style:writing-mode="lr-tb"/>
    </style:style>
    <style:style style:name="Table80.A" style:family="table-column">
      <style:table-column-properties style:column-width="3.4146in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1" style:family="table">
      <style:table-properties style:width="6.8299in" fo:margin-top="0in" fo:margin-bottom="0in" table:align="center" style:writing-mode="lr-tb"/>
    </style:style>
    <style:style style:name="Table81.A" style:family="table-column">
      <style:table-column-properties style:column-width="6.8299in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82" style:family="table">
      <style:table-properties style:width="6.8299in" fo:margin-top="0in" fo:margin-bottom="0in" table:align="center" style:writing-mode="lr-tb"/>
    </style:style>
    <style:style style:name="Table82.A" style:family="table-column">
      <style:table-column-properties style:column-width="3.4146in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3" style:family="table">
      <style:table-properties style:width="6.8299in" fo:margin-top="0in" fo:margin-bottom="0in" table:align="center" style:writing-mode="lr-tb"/>
    </style:style>
    <style:style style:name="Table83.A" style:family="table-column">
      <style:table-column-properties style:column-width="6.8299in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84" style:family="table">
      <style:table-properties style:width="6.8299in" fo:margin-top="0in" fo:margin-bottom="0in" table:align="center" style:writing-mode="lr-tb"/>
    </style:style>
    <style:style style:name="Table84.A" style:family="table-column">
      <style:table-column-properties style:column-width="3.4146in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5" style:family="table">
      <style:table-properties style:width="6.8299in" fo:margin-top="0in" fo:margin-bottom="0in" table:align="center" style:writing-mode="lr-tb"/>
    </style:style>
    <style:style style:name="Table85.A" style:family="table-column">
      <style:table-column-properties style:column-width="6.8299in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86" style:family="table">
      <style:table-properties style:width="6.8299in" fo:margin-top="0in" fo:margin-bottom="0in" table:align="center" style:writing-mode="lr-tb"/>
    </style:style>
    <style:style style:name="Table86.A" style:family="table-column">
      <style:table-column-properties style:column-width="3.4146in"/>
    </style:style>
    <style:style style:name="Table86.1" style:family="table-row">
      <style:table-row-properties fo:keep-together="auto"/>
    </style:style>
    <style:style style:name="Table86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6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6.B2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3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4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5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6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7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8" style:family="table-cell">
      <style:table-cell-properties fo:padding-left="0.075in" fo:padding-right="0.075in" fo:padding-top="0in" fo:padding-bottom="0in" fo:border="0.5pt solid #d4dee8" style:writing-mode="lr-tb"/>
    </style:style>
    <style:style style:name="Table86.B9" style:family="table-cell">
      <style:table-cell-properties fo:padding-left="0.075in" fo:padding-right="0.075in" fo:padding-top="0in" fo:padding-bottom="0in" fo:border="0.5pt solid #d4dee8" style:writing-mode="lr-tb"/>
    </style:style>
    <style:style style:name="Table87" style:family="table">
      <style:table-properties style:width="6.8299in" fo:margin-top="0in" fo:margin-bottom="0in" table:align="center" style:writing-mode="lr-tb"/>
    </style:style>
    <style:style style:name="Table87.A" style:family="table-column">
      <style:table-column-properties style:column-width="3.4146in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7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7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" style:family="table">
      <style:table-properties style:width="6.8299in" fo:margin-top="0in" fo:margin-bottom="0in" table:align="center" style:writing-mode="lr-tb"/>
    </style:style>
    <style:style style:name="Table88.A" style:family="table-column">
      <style:table-column-properties style:column-width="3.4146in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89" style:family="table">
      <style:table-properties style:width="6.8299in" fo:margin-top="0in" fo:margin-bottom="0in" table:align="center" style:writing-mode="lr-tb"/>
    </style:style>
    <style:style style:name="Table89.A" style:family="table-column">
      <style:table-column-properties style:column-width="6.8299in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90" style:family="table">
      <style:table-properties style:width="6.8299in" fo:margin-top="0in" fo:margin-bottom="0in" table:align="center" style:writing-mode="lr-tb"/>
    </style:style>
    <style:style style:name="Table90.A" style:family="table-column">
      <style:table-column-properties style:column-width="3.4146in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1" style:family="table">
      <style:table-properties style:width="6.8299in" fo:margin-top="0in" fo:margin-bottom="0in" table:align="center" style:writing-mode="lr-tb"/>
    </style:style>
    <style:style style:name="Table91.A" style:family="table-column">
      <style:table-column-properties style:column-width="6.8299in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92" style:family="table">
      <style:table-properties style:width="6.8299in" fo:margin-top="0in" fo:margin-bottom="0in" table:align="center" style:writing-mode="lr-tb"/>
    </style:style>
    <style:style style:name="Table92.A" style:family="table-column">
      <style:table-column-properties style:column-width="3.4146in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3" style:family="table">
      <style:table-properties style:width="6.8299in" fo:margin-top="0in" fo:margin-bottom="0in" table:align="center" style:writing-mode="lr-tb"/>
    </style:style>
    <style:style style:name="Table93.A" style:family="table-column">
      <style:table-column-properties style:column-width="6.8299in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94" style:family="table">
      <style:table-properties style:width="6.8299in" fo:margin-top="0in" fo:margin-bottom="0in" table:align="center" style:writing-mode="lr-tb"/>
    </style:style>
    <style:style style:name="Table94.A" style:family="table-column">
      <style:table-column-properties style:column-width="3.4146in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5" style:family="table">
      <style:table-properties style:width="6.8299in" fo:margin-top="0in" fo:margin-bottom="0in" table:align="center" style:writing-mode="lr-tb"/>
    </style:style>
    <style:style style:name="Table95.A" style:family="table-column">
      <style:table-column-properties style:column-width="6.8299in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96" style:family="table">
      <style:table-properties style:width="6.8299in" fo:margin-top="0in" fo:margin-bottom="0in" table:align="center" style:writing-mode="lr-tb"/>
    </style:style>
    <style:style style:name="Table96.A" style:family="table-column">
      <style:table-column-properties style:column-width="3.4146in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7" style:family="table">
      <style:table-properties style:width="6.8299in" fo:margin-top="0in" fo:margin-bottom="0in" table:align="center" style:writing-mode="lr-tb"/>
    </style:style>
    <style:style style:name="Table97.A" style:family="table-column">
      <style:table-column-properties style:column-width="6.8299in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98" style:family="table">
      <style:table-properties style:width="6.8299in" fo:margin-top="0in" fo:margin-bottom="0in" table:align="center" style:writing-mode="lr-tb"/>
    </style:style>
    <style:style style:name="Table98.A" style:family="table-column">
      <style:table-column-properties style:column-width="3.4146in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99" style:family="table">
      <style:table-properties style:width="6.8299in" fo:margin-top="0in" fo:margin-bottom="0in" table:align="center" style:writing-mode="lr-tb"/>
    </style:style>
    <style:style style:name="Table99.A" style:family="table-column">
      <style:table-column-properties style:column-width="6.8299in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00" style:family="table">
      <style:table-properties style:width="6.8299in" fo:margin-top="0in" fo:margin-bottom="0in" table:align="center" style:writing-mode="lr-tb"/>
    </style:style>
    <style:style style:name="Table100.A" style:family="table-column">
      <style:table-column-properties style:column-width="3.4146in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1" style:family="table">
      <style:table-properties style:width="6.8299in" fo:margin-top="0in" fo:margin-bottom="0in" table:align="center" style:writing-mode="lr-tb"/>
    </style:style>
    <style:style style:name="Table101.A" style:family="table-column">
      <style:table-column-properties style:column-width="6.8299in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02" style:family="table">
      <style:table-properties style:width="6.8299in" fo:margin-top="0in" fo:margin-bottom="0in" table:align="center" style:writing-mode="lr-tb"/>
    </style:style>
    <style:style style:name="Table102.A" style:family="table-column">
      <style:table-column-properties style:column-width="3.4146in"/>
    </style:style>
    <style:style style:name="Table102.1" style:family="table-row">
      <style:table-row-properties fo:keep-together="auto"/>
    </style:style>
    <style:style style:name="Table102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2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2.B2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3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4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5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6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7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8" style:family="table-cell">
      <style:table-cell-properties fo:padding-left="0.075in" fo:padding-right="0.075in" fo:padding-top="0in" fo:padding-bottom="0in" fo:border="0.5pt solid #d4dee8" style:writing-mode="lr-tb"/>
    </style:style>
    <style:style style:name="Table102.B9" style:family="table-cell">
      <style:table-cell-properties fo:padding-left="0.075in" fo:padding-right="0.075in" fo:padding-top="0in" fo:padding-bottom="0in" fo:border="0.5pt solid #d4dee8" style:writing-mode="lr-tb"/>
    </style:style>
    <style:style style:name="Table103" style:family="table">
      <style:table-properties style:width="6.8299in" fo:margin-top="0in" fo:margin-bottom="0in" table:align="center" style:writing-mode="lr-tb"/>
    </style:style>
    <style:style style:name="Table103.A" style:family="table-column">
      <style:table-column-properties style:column-width="3.4146in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3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3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" style:family="table">
      <style:table-properties style:width="6.8299in" fo:margin-top="0in" fo:margin-bottom="0in" table:align="center" style:writing-mode="lr-tb"/>
    </style:style>
    <style:style style:name="Table104.A" style:family="table-column">
      <style:table-column-properties style:column-width="3.4146in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5" style:family="table">
      <style:table-properties style:width="6.8299in" fo:margin-top="0in" fo:margin-bottom="0in" table:align="center" style:writing-mode="lr-tb"/>
    </style:style>
    <style:style style:name="Table105.A" style:family="table-column">
      <style:table-column-properties style:column-width="6.8299in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06" style:family="table">
      <style:table-properties style:width="6.8299in" fo:margin-top="0in" fo:margin-bottom="0in" table:align="center" style:writing-mode="lr-tb"/>
    </style:style>
    <style:style style:name="Table106.A" style:family="table-column">
      <style:table-column-properties style:column-width="3.4146in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7" style:family="table">
      <style:table-properties style:width="6.8299in" fo:margin-top="0in" fo:margin-bottom="0in" table:align="center" style:writing-mode="lr-tb"/>
    </style:style>
    <style:style style:name="Table107.A" style:family="table-column">
      <style:table-column-properties style:column-width="6.8299in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08" style:family="table">
      <style:table-properties style:width="6.8299in" fo:margin-top="0in" fo:margin-bottom="0in" table:align="center" style:writing-mode="lr-tb"/>
    </style:style>
    <style:style style:name="Table108.A" style:family="table-column">
      <style:table-column-properties style:column-width="3.4146in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09" style:family="table">
      <style:table-properties style:width="6.8299in" fo:margin-top="0in" fo:margin-bottom="0in" table:align="center" style:writing-mode="lr-tb"/>
    </style:style>
    <style:style style:name="Table109.A" style:family="table-column">
      <style:table-column-properties style:column-width="6.8299in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10" style:family="table">
      <style:table-properties style:width="6.8299in" fo:margin-top="0in" fo:margin-bottom="0in" table:align="center" style:writing-mode="lr-tb"/>
    </style:style>
    <style:style style:name="Table110.A" style:family="table-column">
      <style:table-column-properties style:column-width="3.4146in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1" style:family="table">
      <style:table-properties style:width="6.8299in" fo:margin-top="0in" fo:margin-bottom="0in" table:align="center" style:writing-mode="lr-tb"/>
    </style:style>
    <style:style style:name="Table111.A" style:family="table-column">
      <style:table-column-properties style:column-width="6.8299in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12" style:family="table">
      <style:table-properties style:width="6.8299in" fo:margin-top="0in" fo:margin-bottom="0in" table:align="center" style:writing-mode="lr-tb"/>
    </style:style>
    <style:style style:name="Table112.A" style:family="table-column">
      <style:table-column-properties style:column-width="3.4146in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3" style:family="table">
      <style:table-properties style:width="6.8299in" fo:margin-top="0in" fo:margin-bottom="0in" table:align="center" style:writing-mode="lr-tb"/>
    </style:style>
    <style:style style:name="Table113.A" style:family="table-column">
      <style:table-column-properties style:column-width="6.8299in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14" style:family="table">
      <style:table-properties style:width="6.8299in" fo:margin-top="0in" fo:margin-bottom="0in" table:align="center" style:writing-mode="lr-tb"/>
    </style:style>
    <style:style style:name="Table114.A" style:family="table-column">
      <style:table-column-properties style:column-width="3.4146in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5" style:family="table">
      <style:table-properties style:width="6.8299in" fo:margin-top="0in" fo:margin-bottom="0in" table:align="center" style:writing-mode="lr-tb"/>
    </style:style>
    <style:style style:name="Table115.A" style:family="table-column">
      <style:table-column-properties style:column-width="6.8299in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16" style:family="table">
      <style:table-properties style:width="6.8299in" fo:margin-top="0in" fo:margin-bottom="0in" table:align="center" style:writing-mode="lr-tb"/>
    </style:style>
    <style:style style:name="Table116.A" style:family="table-column">
      <style:table-column-properties style:column-width="3.4146in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7" style:family="table">
      <style:table-properties style:width="6.8299in" fo:margin-top="0in" fo:margin-bottom="0in" table:align="center" style:writing-mode="lr-tb"/>
    </style:style>
    <style:style style:name="Table117.A" style:family="table-column">
      <style:table-column-properties style:column-width="6.8299in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18" style:family="table">
      <style:table-properties style:width="6.8299in" fo:margin-top="0in" fo:margin-bottom="0in" table:align="center" style:writing-mode="lr-tb"/>
    </style:style>
    <style:style style:name="Table118.A" style:family="table-column">
      <style:table-column-properties style:column-width="3.4146in"/>
    </style:style>
    <style:style style:name="Table118.1" style:family="table-row">
      <style:table-row-properties fo:keep-together="auto"/>
    </style:style>
    <style:style style:name="Table118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8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8.B2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3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4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5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6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7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8" style:family="table-cell">
      <style:table-cell-properties fo:padding-left="0.075in" fo:padding-right="0.075in" fo:padding-top="0in" fo:padding-bottom="0in" fo:border="0.5pt solid #d4dee8" style:writing-mode="lr-tb"/>
    </style:style>
    <style:style style:name="Table118.B9" style:family="table-cell">
      <style:table-cell-properties fo:padding-left="0.075in" fo:padding-right="0.075in" fo:padding-top="0in" fo:padding-bottom="0in" fo:border="0.5pt solid #d4dee8" style:writing-mode="lr-tb"/>
    </style:style>
    <style:style style:name="Table119" style:family="table">
      <style:table-properties style:width="6.8299in" fo:margin-top="0in" fo:margin-bottom="0in" table:align="center" style:writing-mode="lr-tb"/>
    </style:style>
    <style:style style:name="Table119.A" style:family="table-column">
      <style:table-column-properties style:column-width="3.4146in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9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19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" style:family="table">
      <style:table-properties style:width="6.8299in" fo:margin-top="0in" fo:margin-bottom="0in" table:align="center" style:writing-mode="lr-tb"/>
    </style:style>
    <style:style style:name="Table120.A" style:family="table-column">
      <style:table-column-properties style:column-width="3.4146in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1" style:family="table">
      <style:table-properties style:width="6.8299in" fo:margin-top="0in" fo:margin-bottom="0in" table:align="center" style:writing-mode="lr-tb"/>
    </style:style>
    <style:style style:name="Table121.A" style:family="table-column">
      <style:table-column-properties style:column-width="6.8299in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22" style:family="table">
      <style:table-properties style:width="6.8299in" fo:margin-top="0in" fo:margin-bottom="0in" table:align="center" style:writing-mode="lr-tb"/>
    </style:style>
    <style:style style:name="Table122.A" style:family="table-column">
      <style:table-column-properties style:column-width="3.4146in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3" style:family="table">
      <style:table-properties style:width="6.8299in" fo:margin-top="0in" fo:margin-bottom="0in" table:align="center" style:writing-mode="lr-tb"/>
    </style:style>
    <style:style style:name="Table123.A" style:family="table-column">
      <style:table-column-properties style:column-width="6.8299in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24" style:family="table">
      <style:table-properties style:width="6.8299in" fo:margin-top="0in" fo:margin-bottom="0in" table:align="center" style:writing-mode="lr-tb"/>
    </style:style>
    <style:style style:name="Table124.A" style:family="table-column">
      <style:table-column-properties style:column-width="3.4146in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4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5" style:family="table">
      <style:table-properties style:width="6.8299in" fo:margin-top="0in" fo:margin-bottom="0in" table:align="center" style:writing-mode="lr-tb"/>
    </style:style>
    <style:style style:name="Table125.A" style:family="table-column">
      <style:table-column-properties style:column-width="6.8299in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26" style:family="table">
      <style:table-properties style:width="6.8299in" fo:margin-top="0in" fo:margin-bottom="0in" table:align="center" style:writing-mode="lr-tb"/>
    </style:style>
    <style:style style:name="Table126.A" style:family="table-column">
      <style:table-column-properties style:column-width="3.4146in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7" style:family="table">
      <style:table-properties style:width="6.8299in" fo:margin-top="0in" fo:margin-bottom="0in" table:align="center" style:writing-mode="lr-tb"/>
    </style:style>
    <style:style style:name="Table127.A" style:family="table-column">
      <style:table-column-properties style:column-width="6.8299in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28" style:family="table">
      <style:table-properties style:width="6.8299in" fo:margin-top="0in" fo:margin-bottom="0in" table:align="center" style:writing-mode="lr-tb"/>
    </style:style>
    <style:style style:name="Table128.A" style:family="table-column">
      <style:table-column-properties style:column-width="3.4146in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29" style:family="table">
      <style:table-properties style:width="6.8299in" fo:margin-top="0in" fo:margin-bottom="0in" table:align="center" style:writing-mode="lr-tb"/>
    </style:style>
    <style:style style:name="Table129.A" style:family="table-column">
      <style:table-column-properties style:column-width="6.8299in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30" style:family="table">
      <style:table-properties style:width="6.8299in" fo:margin-top="0in" fo:margin-bottom="0in" table:align="center" style:writing-mode="lr-tb"/>
    </style:style>
    <style:style style:name="Table130.A" style:family="table-column">
      <style:table-column-properties style:column-width="3.4146in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1" style:family="table">
      <style:table-properties style:width="6.8299in" fo:margin-top="0in" fo:margin-bottom="0in" table:align="center" style:writing-mode="lr-tb"/>
    </style:style>
    <style:style style:name="Table131.A" style:family="table-column">
      <style:table-column-properties style:column-width="6.8299in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32" style:family="table">
      <style:table-properties style:width="6.8299in" fo:margin-top="0in" fo:margin-bottom="0in" table:align="center" style:writing-mode="lr-tb"/>
    </style:style>
    <style:style style:name="Table132.A" style:family="table-column">
      <style:table-column-properties style:column-width="3.4146in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3" style:family="table">
      <style:table-properties style:width="6.8299in" fo:margin-top="0in" fo:margin-bottom="0in" table:align="center" style:writing-mode="lr-tb"/>
    </style:style>
    <style:style style:name="Table133.A" style:family="table-column">
      <style:table-column-properties style:column-width="6.8299in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34" style:family="table">
      <style:table-properties style:width="6.8299in" fo:margin-top="0in" fo:margin-bottom="0in" table:align="center" style:writing-mode="lr-tb"/>
    </style:style>
    <style:style style:name="Table134.A" style:family="table-column">
      <style:table-column-properties style:column-width="3.4146in"/>
    </style:style>
    <style:style style:name="Table134.1" style:family="table-row">
      <style:table-row-properties fo:keep-together="auto"/>
    </style:style>
    <style:style style:name="Table134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4.A2" style:family="table-cell">
      <style:table-cell-properties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4.B2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3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4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5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6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7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8" style:family="table-cell">
      <style:table-cell-properties fo:padding-left="0.075in" fo:padding-right="0.075in" fo:padding-top="0in" fo:padding-bottom="0in" fo:border="0.5pt solid #d4dee8" style:writing-mode="lr-tb"/>
    </style:style>
    <style:style style:name="Table134.B9" style:family="table-cell">
      <style:table-cell-properties fo:padding-left="0.075in" fo:padding-right="0.075in" fo:padding-top="0in" fo:padding-bottom="0in" fo:border="0.5pt solid #d4dee8" style:writing-mode="lr-tb"/>
    </style:style>
    <style:style style:name="Table135" style:family="table">
      <style:table-properties style:width="6.8299in" fo:margin-top="0in" fo:margin-bottom="0in" table:align="center" style:writing-mode="lr-tb"/>
    </style:style>
    <style:style style:name="Table135.A" style:family="table-column">
      <style:table-column-properties style:column-width="3.4146in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5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5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" style:family="table">
      <style:table-properties style:width="6.8299in" fo:margin-top="0in" fo:margin-bottom="0in" table:align="center" style:writing-mode="lr-tb"/>
    </style:style>
    <style:style style:name="Table136.A" style:family="table-column">
      <style:table-column-properties style:column-width="3.4146in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6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7" style:family="table">
      <style:table-properties style:width="6.8299in" fo:margin-top="0in" fo:margin-bottom="0in" table:align="center" style:writing-mode="lr-tb"/>
    </style:style>
    <style:style style:name="Table137.A" style:family="table-column">
      <style:table-column-properties style:column-width="6.8299in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38" style:family="table">
      <style:table-properties style:width="6.8299in" fo:margin-top="0in" fo:margin-bottom="0in" table:align="center" style:writing-mode="lr-tb"/>
    </style:style>
    <style:style style:name="Table138.A" style:family="table-column">
      <style:table-column-properties style:column-width="3.4146in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8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39" style:family="table">
      <style:table-properties style:width="6.8299in" fo:margin-top="0in" fo:margin-bottom="0in" table:align="center" style:writing-mode="lr-tb"/>
    </style:style>
    <style:style style:name="Table139.A" style:family="table-column">
      <style:table-column-properties style:column-width="6.8299in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40" style:family="table">
      <style:table-properties style:width="6.8299in" fo:margin-top="0in" fo:margin-bottom="0in" table:align="center" style:writing-mode="lr-tb"/>
    </style:style>
    <style:style style:name="Table140.A" style:family="table-column">
      <style:table-column-properties style:column-width="3.4146in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0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1" style:family="table">
      <style:table-properties style:width="6.8299in" fo:margin-top="0in" fo:margin-bottom="0in" table:align="center" style:writing-mode="lr-tb"/>
    </style:style>
    <style:style style:name="Table141.A" style:family="table-column">
      <style:table-column-properties style:column-width="6.8299in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42" style:family="table">
      <style:table-properties style:width="6.8299in" fo:margin-top="0in" fo:margin-bottom="0in" table:align="center" style:writing-mode="lr-tb"/>
    </style:style>
    <style:style style:name="Table142.A" style:family="table-column">
      <style:table-column-properties style:column-width="3.4146in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background-color="#1f3a5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B1" style:family="table-cell">
      <style:table-cell-properties style:vertical-align="middle" fo:background-color="#eaf5e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A2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A3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A4" style:family="table-cell">
      <style:table-cell-properties style:vertical-align="middle" fo:background-color="#eef8f2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A6" style:family="table-cell">
      <style:table-cell-properties style:vertical-align="middle" fo:background-color="#fff7ed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2.A7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3" style:family="table">
      <style:table-properties style:width="6.8299in" fo:margin-top="0in" fo:margin-bottom="0in" table:align="center" style:writing-mode="lr-tb"/>
    </style:style>
    <style:style style:name="Table143.A" style:family="table-column">
      <style:table-column-properties style:column-width="6.8299in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background-color="#ffffff" fo:padding-left="0.075in" fo:padding-right="0.075in" fo:padding-top="0in" fo:padding-bottom="0in" fo:border="0.75pt solid #cbd5e1" style:writing-mode="lr-tb">
        <style:background-image/>
      </style:table-cell-properties>
    </style:style>
    <style:style style:name="Table144" style:family="table">
      <style:table-properties style:width="6.8299in" fo:margin-top="0in" fo:margin-bottom="0in" table:align="center" style:writing-mode="lr-tb"/>
    </style:style>
    <style:style style:name="Table144.A" style:family="table-column">
      <style:table-column-properties style:column-width="3.4146in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4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4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5" style:family="table">
      <style:table-properties style:width="6.8299in" fo:margin-top="0in" fo:margin-bottom="0in" table:align="center" style:writing-mode="lr-tb"/>
    </style:style>
    <style:style style:name="Table145.A" style:family="table-column">
      <style:table-column-properties style:column-width="6.8299in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background-color="#eaf5ef" fo:padding-left="0.075in" fo:padding-right="0.075in" fo:padding-top="0in" fo:padding-bottom="0in" fo:border="0.75pt solid #a7c6b6" style:writing-mode="lr-tb">
        <style:background-image/>
      </style:table-cell-properties>
    </style:style>
    <style:style style:name="Table146" style:family="table">
      <style:table-properties style:width="6.8299in" fo:margin-top="0in" fo:margin-bottom="0in" table:align="center" style:writing-mode="lr-tb"/>
    </style:style>
    <style:style style:name="Table146.A" style:family="table-column">
      <style:table-column-properties style:column-width="3.4146in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background-color="#eaf1f8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6.B1" style:family="table-cell">
      <style:table-cell-properties style:vertical-align="middle" fo:background-color="#ffffff" fo:padding-left="0.075in" fo:padding-right="0.075in" fo:padding-top="0in" fo:padding-bottom="0in" fo:border="0.5pt solid #d4dee8" style:writing-mode="lr-tb">
        <style:background-image/>
      </style:table-cell-properties>
    </style:style>
    <style:style style:name="Table146.A2" style:family="table-cell">
      <style:table-cell-properties style:vertical-align="middle" fo:background-color="#f7fafc" fo:padding-left="0.075in" fo:padding-right="0.075in" fo:padding-top="0in" fo:padding-bottom="0in" fo:border="0.5pt solid #d4dee8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39in" style:contextual-spacing="false" fo:break-before="page"/>
    </style:style>
    <style:style style:name="P3" style:family="paragraph" style:parent-style-name="Standard">
      <style:paragraph-properties fo:margin-top="0.028in" fo:margin-bottom="0.111in" style:contextual-spacing="false" fo:padding-left="0in" fo:padding-right="0in" fo:padding-top="0in" fo:padding-bottom="0.0138in" fo:border-left="none" fo:border-right="none" fo:border-top="none" fo:border-bottom="0.99pt solid #b7c2cc"/>
    </style:style>
    <style:style style:name="P4" style:family="paragraph" style:parent-style-name="Standard">
      <style:paragraph-properties fo:margin-top="0in" fo:margin-bottom="0.0835in" style:contextual-spacing="false" fo:line-height="108%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.0555in" fo:margin-bottom="0.0555in" style:contextual-spacing="false"/>
    </style:style>
    <style:style style:name="P7" style:family="paragraph" style:parent-style-name="Standard">
      <style:paragraph-properties fo:margin-top="0in" fo:margin-bottom="0.139in" style:contextual-spacing="false" fo:text-align="end" style:justify-single-word="false" fo:break-before="page"/>
    </style:style>
    <style:style style:name="P8" style:family="paragraph" style:parent-style-name="Standard">
      <style:paragraph-properties fo:margin-top="0in" fo:margin-bottom="0.0138in" style:contextual-spacing="false"/>
    </style:style>
    <style:style style:name="P9" style:family="paragraph" style:parent-style-name="List_20_1" style:list-style-name="WWNum1">
      <style:paragraph-properties fo:margin-left="0.2in" fo:margin-top="0in" fo:margin-bottom="0.028in" style:contextual-spacing="true" fo:text-indent="-0.25in" style:auto-text-indent="false"/>
    </style:style>
    <style:style style:name="T1" style:family="text">
      <style:text-properties fo:color="#1f3a5f" loext:opacity="100%" style:font-name="Liberation Sans" fo:font-size="34pt" fo:font-weight="bold" style:font-size-asian="34pt" style:font-weight-asian="bold"/>
    </style:style>
    <style:style style:name="T2" style:family="text">
      <style:text-properties fo:color="#111827" loext:opacity="100%" style:font-name="Liberation Sans" fo:font-size="22pt" fo:font-weight="bold" style:font-size-asian="22pt" style:font-weight-asian="bold"/>
    </style:style>
    <style:style style:name="T3" style:family="text">
      <style:text-properties fo:color="#4b5563" loext:opacity="100%" style:font-name="Liberation Sans" fo:font-size="12pt" style:font-size-asian="12pt"/>
    </style:style>
    <style:style style:name="T4" style:family="text">
      <style:text-properties fo:color="#1f5f4b" loext:opacity="100%" style:font-name="Liberation Sans" fo:font-size="14pt" fo:font-weight="bold" style:font-size-asian="14pt" style:font-weight-asian="bold"/>
    </style:style>
    <style:style style:name="T5" style:family="text">
      <style:text-properties style:font-name="Liberation Sans" fo:font-size="12pt" style:font-size-asian="12pt"/>
    </style:style>
    <style:style style:name="T6" style:family="text">
      <style:text-properties fo:color="#4b5563" loext:opacity="100%" style:font-name="Liberation Sans" fo:font-size="10pt" style:font-size-asian="10pt"/>
    </style:style>
    <style:style style:name="T7" style:family="text">
      <style:text-properties fo:color="#1f3a5f" loext:opacity="100%" style:font-name="Liberation Sans" fo:font-size="22pt" fo:font-weight="bold" style:font-size-asian="22pt" style:font-weight-asian="bold"/>
    </style:style>
    <style:style style:name="T8" style:family="text">
      <style:text-properties style:font-name="Liberation Sans" fo:font-size="10pt" fo:font-weight="bold" style:font-size-asian="10pt" style:font-weight-asian="bold"/>
    </style:style>
    <style:style style:name="T9" style:family="text">
      <style:text-properties style:font-name="Liberation Sans" fo:font-size="10pt" style:font-size-asian="10pt"/>
    </style:style>
    <style:style style:name="T10" style:family="text">
      <style:text-properties fo:color="#1f3a5f" loext:opacity="100%" style:font-name="Liberation Sans" fo:font-size="16pt" fo:font-weight="bold" style:font-size-asian="16pt" style:font-weight-asian="bold"/>
    </style:style>
    <style:style style:name="T11" style:family="text">
      <style:text-properties fo:color="#1f3a5f" loext:opacity="100%" style:font-name="Liberation Sans" fo:font-size="10pt" fo:font-weight="bold" style:font-size-asian="10pt" style:font-weight-asian="bold"/>
    </style:style>
    <style:style style:name="T12" style:family="text">
      <style:text-properties style:font-name="Liberation Sans" fo:font-size="9pt" style:font-size-asian="9pt"/>
    </style:style>
    <style:style style:name="T13" style:family="text">
      <style:text-properties fo:color="#1f3a5f" loext:opacity="100%" style:font-name="Liberation Sans" fo:font-size="9pt" fo:font-weight="bold" style:font-size-asian="9pt" style:font-weight-asian="bold"/>
    </style:style>
    <style:style style:name="T14" style:family="text">
      <style:text-properties fo:color="#4b5563" loext:opacity="100%" style:font-name="Liberation Sans" fo:font-size="9pt" fo:font-style="italic" style:font-size-asian="9pt" style:font-style-asian="italic"/>
    </style:style>
    <style:style style:name="T15" style:family="text">
      <style:text-properties fo:color="#ffffff" loext:opacity="100%" style:font-name="Liberation Sans" fo:font-size="8.5pt" fo:font-weight="bold" style:font-size-asian="8.5pt" style:font-weight-asian="bold"/>
    </style:style>
    <style:style style:name="T16" style:family="text">
      <style:text-properties fo:color="#4b5563" loext:opacity="100%" style:font-name="Liberation Sans" fo:font-size="8pt" style:font-size-asian="8pt"/>
    </style:style>
    <style:style style:name="T17" style:family="text">
      <style:text-properties fo:color="#111827" loext:opacity="100%" style:font-name="Liberation Sans" fo:font-size="11pt" fo:font-weight="bold" style:font-size-asian="11pt" style:font-weight-asian="bold"/>
    </style:style>
    <style:style style:name="T18" style:family="text">
      <style:text-properties style:font-name="Liberation Sans" fo:font-size="8.5pt" style:font-size-asian="8.5pt"/>
    </style:style>
    <style:style style:name="T19" style:family="text">
      <style:text-properties fo:color="#1f3a5f" loext:opacity="100%" style:font-name="Liberation Sans" fo:font-size="8.5pt" fo:font-weight="bold" style:font-size-asian="8.5pt" style:font-weight-asian="bold"/>
    </style:style>
    <style:style style:name="T20" style:family="text">
      <style:text-properties fo:color="#ffffff" loext:opacity="100%" style:font-name="Liberation Sans" fo:font-size="9pt" fo:font-weight="bold" style:font-size-asian="9pt" style:font-weight-asian="bold"/>
    </style:style>
    <style:style style:name="T21" style:family="text">
      <style:text-properties style:font-name="Liberation Sans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FALCON</text:span></text:p>
      <text:p text:style-name="P1"><text:span text:style-name="T2">60-DAY EXECUTION PLAN</text:span></text:p>
      <text:p text:style-name="P1"><text:span text:style-name="T3">v1.0</text:span></text:p>
      <text:p text:style-name="Standard"/>
      <text:p text:style-name="P1"><text:span text:style-name="T4">AI • DATA • FOOTBALL ANALYTICS</text:span></text:p>
      <text:p text:style-name="Standard"/>
      <text:p text:style-name="Standard"/>
      <text:p text:style-name="Standard"/>
      <text:p text:style-name="P1"><text:span text:style-name="T5">Artur Czernek</text:span></text:p>
      <text:p text:style-name="P1"><text:span text:style-name="T6">July 2026</text:span></text:p>
      <text:p text:style-name="Standard"/>
      <text:p text:style-name="P2"><text:span text:style-name="T7">JAK KORZYSTAĆ Z TEGO PLANU</text:span></text:p>
      <text:p text:style-name="P3"/>
      <text:p text:style-name="P4"><text:span text:style-name="T8">Ten dokument jest prostą instrukcją działania na 60 dni. </text:span><text:span text:style-name="T9">Nie ma go czytać jak książki. Masz go otwierać codziennie i sprawdzać, co dokładnie robisz danego dnia.</text:span></text:p>
      <text:p text:style-name="P4"><text:span text:style-name="T9">FALCON łączy płatne taski AI, SQL, Python, Football Analytics, GitHub, portfolio oraz przygotowanie do pracy w AI. Każdy dzień ma zostawić po sobie konkretny ślad: ćwiczenie, notatkę, commit, raport, aplikację lub godzinę płatnej pracy.</text:span></text:p>
      <text:p text:style-name="Standard"><text:span text:style-name="T10">Najprostsza zasada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1">ZASADA DNI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2">Jeżeli są płatne taski AI - robisz je jako pierwsze. Jeżeli ich nie ma - realizujesz plan SQL, Python, Football Analytics i portfolio.</text:span></text:p>
          </table:table-cell>
        </table:table-row>
      </table:table>
      <text:p text:style-name="Standard"><text:span text:style-name="T10">Tryby pracy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"><text:span text:style-name="T13">MINIMUM</text:span></text:p>
          </table:table-cell>
          <table:table-cell table:style-name="Table2.B1" office:value-type="string">
            <text:p text:style-name="P5"><text:span text:style-name="T12">15-30 minut pracy. Jedno ćwiczenie, jedna notatka albo jedna mała poprawka. Tryb na ciężki dzień.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3">STANDARD</text:span></text:p>
          </table:table-cell>
          <table:table-cell table:style-name="Table2.B1" office:value-type="string">
            <text:p text:style-name="P5"><text:span text:style-name="T12">60-120 minut. SQL + Python + mały element FALCONA. Tryb na normalny dzień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3">FULL</text:span></text:p>
          </table:table-cell>
          <table:table-cell table:style-name="Table2.B1" office:value-type="string">
            <text:p text:style-name="P5"><text:span text:style-name="T12">2-4 godziny lub więcej. Taski AI, nauka, GitHub, portfolio i raporty. Tryb na mocny dzień.</text:span></text:p>
          </table:table-cell>
        </table:table-row>
      </table:table>
      <text:p text:style-name="P6"><text:span text:style-name="T14">Nie chodzi o idealny dzień. Chodzi o to, żeby nie wypaść z procesu. Człowiek lubi robić rewolucje, a potem potyka się o wtorek. Ten plan ma temu zapobiec.</text:span></text:p>
      <text:p text:style-name="Standard"/>
      <text:p text:style-name="P2"><text:span text:style-name="T7">PRIORYTETY FALCONA</text:span></text:p>
      <text:p text:style-name="P3"/>
      <text:p text:style-name="P4"><text:span text:style-name="T9">FALCON nie jest równą listą zadań. Niektóre rzeczy są ważniejsze, bo szybciej przekładają się na pieniądze, doświadczenie albo portfolio.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><text:span text:style-name="T13">1. Płatne AI Taski</text:span></text:p>
          </table:table-cell>
          <table:table-cell table:style-name="Table3.B1" office:value-type="string">
            <text:p text:style-name="P5"><text:span text:style-name="T12">Najpierw zarabianie i realne doświadczenie w AI evaluation, search quality, data annotation i internet research.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3">2. SQL</text:span></text:p>
          </table:table-cell>
          <table:table-cell table:style-name="Table3.B1" office:value-type="string">
            <text:p text:style-name="P5"><text:span text:style-name="T12">Codzienna budowa podstaw pracy z danymi: filtrowanie, grupowanie, liczenie, JOIN i proste analizy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3">3. Python</text:span></text:p>
          </table:table-cell>
          <table:table-cell table:style-name="Table3.B1" office:value-type="string">
            <text:p text:style-name="P5"><text:span text:style-name="T12">Automatyzacja, pliki CSV, pandas, wykresy i pierwsze notebooki analityczne.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3">4. Football Analytics</text:span></text:p>
          </table:table-cell>
          <table:table-cell table:style-name="Table3.B1" office:value-type="string">
            <text:p text:style-name="P5"><text:span text:style-name="T12">Raporty meczowe, profile zawodników, obserwacje taktyczne i pierwsze projekty danych piłkarskich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3">5. GitHub i Portfolio</text:span></text:p>
          </table:table-cell>
          <table:table-cell table:style-name="Table3.B1" office:value-type="string">
            <text:p text:style-name="P5"><text:span text:style-name="T12">Widoczny dowód pracy. Repozytoria, README, raporty i materiały do pokazania rekruterowi.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3">6. LinkedIn i CV</text:span></text:p>
          </table:table-cell>
          <table:table-cell table:style-name="Table3.B1" office:value-type="string">
            <text:p text:style-name="P5"><text:span text:style-name="T12">Widoczność na rynku. Aktualizacja profilu, posty, aplikacje i lepsze wersje dokumentów.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5"><text:span text:style-name="T11">FILTR DECYZJI</text:span></text:p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P5"><text:span text:style-name="T12">Jeżeli nowy pomysł nie przybliża FALCONA, trafia na listę "Po FALCON v1.0". Nie rozwala aktualnego planu.</text:span></text:p>
          </table:table-cell>
          <table:covered-table-cell/>
        </table:table-row>
      </table:table>
      <text:p text:style-name="Standard"/>
      <text:p text:style-name="P2"><text:span text:style-name="T7">MAPA 60 DNI</text:span></text:p>
      <text:p text:style-name="P3"/>
      <text:p text:style-name="P4"><text:span text:style-name="T9">Plan jest podzielony na osiem tygodni i cztery dni finałowe. Każdy tydzień ma główny cel, żeby nie błądzić jak człowiek po ustawieniach LibreOffice.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5"><text:span text:style-name="T13">Tydzień 1</text:span></text:p>
          </table:table-cell>
          <table:table-cell table:style-name="Table4.B1" office:value-type="string">
            <text:p text:style-name="P5"><text:span text:style-name="T12">Start systemu: porządek w folderach, SQL/Python fundament, pierwszy szablon Football Analytics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3">Tydzień 2</text:span></text:p>
          </table:table-cell>
          <table:table-cell table:style-name="Table4.B1" office:value-type="string">
            <text:p text:style-name="P5"><text:span text:style-name="T12">SQL filtry i agregacje, Python podstawy, pierwsze notatki meczowe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3">Tydzień 3</text:span></text:p>
          </table:table-cell>
          <table:table-cell table:style-name="Table4.B1" office:value-type="string">
            <text:p text:style-name="P5"><text:span text:style-name="T12">GitHub, pandas, pliki CSV i pierwszy projekt danych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3">Tydzień 4</text:span></text:p>
          </table:table-cell>
          <table:table-cell table:style-name="Table4.B1" office:value-type="string">
            <text:p text:style-name="P5"><text:span text:style-name="T12">Pierwszy raport Football Analytics i domknięcie SQL mini-projektu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3">Tydzień 5</text:span></text:p>
          </table:table-cell>
          <table:table-cell table:style-name="Table4.B1" office:value-type="string">
            <text:p text:style-name="P5"><text:span text:style-name="T12">Portfolio, profil zawodnika, LinkedIn i uporządkowanie dowodów pracy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3">Tydzień 6</text:span></text:p>
          </table:table-cell>
          <table:table-cell table:style-name="Table4.B1" office:value-type="string">
            <text:p text:style-name="P5"><text:span text:style-name="T12">Career system: CV, LinkedIn, aplikacje, odpowiedzi na rozmowę i praktyka techniczna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3">Tydzień 7</text:span></text:p>
          </table:table-cell>
          <table:table-cell table:style-name="Table4.B1" office:value-type="string">
            <text:p text:style-name="P5"><text:span text:style-name="T12">SQL/Python poziom wyżej: subqueries, CTE, pandas groupby, drugi raport piłkarski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3">Tydzień 8</text:span></text:p>
          </table:table-cell>
          <table:table-cell table:style-name="Table4.B1" office:value-type="string">
            <text:p text:style-name="P5"><text:span text:style-name="T12">Finalizacja GitHuba, portfolio, aplikacje i przygotowanie do kolejnego etapu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3">Dni 57-60</text:span></text:p>
          </table:table-cell>
          <table:table-cell table:style-name="Table4.B1" office:value-type="string">
            <text:p text:style-name="P5"><text:span text:style-name="T12">Domknięcie: CV, portfolio, podsumowanie FALCON v1.0 i plan następnych 90 dni.</text:span></text:p>
          </table:table-cell>
        </table:table-row>
      </table:table>
      <text:p text:style-name="Standard"/>
      <text:p text:style-name="P2"><text:span text:style-name="T7">TRACKERY</text:span></text:p>
      <text:p text:style-name="P3"/>
      <text:p text:style-name="P4"><text:span text:style-name="T9">Te tabele służą do mierzenia postępu. Nie muszą być piękne. Mają być uczciwe. Liczby nie kłamią, ludzie za to robią to z zaskakującą kreatywnością.</text:span></text:p>
      <text:p text:style-name="Standard"><text:span text:style-name="T10">Tracker godzin</text:span></text:p>
      <table:table table:name="Table5" table:style-name="Table5">
        <table:table-column table:style-name="Table5.A" table:number-columns-repeated="6"/>
        <table:table-row table:style-name="Table5.1">
          <table:table-cell table:style-name="Table5.A1" office:value-type="string">
            <text:p text:style-name="P5"><text:span text:style-name="T15">Tydzień</text:span></text:p>
          </table:table-cell>
          <table:table-cell table:style-name="Table5.A1" office:value-type="string">
            <text:p text:style-name="P5"><text:span text:style-name="T15">AI Taski</text:span></text:p>
          </table:table-cell>
          <table:table-cell table:style-name="Table5.A1" office:value-type="string">
            <text:p text:style-name="P5"><text:span text:style-name="T15">SQL</text:span></text:p>
          </table:table-cell>
          <table:table-cell table:style-name="Table5.A1" office:value-type="string">
            <text:p text:style-name="P5"><text:span text:style-name="T15">Python</text:span></text:p>
          </table:table-cell>
          <table:table-cell table:style-name="Table5.A1" office:value-type="string">
            <text:p text:style-name="P5"><text:span text:style-name="T15">Football Analytics</text:span></text:p>
          </table:table-cell>
          <table:table-cell table:style-name="Table5.A1" office:value-type="string">
            <text:p text:style-name="P5"><text:span text:style-name="T15">GitHub/Portfolio</text:span></text:p>
          </table:table-cell>
        </table:table-row>
        <table:table-row table:style-name="Table5.1">
          <table:table-cell table:style-name="Table5.A2" office:value-type="string">
            <text:p text:style-name="P5">Tydzień 1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>Tydzień 2</text:p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/>
          </table:table-cell>
          <table:table-cell table:style-name="Table5.D3" office:value-type="string">
            <text:p text:style-name="P5"/>
          </table:table-cell>
          <table:table-cell table:style-name="Table5.E3" office:value-type="string">
            <text:p text:style-name="P5"/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4" office:value-type="string">
            <text:p text:style-name="P5">Tydzień 3</text:p>
          </table:table-cell>
          <table:table-cell table:style-name="Table5.B4" office:value-type="string">
            <text:p text:style-name="P5"/>
          </table:table-cell>
          <table:table-cell table:style-name="Table5.C4" office:value-type="string">
            <text:p text:style-name="P5"/>
          </table:table-cell>
          <table:table-cell table:style-name="Table5.D4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F4" office:value-type="string">
            <text:p text:style-name="P5"/>
          </table:table-cell>
        </table:table-row>
        <table:table-row table:style-name="Table5.1">
          <table:table-cell table:style-name="Table5.A5" office:value-type="string">
            <text:p text:style-name="P5">Tydzień 4</text:p>
          </table:table-cell>
          <table:table-cell table:style-name="Table5.B5" office:value-type="string">
            <text:p text:style-name="P5"/>
          </table:table-cell>
          <table:table-cell table:style-name="Table5.C5" office:value-type="string">
            <text:p text:style-name="P5"/>
          </table:table-cell>
          <table:table-cell table:style-name="Table5.D5" office:value-type="string">
            <text:p text:style-name="P5"/>
          </table:table-cell>
          <table:table-cell table:style-name="Table5.E5" office:value-type="string">
            <text:p text:style-name="P5"/>
          </table:table-cell>
          <table:table-cell table:style-name="Table5.F5" office:value-type="string">
            <text:p text:style-name="P5"/>
          </table:table-cell>
        </table:table-row>
        <table:table-row table:style-name="Table5.1">
          <table:table-cell table:style-name="Table5.A6" office:value-type="string">
            <text:p text:style-name="P5">Tydzień 5</text:p>
          </table:table-cell>
          <table:table-cell table:style-name="Table5.B6" office:value-type="string">
            <text:p text:style-name="P5"/>
          </table:table-cell>
          <table:table-cell table:style-name="Table5.C6" office:value-type="string">
            <text:p text:style-name="P5"/>
          </table:table-cell>
          <table:table-cell table:style-name="Table5.D6" office:value-type="string">
            <text:p text:style-name="P5"/>
          </table:table-cell>
          <table:table-cell table:style-name="Table5.E6" office:value-type="string">
            <text:p text:style-name="P5"/>
          </table:table-cell>
          <table:table-cell table:style-name="Table5.F6" office:value-type="string">
            <text:p text:style-name="P5"/>
          </table:table-cell>
        </table:table-row>
        <table:table-row table:style-name="Table5.1">
          <table:table-cell table:style-name="Table5.A7" office:value-type="string">
            <text:p text:style-name="P5">Tydzień 6</text:p>
          </table:table-cell>
          <table:table-cell table:style-name="Table5.B7" office:value-type="string">
            <text:p text:style-name="P5"/>
          </table:table-cell>
          <table:table-cell table:style-name="Table5.C7" office:value-type="string">
            <text:p text:style-name="P5"/>
          </table:table-cell>
          <table:table-cell table:style-name="Table5.D7" office:value-type="string">
            <text:p text:style-name="P5"/>
          </table:table-cell>
          <table:table-cell table:style-name="Table5.E7" office:value-type="string">
            <text:p text:style-name="P5"/>
          </table:table-cell>
          <table:table-cell table:style-name="Table5.F7" office:value-type="string">
            <text:p text:style-name="P5"/>
          </table:table-cell>
        </table:table-row>
        <table:table-row table:style-name="Table5.1">
          <table:table-cell table:style-name="Table5.A8" office:value-type="string">
            <text:p text:style-name="P5">Tydzień 7</text:p>
          </table:table-cell>
          <table:table-cell table:style-name="Table5.B8" office:value-type="string">
            <text:p text:style-name="P5"/>
          </table:table-cell>
          <table:table-cell table:style-name="Table5.C8" office:value-type="string">
            <text:p text:style-name="P5"/>
          </table:table-cell>
          <table:table-cell table:style-name="Table5.D8" office:value-type="string">
            <text:p text:style-name="P5"/>
          </table:table-cell>
          <table:table-cell table:style-name="Table5.E8" office:value-type="string">
            <text:p text:style-name="P5"/>
          </table:table-cell>
          <table:table-cell table:style-name="Table5.F8" office:value-type="string">
            <text:p text:style-name="P5"/>
          </table:table-cell>
        </table:table-row>
        <table:table-row table:style-name="Table5.1">
          <table:table-cell table:style-name="Table5.A9" office:value-type="string">
            <text:p text:style-name="P5">Tydzień 8</text:p>
          </table:table-cell>
          <table:table-cell table:style-name="Table5.B9" office:value-type="string">
            <text:p text:style-name="P5"/>
          </table:table-cell>
          <table:table-cell table:style-name="Table5.C9" office:value-type="string">
            <text:p text:style-name="P5"/>
          </table:table-cell>
          <table:table-cell table:style-name="Table5.D9" office:value-type="string">
            <text:p text:style-name="P5"/>
          </table:table-cell>
          <table:table-cell table:style-name="Table5.E9" office:value-type="string">
            <text:p text:style-name="P5"/>
          </table:table-cell>
          <table:table-cell table:style-name="Table5.F9" office:value-type="string">
            <text:p text:style-name="P5"/>
          </table:table-cell>
        </table:table-row>
      </table:table>
      <text:p text:style-name="Standard"/>
      <text:p text:style-name="Standard"><text:span text:style-name="T10">Tracker zarobków AI</text:span></text:p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"><text:span text:style-name="T15">Platforma</text:span></text:p>
          </table:table-cell>
          <table:table-cell table:style-name="Table6.A1" office:value-type="string">
            <text:p text:style-name="P5"><text:span text:style-name="T15">Godziny</text:span></text:p>
          </table:table-cell>
          <table:table-cell table:style-name="Table6.A1" office:value-type="string">
            <text:p text:style-name="P5"><text:span text:style-name="T15">Stawka</text:span></text:p>
          </table:table-cell>
          <table:table-cell table:style-name="Table6.A1" office:value-type="string">
            <text:p text:style-name="P5"><text:span text:style-name="T15">Zarobek</text:span></text:p>
          </table:table-cell>
          <table:table-cell table:style-name="Table6.A1" office:value-type="string">
            <text:p text:style-name="P5"><text:span text:style-name="T15">Status</text:span></text:p>
          </table:table-cell>
        </table:table-row>
        <table:table-row table:style-name="Table6.1">
          <table:table-cell table:style-name="Table6.A2" office:value-type="string">
            <text:p text:style-name="P5">OneForma / Centific</text:p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 table:style-name="Table6.1">
          <table:table-cell table:style-name="Table6.A3" office:value-type="string">
            <text:p text:style-name="P5">TELUS</text:p>
          </table:table-cell>
          <table:table-cell table:style-name="Table6.B3" office:value-type="string">
            <text:p text:style-name="P5"/>
          </table:table-cell>
          <table:table-cell table:style-name="Table6.C3" office:value-type="string">
            <text:p text:style-name="P5"/>
          </table:table-cell>
          <table:table-cell table:style-name="Table6.D3" office:value-type="string">
            <text:p text:style-name="P5"/>
          </table:table-cell>
          <table:table-cell table:style-name="Table6.E3" office:value-type="string">
            <text:p text:style-name="P5"/>
          </table:table-cell>
        </table:table-row>
        <table:table-row table:style-name="Table6.1">
          <table:table-cell table:style-name="Table6.A4" office:value-type="string">
            <text:p text:style-name="P5">Outlier</text:p>
          </table:table-cell>
          <table:table-cell table:style-name="Table6.B4" office:value-type="string">
            <text:p text:style-name="P5"/>
          </table:table-cell>
          <table:table-cell table:style-name="Table6.C4" office:value-type="string">
            <text:p text:style-name="P5"/>
          </table:table-cell>
          <table:table-cell table:style-name="Table6.D4" office:value-type="string">
            <text:p text:style-name="P5"/>
          </table:table-cell>
          <table:table-cell table:style-name="Table6.E4" office:value-type="string">
            <text:p text:style-name="P5"/>
          </table:table-cell>
        </table:table-row>
        <table:table-row table:style-name="Table6.1">
          <table:table-cell table:style-name="Table6.A5" office:value-type="string">
            <text:p text:style-name="P5">Turing</text:p>
          </table:table-cell>
          <table:table-cell table:style-name="Table6.B5" office:value-type="string">
            <text:p text:style-name="P5"/>
          </table:table-cell>
          <table:table-cell table:style-name="Table6.C5" office:value-type="string">
            <text:p text:style-name="P5"/>
          </table:table-cell>
          <table:table-cell table:style-name="Table6.D5" office:value-type="string">
            <text:p text:style-name="P5"/>
          </table:table-cell>
          <table:table-cell table:style-name="Table6.E5" office:value-type="string">
            <text:p text:style-name="P5"/>
          </table:table-cell>
        </table:table-row>
        <table:table-row table:style-name="Table6.1">
          <table:table-cell table:style-name="Table6.A6" office:value-type="string">
            <text:p text:style-name="P5">Inne</text:p>
          </table:table-cell>
          <table:table-cell table:style-name="Table6.B6" office:value-type="string">
            <text:p text:style-name="P5"/>
          </table:table-cell>
          <table:table-cell table:style-name="Table6.C6" office:value-type="string">
            <text:p text:style-name="P5"/>
          </table:table-cell>
          <table:table-cell table:style-name="Table6.D6" office:value-type="string">
            <text:p text:style-name="P5"/>
          </table:table-cell>
          <table:table-cell table:style-name="Table6.E6" office:value-type="string">
            <text:p text:style-name="P5"/>
          </table:table-cell>
        </table:table-row>
      </table:table>
      <text:p text:style-name="Standard"/>
      <text:p text:style-name="P2"><text:span text:style-name="T7">TYDZIEŃ 1: START SYSTEMU</text:span></text:p>
      <text:p text:style-name="P3"/>
      <text:p text:style-name="P4"><text:span text:style-name="T9">Porządek, fundamenty, pierwsze ćwiczenia i szablon raportu.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"><text:span text:style-name="T13">Cel tygodnia</text:span></text:p>
          </table:table-cell>
          <table:table-cell table:style-name="Table7.B1" office:value-type="string">
            <text:p text:style-name="P5"><text:span text:style-name="T12">Uruchomić FALCON, zrobić fundament techniczny i przestać traktować naukę jako osobny chaos.</text:span></text:p>
          </table:table-cell>
        </table:table-row>
        <table:table-row table:style-name="Table7.1">
          <table:table-cell table:style-name="Table7.A2" office:value-type="string">
            <text:p text:style-name="P5"><text:span text:style-name="T13">Efekt końcowy</text:span></text:p>
          </table:table-cell>
          <table:table-cell table:style-name="Table7.B1" office:value-type="string">
            <text:p text:style-name="P5"><text:span text:style-name="T12">Foldery, pierwsze ćwiczenia SQL/Python, szablon raportu i review.</text:span></text:p>
          </table:table-cell>
        </table:table-row>
      </table:table>
      <text:p text:style-name="Standard"/>
      <text:p text:style-name="P7"><text:span text:style-name="T16">Day 1/60 <text:s/>□□□□□□□□□□□□□□□□□□□□</text:span></text:p>
      <text:p text:style-name="Standard"><text:span text:style-name="T7">DAY 1</text:span></text:p>
      <text:p text:style-name="Standard"><text:span text:style-name="T17">Tydzień 1 | Cel dnia: Uruchomić system FALCON i przygotować miejsce pracy.</text:span></text:p>
      <text:p text:style-name="P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"><text:span text:style-name="T15">AI TASKI</text:span></text:p>
          </table:table-cell>
          <table:table-cell table:style-name="Table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8.1">
          <table:table-cell table:style-name="Table8.A2" office:value-type="string">
            <text:p text:style-name="P5"><text:span text:style-name="T19">SQL</text:span></text:p>
          </table:table-cell>
          <table:table-cell table:style-name="Table8.A2" office:value-type="string">
            <text:p text:style-name="P5"><text:span text:style-name="T18">SELECT, FROM - 10 prostych zapytań na przykładowej tabeli.</text:span></text:p>
          </table:table-cell>
        </table:table-row>
        <table:table-row table:style-name="Table8.1">
          <table:table-cell table:style-name="Table8.A3" office:value-type="string">
            <text:p text:style-name="P5"><text:span text:style-name="T19">PYTHON</text:span></text:p>
          </table:table-cell>
          <table:table-cell table:style-name="Table8.A3" office:value-type="string">
            <text:p text:style-name="P5"><text:span text:style-name="T18">print, zmienne, typy danych - 5 mikroćwiczeń.</text:span></text:p>
          </table:table-cell>
        </table:table-row>
        <table:table-row table:style-name="Table8.1">
          <table:table-cell table:style-name="Table8.A4" office:value-type="string">
            <text:p text:style-name="P5"><text:span text:style-name="T19">FOOTBALL</text:span></text:p>
          </table:table-cell>
          <table:table-cell table:style-name="Table8.A4" office:value-type="string">
            <text:p text:style-name="P5"><text:span text:style-name="T18">Wybierz pierwszy mecz do analizy i zapisz, dlaczego właśnie ten.</text:span></text:p>
          </table:table-cell>
        </table:table-row>
        <table:table-row table:style-name="Table8.1">
          <table:table-cell table:style-name="Table8.A3" office:value-type="string">
            <text:p text:style-name="P5"><text:span text:style-name="T19">GITHUB / PORTFOLIO</text:span></text:p>
          </table:table-cell>
          <table:table-cell table:style-name="Table8.A3" office:value-type="string">
            <text:p text:style-name="P5"><text:span text:style-name="T18">Utwórz lokalne foldery: SQL, Python, Football_Analytics, Reports.</text:span></text:p>
          </table:table-cell>
        </table:table-row>
        <table:table-row table:style-name="Table8.1">
          <table:table-cell table:style-name="Table8.A6" office:value-type="string">
            <text:p text:style-name="P5"><text:span text:style-name="T19">EFEKT DNIA</text:span></text:p>
          </table:table-cell>
          <table:table-cell table:style-name="Table8.A6" office:value-type="string">
            <text:p text:style-name="P5"><text:span text:style-name="T18">Foldery gotowe + pierwsza notatka startowa.</text:span></text:p>
          </table:table-cell>
        </table:table-row>
        <table:table-row table:style-name="Table8.1">
          <table:table-cell table:style-name="Table8.A7" office:value-type="string">
            <text:p text:style-name="P5"><text:span text:style-name="T19">MINIMUM DNIA</text:span></text:p>
          </table:table-cell>
          <table:table-cell table:style-name="Table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11">NOTATKA DNIA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/60 <text:s/>■□□□□□□□□□□□□□□□□□□□</text:span></text:p>
      <text:p text:style-name="Standard"><text:span text:style-name="T7">DAY 2</text:span></text:p>
      <text:p text:style-name="Standard"><text:span text:style-name="T17">Tydzień 1 | Cel dnia: Zrobić pierwszy techniczny krok bez komplikowania.</text:span></text:p>
      <text:p text:style-name="P3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5"><text:span text:style-name="T15">AI TASKI</text:span></text:p>
          </table:table-cell>
          <table:table-cell table:style-name="Table1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0.1">
          <table:table-cell table:style-name="Table10.A2" office:value-type="string">
            <text:p text:style-name="P5"><text:span text:style-name="T19">SQL</text:span></text:p>
          </table:table-cell>
          <table:table-cell table:style-name="Table10.A2" office:value-type="string">
            <text:p text:style-name="P5"><text:span text:style-name="T18">WHERE - filtrowanie rekordów po jednym warunku.</text:span></text:p>
          </table:table-cell>
        </table:table-row>
        <table:table-row table:style-name="Table10.1">
          <table:table-cell table:style-name="Table10.A3" office:value-type="string">
            <text:p text:style-name="P5"><text:span text:style-name="T19">PYTHON</text:span></text:p>
          </table:table-cell>
          <table:table-cell table:style-name="Table10.A3" office:value-type="string">
            <text:p text:style-name="P5"><text:span text:style-name="T18">input, string, int, float - proste przykłady.</text:span></text:p>
          </table:table-cell>
        </table:table-row>
        <table:table-row table:style-name="Table10.1">
          <table:table-cell table:style-name="Table10.A4" office:value-type="string">
            <text:p text:style-name="P5"><text:span text:style-name="T19">FOOTBALL</text:span></text:p>
          </table:table-cell>
          <table:table-cell table:style-name="Table10.A4" office:value-type="string">
            <text:p text:style-name="P5"><text:span text:style-name="T18">Zapisz 5 obserwacji z meczu: ustawienie, pressing, przejścia, stałe fragmenty, zawodnik.</text:span></text:p>
          </table:table-cell>
        </table:table-row>
        <table:table-row table:style-name="Table10.1">
          <table:table-cell table:style-name="Table10.A3" office:value-type="string">
            <text:p text:style-name="P5"><text:span text:style-name="T19">GITHUB / PORTFOLIO</text:span></text:p>
          </table:table-cell>
          <table:table-cell table:style-name="Table10.A3" office:value-type="string">
            <text:p text:style-name="P5"><text:span text:style-name="T18">Dodaj plik README roboczy w folderze FALCON.</text:span></text:p>
          </table:table-cell>
        </table:table-row>
        <table:table-row table:style-name="Table10.1">
          <table:table-cell table:style-name="Table10.A6" office:value-type="string">
            <text:p text:style-name="P5"><text:span text:style-name="T19">EFEKT DNIA</text:span></text:p>
          </table:table-cell>
          <table:table-cell table:style-name="Table10.A6" office:value-type="string">
            <text:p text:style-name="P5"><text:span text:style-name="T18">Pierwszy opis projektu FALCON.</text:span></text:p>
          </table:table-cell>
        </table:table-row>
        <table:table-row table:style-name="Table10.1">
          <table:table-cell table:style-name="Table10.A7" office:value-type="string">
            <text:p text:style-name="P5"><text:span text:style-name="T19">MINIMUM DNIA</text:span></text:p>
          </table:table-cell>
          <table:table-cell table:style-name="Table1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11">NOTATKA DNIA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/60 <text:s/>■□□□□□□□□□□□□□□□□□□□</text:span></text:p>
      <text:p text:style-name="Standard"><text:span text:style-name="T7">DAY 3</text:span></text:p>
      <text:p text:style-name="Standard"><text:span text:style-name="T17">Tydzień 1 | Cel dnia: Zrozumieć sortowanie i selekcję danych.</text:span></text:p>
      <text:p text:style-name="P3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5"><text:span text:style-name="T15">AI TASKI</text:span></text:p>
          </table:table-cell>
          <table:table-cell table:style-name="Table1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.1">
          <table:table-cell table:style-name="Table12.A2" office:value-type="string">
            <text:p text:style-name="P5"><text:span text:style-name="T19">SQL</text:span></text:p>
          </table:table-cell>
          <table:table-cell table:style-name="Table12.A2" office:value-type="string">
            <text:p text:style-name="P5"><text:span text:style-name="T18">ORDER BY, LIMIT - sortowanie wyników i wybór TOP rekordów.</text:span></text:p>
          </table:table-cell>
        </table:table-row>
        <table:table-row table:style-name="Table12.1">
          <table:table-cell table:style-name="Table12.A3" office:value-type="string">
            <text:p text:style-name="P5"><text:span text:style-name="T19">PYTHON</text:span></text:p>
          </table:table-cell>
          <table:table-cell table:style-name="Table12.A3" office:value-type="string">
            <text:p text:style-name="P5"><text:span text:style-name="T18">Listy - tworzenie, indeksy, dodawanie elementów.</text:span></text:p>
          </table:table-cell>
        </table:table-row>
        <table:table-row table:style-name="Table12.1">
          <table:table-cell table:style-name="Table12.A4" office:value-type="string">
            <text:p text:style-name="P5"><text:span text:style-name="T19">FOOTBALL</text:span></text:p>
          </table:table-cell>
          <table:table-cell table:style-name="Table12.A4" office:value-type="string">
            <text:p text:style-name="P5"><text:span text:style-name="T18">Zapisz 3 sytuacje meczowe, które dałoby się później opisać danymi.</text:span></text:p>
          </table:table-cell>
        </table:table-row>
        <table:table-row table:style-name="Table12.1">
          <table:table-cell table:style-name="Table12.A3" office:value-type="string">
            <text:p text:style-name="P5"><text:span text:style-name="T19">GITHUB / PORTFOLIO</text:span></text:p>
          </table:table-cell>
          <table:table-cell table:style-name="Table12.A3" office:value-type="string">
            <text:p text:style-name="P5"><text:span text:style-name="T18">Zapisz plik day_03_notes.md lub .txt.</text:span></text:p>
          </table:table-cell>
        </table:table-row>
        <table:table-row table:style-name="Table12.1">
          <table:table-cell table:style-name="Table12.A6" office:value-type="string">
            <text:p text:style-name="P5"><text:span text:style-name="T19">EFEKT DNIA</text:span></text:p>
          </table:table-cell>
          <table:table-cell table:style-name="Table12.A6" office:value-type="string">
            <text:p text:style-name="P5"><text:span text:style-name="T18">Notatka z SQL + Football Analytics.</text:span></text:p>
          </table:table-cell>
        </table:table-row>
        <table:table-row table:style-name="Table12.1">
          <table:table-cell table:style-name="Table12.A7" office:value-type="string">
            <text:p text:style-name="P5"><text:span text:style-name="T19">MINIMUM DNIA</text:span></text:p>
          </table:table-cell>
          <table:table-cell table:style-name="Table1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><text:span text:style-name="T11">NOTATKA DNIA</text:span></text:p>
          </table:table-cell>
        </table:table-row>
        <table:table-row table:style-name="Table13.1">
          <table:table-cell table:style-name="Table1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/60 <text:s/>■□□□□□□□□□□□□□□□□□□□</text:span></text:p>
      <text:p text:style-name="Standard"><text:span text:style-name="T7">DAY 4</text:span></text:p>
      <text:p text:style-name="Standard"><text:span text:style-name="T17">Tydzień 1 | Cel dnia: Połączyć myślenie analityczne z prostym kodem.</text:span></text:p>
      <text:p text:style-name="P3"/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5"><text:span text:style-name="T15">AI TASKI</text:span></text:p>
          </table:table-cell>
          <table:table-cell table:style-name="Table1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4.1">
          <table:table-cell table:style-name="Table14.A2" office:value-type="string">
            <text:p text:style-name="P5"><text:span text:style-name="T19">SQL</text:span></text:p>
          </table:table-cell>
          <table:table-cell table:style-name="Table14.A2" office:value-type="string">
            <text:p text:style-name="P5"><text:span text:style-name="T18">COUNT, DISTINCT - liczenie rekordów i unikalnych wartości.</text:span></text:p>
          </table:table-cell>
        </table:table-row>
        <table:table-row table:style-name="Table14.1">
          <table:table-cell table:style-name="Table14.A3" office:value-type="string">
            <text:p text:style-name="P5"><text:span text:style-name="T19">PYTHON</text:span></text:p>
          </table:table-cell>
          <table:table-cell table:style-name="Table14.A3" office:value-type="string">
            <text:p text:style-name="P5"><text:span text:style-name="T18">if / else - decyzje w kodzie.</text:span></text:p>
          </table:table-cell>
        </table:table-row>
        <table:table-row table:style-name="Table14.1">
          <table:table-cell table:style-name="Table14.A4" office:value-type="string">
            <text:p text:style-name="P5"><text:span text:style-name="T19">FOOTBALL</text:span></text:p>
          </table:table-cell>
          <table:table-cell table:style-name="Table14.A4" office:value-type="string">
            <text:p text:style-name="P5"><text:span text:style-name="T18">Wybierz jednego zawodnika do obserwacji w najbliższym raporcie.</text:span></text:p>
          </table:table-cell>
        </table:table-row>
        <table:table-row table:style-name="Table14.1">
          <table:table-cell table:style-name="Table14.A3" office:value-type="string">
            <text:p text:style-name="P5"><text:span text:style-name="T19">GITHUB / PORTFOLIO</text:span></text:p>
          </table:table-cell>
          <table:table-cell table:style-name="Table14.A3" office:value-type="string">
            <text:p text:style-name="P5"><text:span text:style-name="T18">Utwórz folder Player_Reports.</text:span></text:p>
          </table:table-cell>
        </table:table-row>
        <table:table-row table:style-name="Table14.1">
          <table:table-cell table:style-name="Table14.A6" office:value-type="string">
            <text:p text:style-name="P5"><text:span text:style-name="T19">EFEKT DNIA</text:span></text:p>
          </table:table-cell>
          <table:table-cell table:style-name="Table14.A6" office:value-type="string">
            <text:p text:style-name="P5"><text:span text:style-name="T18">Kandydat do pierwszego Player Profile.</text:span></text:p>
          </table:table-cell>
        </table:table-row>
        <table:table-row table:style-name="Table14.1">
          <table:table-cell table:style-name="Table14.A7" office:value-type="string">
            <text:p text:style-name="P5"><text:span text:style-name="T19">MINIMUM DNIA</text:span></text:p>
          </table:table-cell>
          <table:table-cell table:style-name="Table1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"><text:span text:style-name="T11">NOTATKA DNIA</text:span></text:p>
          </table:table-cell>
        </table:table-row>
        <table:table-row table:style-name="Table15.1">
          <table:table-cell table:style-name="Table1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/60 <text:s/>■■□□□□□□□□□□□□□□□□□□</text:span></text:p>
      <text:p text:style-name="Standard"><text:span text:style-name="T7">DAY 5</text:span></text:p>
      <text:p text:style-name="Standard"><text:span text:style-name="T17">Tydzień 1 | Cel dnia: Wejść w pierwsze grupowanie danych.</text:span></text:p>
      <text:p text:style-name="P3"/>
      <table:table table:name="Table16" table:style-name="Table16">
        <table:table-column table:style-name="Table16.A" table:number-columns-repeated="2"/>
        <table:table-row table:style-name="Table16.1">
          <table:table-cell table:style-name="Table16.A1" office:value-type="string">
            <text:p text:style-name="P5"><text:span text:style-name="T15">AI TASKI</text:span></text:p>
          </table:table-cell>
          <table:table-cell table:style-name="Table1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6.1">
          <table:table-cell table:style-name="Table16.A2" office:value-type="string">
            <text:p text:style-name="P5"><text:span text:style-name="T19">SQL</text:span></text:p>
          </table:table-cell>
          <table:table-cell table:style-name="Table16.A2" office:value-type="string">
            <text:p text:style-name="P5"><text:span text:style-name="T18">GROUP BY - grupowanie wyników.</text:span></text:p>
          </table:table-cell>
        </table:table-row>
        <table:table-row table:style-name="Table16.1">
          <table:table-cell table:style-name="Table16.A3" office:value-type="string">
            <text:p text:style-name="P5"><text:span text:style-name="T19">PYTHON</text:span></text:p>
          </table:table-cell>
          <table:table-cell table:style-name="Table16.A3" office:value-type="string">
            <text:p text:style-name="P5"><text:span text:style-name="T18">for loop - pętla po liście.</text:span></text:p>
          </table:table-cell>
        </table:table-row>
        <table:table-row table:style-name="Table16.1">
          <table:table-cell table:style-name="Table16.A4" office:value-type="string">
            <text:p text:style-name="P5"><text:span text:style-name="T19">FOOTBALL</text:span></text:p>
          </table:table-cell>
          <table:table-cell table:style-name="Table16.A4" office:value-type="string">
            <text:p text:style-name="P5"><text:span text:style-name="T18">Zapisz, jakie 5 statystyk byłoby przydatne przy ocenie zawodnika.</text:span></text:p>
          </table:table-cell>
        </table:table-row>
        <table:table-row table:style-name="Table16.1">
          <table:table-cell table:style-name="Table16.A3" office:value-type="string">
            <text:p text:style-name="P5"><text:span text:style-name="T19">GITHUB / PORTFOLIO</text:span></text:p>
          </table:table-cell>
          <table:table-cell table:style-name="Table16.A3" office:value-type="string">
            <text:p text:style-name="P5"><text:span text:style-name="T18">Dodaj plik football_metrics_ideas.md.</text:span></text:p>
          </table:table-cell>
        </table:table-row>
        <table:table-row table:style-name="Table16.1">
          <table:table-cell table:style-name="Table16.A6" office:value-type="string">
            <text:p text:style-name="P5"><text:span text:style-name="T19">EFEKT DNIA</text:span></text:p>
          </table:table-cell>
          <table:table-cell table:style-name="Table16.A6" office:value-type="string">
            <text:p text:style-name="P5"><text:span text:style-name="T18">Lista metryk do portfolio.</text:span></text:p>
          </table:table-cell>
        </table:table-row>
        <table:table-row table:style-name="Table16.1">
          <table:table-cell table:style-name="Table16.A7" office:value-type="string">
            <text:p text:style-name="P5"><text:span text:style-name="T19">MINIMUM DNIA</text:span></text:p>
          </table:table-cell>
          <table:table-cell table:style-name="Table1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"><text:span text:style-name="T11">NOTATKA DNIA</text:span></text:p>
          </table:table-cell>
        </table:table-row>
        <table:table-row table:style-name="Table17.1">
          <table:table-cell table:style-name="Table1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6/60 <text:s/>■■□□□□□□□□□□□□□□□□□□</text:span></text:p>
      <text:p text:style-name="Standard"><text:span text:style-name="T7">DAY 6</text:span></text:p>
      <text:p text:style-name="Standard"><text:span text:style-name="T17">Tydzień 1 | Cel dnia: Zrobić pierwszy mini-zestaw ćwiczeń.</text:span></text:p>
      <text:p text:style-name="P3"/>
      <table:table table:name="Table18" table:style-name="Table18">
        <table:table-column table:style-name="Table18.A" table:number-columns-repeated="2"/>
        <table:table-row table:style-name="Table18.1">
          <table:table-cell table:style-name="Table18.A1" office:value-type="string">
            <text:p text:style-name="P5"><text:span text:style-name="T15">AI TASKI</text:span></text:p>
          </table:table-cell>
          <table:table-cell table:style-name="Table1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8.1">
          <table:table-cell table:style-name="Table18.A2" office:value-type="string">
            <text:p text:style-name="P5"><text:span text:style-name="T19">SQL</text:span></text:p>
          </table:table-cell>
          <table:table-cell table:style-name="Table18.A2" office:value-type="string">
            <text:p text:style-name="P5"><text:span text:style-name="T18">Powtórka SELECT, WHERE, ORDER BY, COUNT, GROUP BY - minimum 15 zapytań.</text:span></text:p>
          </table:table-cell>
        </table:table-row>
        <table:table-row table:style-name="Table18.1">
          <table:table-cell table:style-name="Table18.A3" office:value-type="string">
            <text:p text:style-name="P5"><text:span text:style-name="T19">PYTHON</text:span></text:p>
          </table:table-cell>
          <table:table-cell table:style-name="Table18.A3" office:value-type="string">
            <text:p text:style-name="P5"><text:span text:style-name="T18">Funkcje - def, argument, return.</text:span></text:p>
          </table:table-cell>
        </table:table-row>
        <table:table-row table:style-name="Table18.1">
          <table:table-cell table:style-name="Table18.A4" office:value-type="string">
            <text:p text:style-name="P5"><text:span text:style-name="T19">FOOTBALL</text:span></text:p>
          </table:table-cell>
          <table:table-cell table:style-name="Table18.A4" office:value-type="string">
            <text:p text:style-name="P5"><text:span text:style-name="T18">Napisz pierwszy szkic struktury raportu meczowego.</text:span></text:p>
          </table:table-cell>
        </table:table-row>
        <table:table-row table:style-name="Table18.1">
          <table:table-cell table:style-name="Table18.A3" office:value-type="string">
            <text:p text:style-name="P5"><text:span text:style-name="T19">GITHUB / PORTFOLIO</text:span></text:p>
          </table:table-cell>
          <table:table-cell table:style-name="Table18.A3" office:value-type="string">
            <text:p text:style-name="P5"><text:span text:style-name="T18">Zapisz match_report_template.md.</text:span></text:p>
          </table:table-cell>
        </table:table-row>
        <table:table-row table:style-name="Table18.1">
          <table:table-cell table:style-name="Table18.A6" office:value-type="string">
            <text:p text:style-name="P5"><text:span text:style-name="T19">EFEKT DNIA</text:span></text:p>
          </table:table-cell>
          <table:table-cell table:style-name="Table18.A6" office:value-type="string">
            <text:p text:style-name="P5"><text:span text:style-name="T18">Szablon raportu meczowego.</text:span></text:p>
          </table:table-cell>
        </table:table-row>
        <table:table-row table:style-name="Table18.1">
          <table:table-cell table:style-name="Table18.A7" office:value-type="string">
            <text:p text:style-name="P5"><text:span text:style-name="T19">MINIMUM DNIA</text:span></text:p>
          </table:table-cell>
          <table:table-cell table:style-name="Table1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5"><text:span text:style-name="T11">NOTATKA DNIA</text:span></text:p>
          </table:table-cell>
        </table:table-row>
        <table:table-row table:style-name="Table19.1">
          <table:table-cell table:style-name="Table1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7/60 <text:s/>■■□□□□□□□□□□□□□□□□□□</text:span></text:p>
      <text:p text:style-name="Standard"><text:span text:style-name="T7">DAY 7</text:span></text:p>
      <text:p text:style-name="Standard"><text:span text:style-name="T17">Tydzień 1 | Cel dnia: Zamknąć tydzień i uporządkować efekty.</text:span></text:p>
      <text:p text:style-name="P3"/>
      <table:table table:name="Table20" table:style-name="Table20">
        <table:table-column table:style-name="Table20.A" table:number-columns-repeated="2"/>
        <table:table-row table:style-name="Table20.1">
          <table:table-cell table:style-name="Table20.A1" office:value-type="string">
            <text:p text:style-name="P5"><text:span text:style-name="T15">AI TASKI</text:span></text:p>
          </table:table-cell>
          <table:table-cell table:style-name="Table2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20.1">
          <table:table-cell table:style-name="Table20.A2" office:value-type="string">
            <text:p text:style-name="P5"><text:span text:style-name="T19">SQL</text:span></text:p>
          </table:table-cell>
          <table:table-cell table:style-name="Table20.A2" office:value-type="string">
            <text:p text:style-name="P5"><text:span text:style-name="T18">Powtórka tygodnia - 10 zapytań bez patrzenia w notatki.</text:span></text:p>
          </table:table-cell>
        </table:table-row>
        <table:table-row table:style-name="Table20.1">
          <table:table-cell table:style-name="Table20.A3" office:value-type="string">
            <text:p text:style-name="P5"><text:span text:style-name="T19">PYTHON</text:span></text:p>
          </table:table-cell>
          <table:table-cell table:style-name="Table20.A3" office:value-type="string">
            <text:p text:style-name="P5"><text:span text:style-name="T18">Powtórka tygodnia - 5 krótkich zadań.</text:span></text:p>
          </table:table-cell>
        </table:table-row>
        <table:table-row table:style-name="Table20.1">
          <table:table-cell table:style-name="Table20.A4" office:value-type="string">
            <text:p text:style-name="P5"><text:span text:style-name="T19">FOOTBALL</text:span></text:p>
          </table:table-cell>
          <table:table-cell table:style-name="Table20.A4" office:value-type="string">
            <text:p text:style-name="P5"><text:span text:style-name="T18">Wybierz jeden wniosek piłkarski z tygodnia i zapisz go prosto.</text:span></text:p>
          </table:table-cell>
        </table:table-row>
        <table:table-row table:style-name="Table20.1">
          <table:table-cell table:style-name="Table20.A3" office:value-type="string">
            <text:p text:style-name="P5"><text:span text:style-name="T19">GITHUB / PORTFOLIO</text:span></text:p>
          </table:table-cell>
          <table:table-cell table:style-name="Table20.A3" office:value-type="string">
            <text:p text:style-name="P5"><text:span text:style-name="T18">Zrób backup folderu FALCON.</text:span></text:p>
          </table:table-cell>
        </table:table-row>
        <table:table-row table:style-name="Table20.1">
          <table:table-cell table:style-name="Table20.A6" office:value-type="string">
            <text:p text:style-name="P5"><text:span text:style-name="T19">EFEKT DNIA</text:span></text:p>
          </table:table-cell>
          <table:table-cell table:style-name="Table20.A6" office:value-type="string">
            <text:p text:style-name="P5"><text:span text:style-name="T18">Weekly Review 1 gotowy.</text:span></text:p>
          </table:table-cell>
        </table:table-row>
        <table:table-row table:style-name="Table20.1">
          <table:table-cell table:style-name="Table20.A7" office:value-type="string">
            <text:p text:style-name="P5"><text:span text:style-name="T19">MINIMUM DNIA</text:span></text:p>
          </table:table-cell>
          <table:table-cell table:style-name="Table2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"><text:span text:style-name="T11">NOTATKA DNIA</text:span></text:p>
          </table:table-cell>
        </table:table-row>
        <table:table-row table:style-name="Table21.1">
          <table:table-cell table:style-name="Table2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1</text:span></text:p>
      <text:p text:style-name="P3"/>
      <text:p text:style-name="P4"><text:span text:style-name="T9">Podsumowanie dni 1-7. Bez bajek, bez dramatu, bez udawania. Po prostu sprawdzam, co faktycznie zostało zrobione.</text:span></text:p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5"><text:span text:style-name="T20">Pytanie</text:span></text:p>
          </table:table-cell>
          <table:table-cell table:style-name="Table22.A1" office:value-type="string">
            <text:p text:style-name="P5"><text:span text:style-name="T20">Odpowiedź</text:span></text:p>
          </table:table-cell>
        </table:table-row>
        <table:table-row table:style-name="Table22.1">
          <table:table-cell table:style-name="Table22.A2" office:value-type="string">
            <text:p text:style-name="P5">Co zrobiłem w tym tygodniu?</text:p>
          </table:table-cell>
          <table:table-cell table:style-name="Table22.B2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Czego się nauczyłem?</text:p>
          </table:table-cell>
          <table:table-cell table:style-name="Table22.B3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Co było najtrudniejsze?</text:p>
          </table:table-cell>
          <table:table-cell table:style-name="Table22.B4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Ile zrobiłem AI tasków?</text:p>
          </table:table-cell>
          <table:table-cell table:style-name="Table22.B5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Ile czasu poświęciłem na SQL?</text:p>
          </table:table-cell>
          <table:table-cell table:style-name="Table22.B6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Ile czasu poświęciłem na Python?</text:p>
          </table:table-cell>
          <table:table-cell table:style-name="Table22.B7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Co dodałem do GitHuba/portfolio?</text:p>
          </table:table-cell>
          <table:table-cell table:style-name="Table22.B8" office:value-type="string">
            <text:p text:style-name="P5"/>
          </table:table-cell>
        </table:table-row>
        <table:table-row table:style-name="Table22.1">
          <table:table-cell table:style-name="Table22.A2" office:value-type="string">
            <text:p text:style-name="P5">Co poprawiam w kolejnym tygodniu?</text:p>
          </table:table-cell>
          <table:table-cell table:style-name="Table22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2: FILTRY, AGREGACJE, NOTATKI</text:span></text:p>
      <text:p text:style-name="P3"/>
      <text:p text:style-name="P4"><text:span text:style-name="T9">SQL zaczyna robić robotę, Python dostaje podstawy, Football Analytics zbiera pierwsze obserwacje.</text:span></text:p>
      <table:table table:name="Table23" table:style-name="Table23">
        <table:table-column table:style-name="Table23.A" table:number-columns-repeated="2"/>
        <table:table-row table:style-name="Table23.1">
          <table:table-cell table:style-name="Table23.A1" office:value-type="string">
            <text:p text:style-name="P5"><text:span text:style-name="T13">Cel tygodnia</text:span></text:p>
          </table:table-cell>
          <table:table-cell table:style-name="Table23.B1" office:value-type="string">
            <text:p text:style-name="P5"><text:span text:style-name="T12">Filtrowanie, agregacje, pierwsze JOIN i projekt prostego datasetu piłkarskiego.</text:span></text:p>
          </table:table-cell>
        </table:table-row>
        <table:table-row table:style-name="Table23.1">
          <table:table-cell table:style-name="Table23.A2" office:value-type="string">
            <text:p text:style-name="P5"><text:span text:style-name="T13">Efekt końcowy</text:span></text:p>
          </table:table-cell>
          <table:table-cell table:style-name="Table23.B1" office:value-type="string">
            <text:p text:style-name="P5"><text:span text:style-name="T12">Mini dataset, pytania analityczne i powtórka podstaw.</text:span></text:p>
          </table:table-cell>
        </table:table-row>
      </table:table>
      <text:p text:style-name="Standard"/>
      <text:p text:style-name="P7"><text:span text:style-name="T16">Day 8/60 <text:s/>■■■□□□□□□□□□□□□□□□□□</text:span></text:p>
      <text:p text:style-name="Standard"><text:span text:style-name="T7">DAY 8</text:span></text:p>
      <text:p text:style-name="Standard"><text:span text:style-name="T17">Tydzień 2 | Cel dnia: Dodać mocniejsze filtrowanie w SQL.</text:span></text:p>
      <text:p text:style-name="P3"/>
      <table:table table:name="Table24" table:style-name="Table24">
        <table:table-column table:style-name="Table24.A" table:number-columns-repeated="2"/>
        <table:table-row table:style-name="Table24.1">
          <table:table-cell table:style-name="Table24.A1" office:value-type="string">
            <text:p text:style-name="P5"><text:span text:style-name="T15">AI TASKI</text:span></text:p>
          </table:table-cell>
          <table:table-cell table:style-name="Table2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24.1">
          <table:table-cell table:style-name="Table24.A2" office:value-type="string">
            <text:p text:style-name="P5"><text:span text:style-name="T19">SQL</text:span></text:p>
          </table:table-cell>
          <table:table-cell table:style-name="Table24.A2" office:value-type="string">
            <text:p text:style-name="P5"><text:span text:style-name="T18">AND, OR - 12 zapytań z dwoma warunkami.</text:span></text:p>
          </table:table-cell>
        </table:table-row>
        <table:table-row table:style-name="Table24.1">
          <table:table-cell table:style-name="Table24.A3" office:value-type="string">
            <text:p text:style-name="P5"><text:span text:style-name="T19">PYTHON</text:span></text:p>
          </table:table-cell>
          <table:table-cell table:style-name="Table24.A3" office:value-type="string">
            <text:p text:style-name="P5"><text:span text:style-name="T18">while loop - proste przykłady.</text:span></text:p>
          </table:table-cell>
        </table:table-row>
        <table:table-row table:style-name="Table24.1">
          <table:table-cell table:style-name="Table24.A4" office:value-type="string">
            <text:p text:style-name="P5"><text:span text:style-name="T19">FOOTBALL</text:span></text:p>
          </table:table-cell>
          <table:table-cell table:style-name="Table24.A4" office:value-type="string">
            <text:p text:style-name="P5"><text:span text:style-name="T18">Zapisz różnicę między obserwacją a wnioskiem analitycznym.</text:span></text:p>
          </table:table-cell>
        </table:table-row>
        <table:table-row table:style-name="Table24.1">
          <table:table-cell table:style-name="Table24.A3" office:value-type="string">
            <text:p text:style-name="P5"><text:span text:style-name="T19">GITHUB / PORTFOLIO</text:span></text:p>
          </table:table-cell>
          <table:table-cell table:style-name="Table24.A3" office:value-type="string">
            <text:p text:style-name="P5"><text:span text:style-name="T18">Dodaj notes_week_02.md.</text:span></text:p>
          </table:table-cell>
        </table:table-row>
        <table:table-row table:style-name="Table24.1">
          <table:table-cell table:style-name="Table24.A6" office:value-type="string">
            <text:p text:style-name="P5"><text:span text:style-name="T19">EFEKT DNIA</text:span></text:p>
          </table:table-cell>
          <table:table-cell table:style-name="Table24.A6" office:value-type="string">
            <text:p text:style-name="P5"><text:span text:style-name="T18">Lepsze filtry i notatka analityczna.</text:span></text:p>
          </table:table-cell>
        </table:table-row>
        <table:table-row table:style-name="Table24.1">
          <table:table-cell table:style-name="Table24.A7" office:value-type="string">
            <text:p text:style-name="P5"><text:span text:style-name="T19">MINIMUM DNIA</text:span></text:p>
          </table:table-cell>
          <table:table-cell table:style-name="Table2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5"><text:span text:style-name="T11">NOTATKA DNIA</text:span></text:p>
          </table:table-cell>
        </table:table-row>
        <table:table-row table:style-name="Table25.1">
          <table:table-cell table:style-name="Table2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9/60 <text:s/>■■■□□□□□□□□□□□□□□□□□</text:span></text:p>
      <text:p text:style-name="Standard"><text:span text:style-name="T7">DAY 9</text:span></text:p>
      <text:p text:style-name="Standard"><text:span text:style-name="T17">Tydzień 2 | Cel dnia: Zrozumieć zakresy i listy wartości.</text:span></text:p>
      <text:p text:style-name="P3"/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5"><text:span text:style-name="T15">AI TASKI</text:span></text:p>
          </table:table-cell>
          <table:table-cell table:style-name="Table2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26.1">
          <table:table-cell table:style-name="Table26.A2" office:value-type="string">
            <text:p text:style-name="P5"><text:span text:style-name="T19">SQL</text:span></text:p>
          </table:table-cell>
          <table:table-cell table:style-name="Table26.A2" office:value-type="string">
            <text:p text:style-name="P5"><text:span text:style-name="T18">IN, BETWEEN - filtrowanie po listach i zakresach.</text:span></text:p>
          </table:table-cell>
        </table:table-row>
        <table:table-row table:style-name="Table26.1">
          <table:table-cell table:style-name="Table26.A3" office:value-type="string">
            <text:p text:style-name="P5"><text:span text:style-name="T19">PYTHON</text:span></text:p>
          </table:table-cell>
          <table:table-cell table:style-name="Table26.A3" office:value-type="string">
            <text:p text:style-name="P5"><text:span text:style-name="T18">Słowniki - keys, values, items.</text:span></text:p>
          </table:table-cell>
        </table:table-row>
        <table:table-row table:style-name="Table26.1">
          <table:table-cell table:style-name="Table26.A4" office:value-type="string">
            <text:p text:style-name="P5"><text:span text:style-name="T19">FOOTBALL</text:span></text:p>
          </table:table-cell>
          <table:table-cell table:style-name="Table26.A4" office:value-type="string">
            <text:p text:style-name="P5"><text:span text:style-name="T18">Przygotuj listę 10 kolumn do fikcyjnej tabeli players.</text:span></text:p>
          </table:table-cell>
        </table:table-row>
        <table:table-row table:style-name="Table26.1">
          <table:table-cell table:style-name="Table26.A3" office:value-type="string">
            <text:p text:style-name="P5"><text:span text:style-name="T19">GITHUB / PORTFOLIO</text:span></text:p>
          </table:table-cell>
          <table:table-cell table:style-name="Table26.A3" office:value-type="string">
            <text:p text:style-name="P5"><text:span text:style-name="T18">Zapisz players_table_design.md.</text:span></text:p>
          </table:table-cell>
        </table:table-row>
        <table:table-row table:style-name="Table26.1">
          <table:table-cell table:style-name="Table26.A6" office:value-type="string">
            <text:p text:style-name="P5"><text:span text:style-name="T19">EFEKT DNIA</text:span></text:p>
          </table:table-cell>
          <table:table-cell table:style-name="Table26.A6" office:value-type="string">
            <text:p text:style-name="P5"><text:span text:style-name="T18">Projekt tabeli piłkarskiej.</text:span></text:p>
          </table:table-cell>
        </table:table-row>
        <table:table-row table:style-name="Table26.1">
          <table:table-cell table:style-name="Table26.A7" office:value-type="string">
            <text:p text:style-name="P5"><text:span text:style-name="T19">MINIMUM DNIA</text:span></text:p>
          </table:table-cell>
          <table:table-cell table:style-name="Table2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5"><text:span text:style-name="T11">NOTATKA DNIA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0/60 <text:s/>■■■□□□□□□□□□□□□□□□□□</text:span></text:p>
      <text:p text:style-name="Standard"><text:span text:style-name="T7">DAY 10</text:span></text:p>
      <text:p text:style-name="Standard"><text:span text:style-name="T17">Tydzień 2 | Cel dnia: Dodać warunki tekstowe i brakujące dane.</text:span></text:p>
      <text:p text:style-name="P3"/>
      <table:table table:name="Table28" table:style-name="Table28">
        <table:table-column table:style-name="Table28.A" table:number-columns-repeated="2"/>
        <table:table-row table:style-name="Table28.1">
          <table:table-cell table:style-name="Table28.A1" office:value-type="string">
            <text:p text:style-name="P5"><text:span text:style-name="T15">AI TASKI</text:span></text:p>
          </table:table-cell>
          <table:table-cell table:style-name="Table2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28.1">
          <table:table-cell table:style-name="Table28.A2" office:value-type="string">
            <text:p text:style-name="P5"><text:span text:style-name="T19">SQL</text:span></text:p>
          </table:table-cell>
          <table:table-cell table:style-name="Table28.A2" office:value-type="string">
            <text:p text:style-name="P5"><text:span text:style-name="T18">LIKE, IS NULL, IS NOT NULL - wyszukiwanie tekstu i braków.</text:span></text:p>
          </table:table-cell>
        </table:table-row>
        <table:table-row table:style-name="Table28.1">
          <table:table-cell table:style-name="Table28.A3" office:value-type="string">
            <text:p text:style-name="P5"><text:span text:style-name="T19">PYTHON</text:span></text:p>
          </table:table-cell>
          <table:table-cell table:style-name="Table28.A3" office:value-type="string">
            <text:p text:style-name="P5"><text:span text:style-name="T18">Funkcje - praktyka na prostych obliczeniach.</text:span></text:p>
          </table:table-cell>
        </table:table-row>
        <table:table-row table:style-name="Table28.1">
          <table:table-cell table:style-name="Table28.A4" office:value-type="string">
            <text:p text:style-name="P5"><text:span text:style-name="T19">FOOTBALL</text:span></text:p>
          </table:table-cell>
          <table:table-cell table:style-name="Table28.A4" office:value-type="string">
            <text:p text:style-name="P5"><text:span text:style-name="T18">Zapisz 5 przykładów pytań, na które można odpowiedzieć danymi piłkarskimi.</text:span></text:p>
          </table:table-cell>
        </table:table-row>
        <table:table-row table:style-name="Table28.1">
          <table:table-cell table:style-name="Table28.A3" office:value-type="string">
            <text:p text:style-name="P5"><text:span text:style-name="T19">GITHUB / PORTFOLIO</text:span></text:p>
          </table:table-cell>
          <table:table-cell table:style-name="Table28.A3" office:value-type="string">
            <text:p text:style-name="P5"><text:span text:style-name="T18">Dodaj questions_for_data.md.</text:span></text:p>
          </table:table-cell>
        </table:table-row>
        <table:table-row table:style-name="Table28.1">
          <table:table-cell table:style-name="Table28.A6" office:value-type="string">
            <text:p text:style-name="P5"><text:span text:style-name="T19">EFEKT DNIA</text:span></text:p>
          </table:table-cell>
          <table:table-cell table:style-name="Table28.A6" office:value-type="string">
            <text:p text:style-name="P5"><text:span text:style-name="T18">Lista pytań analitycznych.</text:span></text:p>
          </table:table-cell>
        </table:table-row>
        <table:table-row table:style-name="Table28.1">
          <table:table-cell table:style-name="Table28.A7" office:value-type="string">
            <text:p text:style-name="P5"><text:span text:style-name="T19">MINIMUM DNIA</text:span></text:p>
          </table:table-cell>
          <table:table-cell table:style-name="Table2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><text:span text:style-name="T11">NOTATKA DNIA</text:span></text:p>
          </table:table-cell>
        </table:table-row>
        <table:table-row table:style-name="Table29.1">
          <table:table-cell table:style-name="Table2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1/60 <text:s/>■■■■□□□□□□□□□□□□□□□□</text:span></text:p>
      <text:p text:style-name="Standard"><text:span text:style-name="T7">DAY 11</text:span></text:p>
      <text:p text:style-name="Standard"><text:span text:style-name="T17">Tydzień 2 | Cel dnia: Wejść w pierwszą logikę JOIN.</text:span></text:p>
      <text:p text:style-name="P3"/>
      <table:table table:name="Table30" table:style-name="Table30">
        <table:table-column table:style-name="Table30.A" table:number-columns-repeated="2"/>
        <table:table-row table:style-name="Table30.1">
          <table:table-cell table:style-name="Table30.A1" office:value-type="string">
            <text:p text:style-name="P5"><text:span text:style-name="T15">AI TASKI</text:span></text:p>
          </table:table-cell>
          <table:table-cell table:style-name="Table3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30.1">
          <table:table-cell table:style-name="Table30.A2" office:value-type="string">
            <text:p text:style-name="P5"><text:span text:style-name="T19">SQL</text:span></text:p>
          </table:table-cell>
          <table:table-cell table:style-name="Table30.A2" office:value-type="string">
            <text:p text:style-name="P5"><text:span text:style-name="T18">JOIN - pojęcie klucza, tabela players + teams.</text:span></text:p>
          </table:table-cell>
        </table:table-row>
        <table:table-row table:style-name="Table30.1">
          <table:table-cell table:style-name="Table30.A3" office:value-type="string">
            <text:p text:style-name="P5"><text:span text:style-name="T19">PYTHON</text:span></text:p>
          </table:table-cell>
          <table:table-cell table:style-name="Table30.A3" office:value-type="string">
            <text:p text:style-name="P5"><text:span text:style-name="T18">Praca z plikiem tekstowym - zapis i odczyt.</text:span></text:p>
          </table:table-cell>
        </table:table-row>
        <table:table-row table:style-name="Table30.1">
          <table:table-cell table:style-name="Table30.A4" office:value-type="string">
            <text:p text:style-name="P5"><text:span text:style-name="T19">FOOTBALL</text:span></text:p>
          </table:table-cell>
          <table:table-cell table:style-name="Table30.A4" office:value-type="string">
            <text:p text:style-name="P5"><text:span text:style-name="T18">Rozpisz relację: zawodnik - drużyna - mecz.</text:span></text:p>
          </table:table-cell>
        </table:table-row>
        <table:table-row table:style-name="Table30.1">
          <table:table-cell table:style-name="Table30.A3" office:value-type="string">
            <text:p text:style-name="P5"><text:span text:style-name="T19">GITHUB / PORTFOLIO</text:span></text:p>
          </table:table-cell>
          <table:table-cell table:style-name="Table30.A3" office:value-type="string">
            <text:p text:style-name="P5"><text:span text:style-name="T18">Dodaj data_model_notes.md.</text:span></text:p>
          </table:table-cell>
        </table:table-row>
        <table:table-row table:style-name="Table30.1">
          <table:table-cell table:style-name="Table30.A6" office:value-type="string">
            <text:p text:style-name="P5"><text:span text:style-name="T19">EFEKT DNIA</text:span></text:p>
          </table:table-cell>
          <table:table-cell table:style-name="Table30.A6" office:value-type="string">
            <text:p text:style-name="P5"><text:span text:style-name="T18">Pierwszy model danych.</text:span></text:p>
          </table:table-cell>
        </table:table-row>
        <table:table-row table:style-name="Table30.1">
          <table:table-cell table:style-name="Table30.A7" office:value-type="string">
            <text:p text:style-name="P5"><text:span text:style-name="T19">MINIMUM DNIA</text:span></text:p>
          </table:table-cell>
          <table:table-cell table:style-name="Table3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5"><text:span text:style-name="T11">NOTATKA DNIA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2/60 <text:s/>■■■■□□□□□□□□□□□□□□□□</text:span></text:p>
      <text:p text:style-name="Standard"><text:span text:style-name="T7">DAY 12</text:span></text:p>
      <text:p text:style-name="Standard"><text:span text:style-name="T17">Tydzień 2 | Cel dnia: Zrozumieć różnicę INNER i LEFT JOIN.</text:span></text:p>
      <text:p text:style-name="P3"/>
      <table:table table:name="Table32" table:style-name="Table32">
        <table:table-column table:style-name="Table32.A" table:number-columns-repeated="2"/>
        <table:table-row table:style-name="Table32.1">
          <table:table-cell table:style-name="Table32.A1" office:value-type="string">
            <text:p text:style-name="P5"><text:span text:style-name="T15">AI TASKI</text:span></text:p>
          </table:table-cell>
          <table:table-cell table:style-name="Table3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32.1">
          <table:table-cell table:style-name="Table32.A2" office:value-type="string">
            <text:p text:style-name="P5"><text:span text:style-name="T19">SQL</text:span></text:p>
          </table:table-cell>
          <table:table-cell table:style-name="Table32.A2" office:value-type="string">
            <text:p text:style-name="P5"><text:span text:style-name="T18">INNER JOIN, LEFT JOIN - 10 przykładów.</text:span></text:p>
          </table:table-cell>
        </table:table-row>
        <table:table-row table:style-name="Table32.1">
          <table:table-cell table:style-name="Table32.A3" office:value-type="string">
            <text:p text:style-name="P5"><text:span text:style-name="T19">PYTHON</text:span></text:p>
          </table:table-cell>
          <table:table-cell table:style-name="Table32.A3" office:value-type="string">
            <text:p text:style-name="P5"><text:span text:style-name="T18">CSV - czym jest, jak wygląda, jak go czytać.</text:span></text:p>
          </table:table-cell>
        </table:table-row>
        <table:table-row table:style-name="Table32.1">
          <table:table-cell table:style-name="Table32.A4" office:value-type="string">
            <text:p text:style-name="P5"><text:span text:style-name="T19">FOOTBALL</text:span></text:p>
          </table:table-cell>
          <table:table-cell table:style-name="Table32.A4" office:value-type="string">
            <text:p text:style-name="P5"><text:span text:style-name="T18">Wypisz, jakie dane meczowe chcesz zbierać ręcznie na start.</text:span></text:p>
          </table:table-cell>
        </table:table-row>
        <table:table-row table:style-name="Table32.1">
          <table:table-cell table:style-name="Table32.A3" office:value-type="string">
            <text:p text:style-name="P5"><text:span text:style-name="T19">GITHUB / PORTFOLIO</text:span></text:p>
          </table:table-cell>
          <table:table-cell table:style-name="Table32.A3" office:value-type="string">
            <text:p text:style-name="P5"><text:span text:style-name="T18">Dodaj manual_match_data_template.csv.</text:span></text:p>
          </table:table-cell>
        </table:table-row>
        <table:table-row table:style-name="Table32.1">
          <table:table-cell table:style-name="Table32.A6" office:value-type="string">
            <text:p text:style-name="P5"><text:span text:style-name="T19">EFEKT DNIA</text:span></text:p>
          </table:table-cell>
          <table:table-cell table:style-name="Table32.A6" office:value-type="string">
            <text:p text:style-name="P5"><text:span text:style-name="T18">Pierwszy ręczny CSV.</text:span></text:p>
          </table:table-cell>
        </table:table-row>
        <table:table-row table:style-name="Table32.1">
          <table:table-cell table:style-name="Table32.A7" office:value-type="string">
            <text:p text:style-name="P5"><text:span text:style-name="T19">MINIMUM DNIA</text:span></text:p>
          </table:table-cell>
          <table:table-cell table:style-name="Table3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5"><text:span text:style-name="T11">NOTATKA DNIA</text:span></text:p>
          </table:table-cell>
        </table:table-row>
        <table:table-row table:style-name="Table33.1">
          <table:table-cell table:style-name="Table3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3/60 <text:s/>■■■■□□□□□□□□□□□□□□□□</text:span></text:p>
      <text:p text:style-name="Standard"><text:span text:style-name="T7">DAY 13</text:span></text:p>
      <text:p text:style-name="Standard"><text:span text:style-name="T17">Tydzień 2 | Cel dnia: Zbudować pierwszy mini-zbiór danych.</text:span></text:p>
      <text:p text:style-name="P3"/>
      <table:table table:name="Table34" table:style-name="Table34">
        <table:table-column table:style-name="Table34.A" table:number-columns-repeated="2"/>
        <table:table-row table:style-name="Table34.1">
          <table:table-cell table:style-name="Table34.A1" office:value-type="string">
            <text:p text:style-name="P5"><text:span text:style-name="T15">AI TASKI</text:span></text:p>
          </table:table-cell>
          <table:table-cell table:style-name="Table3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34.1">
          <table:table-cell table:style-name="Table34.A2" office:value-type="string">
            <text:p text:style-name="P5"><text:span text:style-name="T19">SQL</text:span></text:p>
          </table:table-cell>
          <table:table-cell table:style-name="Table34.A2" office:value-type="string">
            <text:p text:style-name="P5"><text:span text:style-name="T18">Utwórz przykładową tabelę players i teams w notatkach SQL.</text:span></text:p>
          </table:table-cell>
        </table:table-row>
        <table:table-row table:style-name="Table34.1">
          <table:table-cell table:style-name="Table34.A3" office:value-type="string">
            <text:p text:style-name="P5"><text:span text:style-name="T19">PYTHON</text:span></text:p>
          </table:table-cell>
          <table:table-cell table:style-name="Table34.A3" office:value-type="string">
            <text:p text:style-name="P5"><text:span text:style-name="T18">Wczytaj prosty CSV w Pythonie albo zapisz plan wczytania.</text:span></text:p>
          </table:table-cell>
        </table:table-row>
        <table:table-row table:style-name="Table34.1">
          <table:table-cell table:style-name="Table34.A4" office:value-type="string">
            <text:p text:style-name="P5"><text:span text:style-name="T19">FOOTBALL</text:span></text:p>
          </table:table-cell>
          <table:table-cell table:style-name="Table34.A4" office:value-type="string">
            <text:p text:style-name="P5"><text:span text:style-name="T18">Uzupełnij 5 wierszy fikcyjnych danych piłkarskich.</text:span></text:p>
          </table:table-cell>
        </table:table-row>
        <table:table-row table:style-name="Table34.1">
          <table:table-cell table:style-name="Table34.A3" office:value-type="string">
            <text:p text:style-name="P5"><text:span text:style-name="T19">GITHUB / PORTFOLIO</text:span></text:p>
          </table:table-cell>
          <table:table-cell table:style-name="Table34.A3" office:value-type="string">
            <text:p text:style-name="P5"><text:span text:style-name="T18">Zapisz pierwszy plik CSV w folderze Football_Analytics.</text:span></text:p>
          </table:table-cell>
        </table:table-row>
        <table:table-row table:style-name="Table34.1">
          <table:table-cell table:style-name="Table34.A6" office:value-type="string">
            <text:p text:style-name="P5"><text:span text:style-name="T19">EFEKT DNIA</text:span></text:p>
          </table:table-cell>
          <table:table-cell table:style-name="Table34.A6" office:value-type="string">
            <text:p text:style-name="P5"><text:span text:style-name="T18">Mini dataset v0.1.</text:span></text:p>
          </table:table-cell>
        </table:table-row>
        <table:table-row table:style-name="Table34.1">
          <table:table-cell table:style-name="Table34.A7" office:value-type="string">
            <text:p text:style-name="P5"><text:span text:style-name="T19">MINIMUM DNIA</text:span></text:p>
          </table:table-cell>
          <table:table-cell table:style-name="Table3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5"><text:span text:style-name="T11">NOTATKA DNIA</text:span></text:p>
          </table:table-cell>
        </table:table-row>
        <table:table-row table:style-name="Table35.1">
          <table:table-cell table:style-name="Table3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4/60 <text:s/>■■■■■□□□□□□□□□□□□□□□</text:span></text:p>
      <text:p text:style-name="Standard"><text:span text:style-name="T7">DAY 14</text:span></text:p>
      <text:p text:style-name="Standard"><text:span text:style-name="T17">Tydzień 2 | Cel dnia: Zamknąć tydzień 2 bez rozpraszania.</text:span></text:p>
      <text:p text:style-name="P3"/>
      <table:table table:name="Table36" table:style-name="Table36">
        <table:table-column table:style-name="Table36.A" table:number-columns-repeated="2"/>
        <table:table-row table:style-name="Table36.1">
          <table:table-cell table:style-name="Table36.A1" office:value-type="string">
            <text:p text:style-name="P5"><text:span text:style-name="T15">AI TASKI</text:span></text:p>
          </table:table-cell>
          <table:table-cell table:style-name="Table3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36.1">
          <table:table-cell table:style-name="Table36.A2" office:value-type="string">
            <text:p text:style-name="P5"><text:span text:style-name="T19">SQL</text:span></text:p>
          </table:table-cell>
          <table:table-cell table:style-name="Table36.A2" office:value-type="string">
            <text:p text:style-name="P5"><text:span text:style-name="T18">Powtórka filtrów, agregacji i JOIN - 15 zapytań.</text:span></text:p>
          </table:table-cell>
        </table:table-row>
        <table:table-row table:style-name="Table36.1">
          <table:table-cell table:style-name="Table36.A3" office:value-type="string">
            <text:p text:style-name="P5"><text:span text:style-name="T19">PYTHON</text:span></text:p>
          </table:table-cell>
          <table:table-cell table:style-name="Table36.A3" office:value-type="string">
            <text:p text:style-name="P5"><text:span text:style-name="T18">Powtórka: listy, słowniki, pętle, funkcje.</text:span></text:p>
          </table:table-cell>
        </table:table-row>
        <table:table-row table:style-name="Table36.1">
          <table:table-cell table:style-name="Table36.A4" office:value-type="string">
            <text:p text:style-name="P5"><text:span text:style-name="T19">FOOTBALL</text:span></text:p>
          </table:table-cell>
          <table:table-cell table:style-name="Table36.A4" office:value-type="string">
            <text:p text:style-name="P5"><text:span text:style-name="T18">Napisz krótki opis: czego szukasz w analizie meczu.</text:span></text:p>
          </table:table-cell>
        </table:table-row>
        <table:table-row table:style-name="Table36.1">
          <table:table-cell table:style-name="Table36.A3" office:value-type="string">
            <text:p text:style-name="P5"><text:span text:style-name="T19">GITHUB / PORTFOLIO</text:span></text:p>
          </table:table-cell>
          <table:table-cell table:style-name="Table36.A3" office:value-type="string">
            <text:p text:style-name="P5"><text:span text:style-name="T18">Backup + porządek plików.</text:span></text:p>
          </table:table-cell>
        </table:table-row>
        <table:table-row table:style-name="Table36.1">
          <table:table-cell table:style-name="Table36.A6" office:value-type="string">
            <text:p text:style-name="P5"><text:span text:style-name="T19">EFEKT DNIA</text:span></text:p>
          </table:table-cell>
          <table:table-cell table:style-name="Table36.A6" office:value-type="string">
            <text:p text:style-name="P5"><text:span text:style-name="T18">Weekly Review 2 gotowy.</text:span></text:p>
          </table:table-cell>
        </table:table-row>
        <table:table-row table:style-name="Table36.1">
          <table:table-cell table:style-name="Table36.A7" office:value-type="string">
            <text:p text:style-name="P5"><text:span text:style-name="T19">MINIMUM DNIA</text:span></text:p>
          </table:table-cell>
          <table:table-cell table:style-name="Table3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5"><text:span text:style-name="T11">NOTATKA DNIA</text:span></text:p>
          </table:table-cell>
        </table:table-row>
        <table:table-row table:style-name="Table37.1">
          <table:table-cell table:style-name="Table3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2</text:span></text:p>
      <text:p text:style-name="P3"/>
      <text:p text:style-name="P4"><text:span text:style-name="T9">Podsumowanie dni 8-14. Bez bajek, bez dramatu, bez udawania. Po prostu sprawdzam, co faktycznie zostało zrobione.</text:span></text:p>
      <table:table table:name="Table38" table:style-name="Table38">
        <table:table-column table:style-name="Table38.A" table:number-columns-repeated="2"/>
        <table:table-row table:style-name="Table38.1">
          <table:table-cell table:style-name="Table38.A1" office:value-type="string">
            <text:p text:style-name="P5"><text:span text:style-name="T20">Pytanie</text:span></text:p>
          </table:table-cell>
          <table:table-cell table:style-name="Table38.A1" office:value-type="string">
            <text:p text:style-name="P5"><text:span text:style-name="T20">Odpowiedź</text:span></text:p>
          </table:table-cell>
        </table:table-row>
        <table:table-row table:style-name="Table38.1">
          <table:table-cell table:style-name="Table38.A2" office:value-type="string">
            <text:p text:style-name="P5">Co zrobiłem w tym tygodniu?</text:p>
          </table:table-cell>
          <table:table-cell table:style-name="Table38.B2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Czego się nauczyłem?</text:p>
          </table:table-cell>
          <table:table-cell table:style-name="Table38.B3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Co było najtrudniejsze?</text:p>
          </table:table-cell>
          <table:table-cell table:style-name="Table38.B4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Ile zrobiłem AI tasków?</text:p>
          </table:table-cell>
          <table:table-cell table:style-name="Table38.B5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Ile czasu poświęciłem na SQL?</text:p>
          </table:table-cell>
          <table:table-cell table:style-name="Table38.B6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Ile czasu poświęciłem na Python?</text:p>
          </table:table-cell>
          <table:table-cell table:style-name="Table38.B7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Co dodałem do GitHuba/portfolio?</text:p>
          </table:table-cell>
          <table:table-cell table:style-name="Table38.B8" office:value-type="string">
            <text:p text:style-name="P5"/>
          </table:table-cell>
        </table:table-row>
        <table:table-row table:style-name="Table38.1">
          <table:table-cell table:style-name="Table38.A2" office:value-type="string">
            <text:p text:style-name="P5">Co poprawiam w kolejnym tygodniu?</text:p>
          </table:table-cell>
          <table:table-cell table:style-name="Table38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3: GITHUB I DANE</text:span></text:p>
      <text:p text:style-name="P3"/>
      <text:p text:style-name="P4"><text:span text:style-name="T9">Pierwsza publiczna struktura pracy, CSV, pandas i start mini-projektu.</text:span></text:p>
      <table:table table:name="Table39" table:style-name="Table39">
        <table:table-column table:style-name="Table39.A" table:number-columns-repeated="2"/>
        <table:table-row table:style-name="Table39.1">
          <table:table-cell table:style-name="Table39.A1" office:value-type="string">
            <text:p text:style-name="P5"><text:span text:style-name="T13">Cel tygodnia</text:span></text:p>
          </table:table-cell>
          <table:table-cell table:style-name="Table39.B1" office:value-type="string">
            <text:p text:style-name="P5"><text:span text:style-name="T12">GitHub, pandas, CSV i pierwszy mini-projekt danych.</text:span></text:p>
          </table:table-cell>
        </table:table-row>
        <table:table-row table:style-name="Table39.1">
          <table:table-cell table:style-name="Table39.A2" office:value-type="string">
            <text:p text:style-name="P5"><text:span text:style-name="T13">Efekt końcowy</text:span></text:p>
          </table:table-cell>
          <table:table-cell table:style-name="Table39.B1" office:value-type="string">
            <text:p text:style-name="P5"><text:span text:style-name="T12">Pierwszy projekt zaczyna wyglądać jak coś, co można pokazać ludziom. Ostrożnie, jeszcze nie NASA.</text:span></text:p>
          </table:table-cell>
        </table:table-row>
      </table:table>
      <text:p text:style-name="Standard"/>
      <text:p text:style-name="P7"><text:span text:style-name="T16">Day 15/60 <text:s/>■■■■■□□□□□□□□□□□□□□□</text:span></text:p>
      <text:p text:style-name="Standard"><text:span text:style-name="T7">DAY 15</text:span></text:p>
      <text:p text:style-name="Standard"><text:span text:style-name="T17">Tydzień 3 | Cel dnia: Uruchomić GitHub jako dowód pracy.</text:span></text:p>
      <text:p text:style-name="P3"/>
      <table:table table:name="Table40" table:style-name="Table40">
        <table:table-column table:style-name="Table40.A" table:number-columns-repeated="2"/>
        <table:table-row table:style-name="Table40.1">
          <table:table-cell table:style-name="Table40.A1" office:value-type="string">
            <text:p text:style-name="P5"><text:span text:style-name="T15">AI TASKI</text:span></text:p>
          </table:table-cell>
          <table:table-cell table:style-name="Table4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40.1">
          <table:table-cell table:style-name="Table40.A2" office:value-type="string">
            <text:p text:style-name="P5"><text:span text:style-name="T19">SQL</text:span></text:p>
          </table:table-cell>
          <table:table-cell table:style-name="Table40.A2" office:value-type="string">
            <text:p text:style-name="P5"><text:span text:style-name="T18">Powtórka JOIN na modelu players-teams.</text:span></text:p>
          </table:table-cell>
        </table:table-row>
        <table:table-row table:style-name="Table40.1">
          <table:table-cell table:style-name="Table40.A3" office:value-type="string">
            <text:p text:style-name="P5"><text:span text:style-name="T19">PYTHON</text:span></text:p>
          </table:table-cell>
          <table:table-cell table:style-name="Table40.A3" office:value-type="string">
            <text:p text:style-name="P5"><text:span text:style-name="T18">Przygotuj pierwszy plik .py z prostymi obliczeniami.</text:span></text:p>
          </table:table-cell>
        </table:table-row>
        <table:table-row table:style-name="Table40.1">
          <table:table-cell table:style-name="Table40.A4" office:value-type="string">
            <text:p text:style-name="P5"><text:span text:style-name="T19">FOOTBALL</text:span></text:p>
          </table:table-cell>
          <table:table-cell table:style-name="Table40.A4" office:value-type="string">
            <text:p text:style-name="P5"><text:span text:style-name="T18">Zapisz strukturę pierwszego raportu meczowego w markdown.</text:span></text:p>
          </table:table-cell>
        </table:table-row>
        <table:table-row table:style-name="Table40.1">
          <table:table-cell table:style-name="Table40.A3" office:value-type="string">
            <text:p text:style-name="P5"><text:span text:style-name="T19">GITHUB / PORTFOLIO</text:span></text:p>
          </table:table-cell>
          <table:table-cell table:style-name="Table40.A3" office:value-type="string">
            <text:p text:style-name="P5"><text:span text:style-name="T18">Załóż lub uporządkuj repozytorium FALCON.</text:span></text:p>
          </table:table-cell>
        </table:table-row>
        <table:table-row table:style-name="Table40.1">
          <table:table-cell table:style-name="Table40.A6" office:value-type="string">
            <text:p text:style-name="P5"><text:span text:style-name="T19">EFEKT DNIA</text:span></text:p>
          </table:table-cell>
          <table:table-cell table:style-name="Table40.A6" office:value-type="string">
            <text:p text:style-name="P5"><text:span text:style-name="T18">GitHub gotowy do pracy.</text:span></text:p>
          </table:table-cell>
        </table:table-row>
        <table:table-row table:style-name="Table40.1">
          <table:table-cell table:style-name="Table40.A7" office:value-type="string">
            <text:p text:style-name="P5"><text:span text:style-name="T19">MINIMUM DNIA</text:span></text:p>
          </table:table-cell>
          <table:table-cell table:style-name="Table4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5"><text:span text:style-name="T11">NOTATKA DNIA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6/60 <text:s/>■■■■■□□□□□□□□□□□□□□□</text:span></text:p>
      <text:p text:style-name="Standard"><text:span text:style-name="T7">DAY 16</text:span></text:p>
      <text:p text:style-name="Standard"><text:span text:style-name="T17">Tydzień 3 | Cel dnia: Zacząć pracę z pandas.</text:span></text:p>
      <text:p text:style-name="P3"/>
      <table:table table:name="Table42" table:style-name="Table42">
        <table:table-column table:style-name="Table42.A" table:number-columns-repeated="2"/>
        <table:table-row table:style-name="Table42.1">
          <table:table-cell table:style-name="Table42.A1" office:value-type="string">
            <text:p text:style-name="P5"><text:span text:style-name="T15">AI TASKI</text:span></text:p>
          </table:table-cell>
          <table:table-cell table:style-name="Table4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42.1">
          <table:table-cell table:style-name="Table42.A2" office:value-type="string">
            <text:p text:style-name="P5"><text:span text:style-name="T19">SQL</text:span></text:p>
          </table:table-cell>
          <table:table-cell table:style-name="Table42.A2" office:value-type="string">
            <text:p text:style-name="P5"><text:span text:style-name="T18">GROUP BY + JOIN - proste pytania analityczne.</text:span></text:p>
          </table:table-cell>
        </table:table-row>
        <table:table-row table:style-name="Table42.1">
          <table:table-cell table:style-name="Table42.A3" office:value-type="string">
            <text:p text:style-name="P5"><text:span text:style-name="T19">PYTHON</text:span></text:p>
          </table:table-cell>
          <table:table-cell table:style-name="Table42.A3" office:value-type="string">
            <text:p text:style-name="P5"><text:span text:style-name="T18">pandas: DataFrame, read_csv, head.</text:span></text:p>
          </table:table-cell>
        </table:table-row>
        <table:table-row table:style-name="Table42.1">
          <table:table-cell table:style-name="Table42.A4" office:value-type="string">
            <text:p text:style-name="P5"><text:span text:style-name="T19">FOOTBALL</text:span></text:p>
          </table:table-cell>
          <table:table-cell table:style-name="Table42.A4" office:value-type="string">
            <text:p text:style-name="P5"><text:span text:style-name="T18">Wczytaj lub opisz ręcznie prosty CSV piłkarski.</text:span></text:p>
          </table:table-cell>
        </table:table-row>
        <table:table-row table:style-name="Table42.1">
          <table:table-cell table:style-name="Table42.A3" office:value-type="string">
            <text:p text:style-name="P5"><text:span text:style-name="T19">GITHUB / PORTFOLIO</text:span></text:p>
          </table:table-cell>
          <table:table-cell table:style-name="Table42.A3" office:value-type="string">
            <text:p text:style-name="P5"><text:span text:style-name="T18">Dodaj folder Python/notebooks.</text:span></text:p>
          </table:table-cell>
        </table:table-row>
        <table:table-row table:style-name="Table42.1">
          <table:table-cell table:style-name="Table42.A6" office:value-type="string">
            <text:p text:style-name="P5"><text:span text:style-name="T19">EFEKT DNIA</text:span></text:p>
          </table:table-cell>
          <table:table-cell table:style-name="Table42.A6" office:value-type="string">
            <text:p text:style-name="P5"><text:span text:style-name="T18">Pierwszy kontakt z pandas.</text:span></text:p>
          </table:table-cell>
        </table:table-row>
        <table:table-row table:style-name="Table42.1">
          <table:table-cell table:style-name="Table42.A7" office:value-type="string">
            <text:p text:style-name="P5"><text:span text:style-name="T19">MINIMUM DNIA</text:span></text:p>
          </table:table-cell>
          <table:table-cell table:style-name="Table4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5"><text:span text:style-name="T11">NOTATKA DNIA</text:span></text:p>
          </table:table-cell>
        </table:table-row>
        <table:table-row table:style-name="Table43.1">
          <table:table-cell table:style-name="Table4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7/60 <text:s/>■■■■■■□□□□□□□□□□□□□□</text:span></text:p>
      <text:p text:style-name="Standard"><text:span text:style-name="T7">DAY 17</text:span></text:p>
      <text:p text:style-name="Standard"><text:span text:style-name="T17">Tydzień 3 | Cel dnia: Przekształcić plik CSV w analizę.</text:span></text:p>
      <text:p text:style-name="P3"/>
      <table:table table:name="Table44" table:style-name="Table44">
        <table:table-column table:style-name="Table44.A" table:number-columns-repeated="2"/>
        <table:table-row table:style-name="Table44.1">
          <table:table-cell table:style-name="Table44.A1" office:value-type="string">
            <text:p text:style-name="P5"><text:span text:style-name="T15">AI TASKI</text:span></text:p>
          </table:table-cell>
          <table:table-cell table:style-name="Table4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44.1">
          <table:table-cell table:style-name="Table44.A2" office:value-type="string">
            <text:p text:style-name="P5"><text:span text:style-name="T19">SQL</text:span></text:p>
          </table:table-cell>
          <table:table-cell table:style-name="Table44.A2" office:value-type="string">
            <text:p text:style-name="P5"><text:span text:style-name="T18">COUNT + GROUP BY na danych zawodników lub meczów.</text:span></text:p>
          </table:table-cell>
        </table:table-row>
        <table:table-row table:style-name="Table44.1">
          <table:table-cell table:style-name="Table44.A3" office:value-type="string">
            <text:p text:style-name="P5"><text:span text:style-name="T19">PYTHON</text:span></text:p>
          </table:table-cell>
          <table:table-cell table:style-name="Table44.A3" office:value-type="string">
            <text:p text:style-name="P5"><text:span text:style-name="T18">pandas: filtrowanie wierszy.</text:span></text:p>
          </table:table-cell>
        </table:table-row>
        <table:table-row table:style-name="Table44.1">
          <table:table-cell table:style-name="Table44.A4" office:value-type="string">
            <text:p text:style-name="P5"><text:span text:style-name="T19">FOOTBALL</text:span></text:p>
          </table:table-cell>
          <table:table-cell table:style-name="Table44.A4" office:value-type="string">
            <text:p text:style-name="P5"><text:span text:style-name="T18">Zapisz 3 pytania, które zadasz swojemu datasetowi.</text:span></text:p>
          </table:table-cell>
        </table:table-row>
        <table:table-row table:style-name="Table44.1">
          <table:table-cell table:style-name="Table44.A3" office:value-type="string">
            <text:p text:style-name="P5"><text:span text:style-name="T19">GITHUB / PORTFOLIO</text:span></text:p>
          </table:table-cell>
          <table:table-cell table:style-name="Table44.A3" office:value-type="string">
            <text:p text:style-name="P5"><text:span text:style-name="T18">Dodaj README do folderu SQL.</text:span></text:p>
          </table:table-cell>
        </table:table-row>
        <table:table-row table:style-name="Table44.1">
          <table:table-cell table:style-name="Table44.A6" office:value-type="string">
            <text:p text:style-name="P5"><text:span text:style-name="T19">EFEKT DNIA</text:span></text:p>
          </table:table-cell>
          <table:table-cell table:style-name="Table44.A6" office:value-type="string">
            <text:p text:style-name="P5"><text:span text:style-name="T18">Pierwsze pytania do danych.</text:span></text:p>
          </table:table-cell>
        </table:table-row>
        <table:table-row table:style-name="Table44.1">
          <table:table-cell table:style-name="Table44.A7" office:value-type="string">
            <text:p text:style-name="P5"><text:span text:style-name="T19">MINIMUM DNIA</text:span></text:p>
          </table:table-cell>
          <table:table-cell table:style-name="Table4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5"><text:span text:style-name="T11">NOTATKA DNIA</text:span></text:p>
          </table:table-cell>
        </table:table-row>
        <table:table-row table:style-name="Table45.1">
          <table:table-cell table:style-name="Table4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8/60 <text:s/>■■■■■■□□□□□□□□□□□□□□</text:span></text:p>
      <text:p text:style-name="Standard"><text:span text:style-name="T7">DAY 18</text:span></text:p>
      <text:p text:style-name="Standard"><text:span text:style-name="T17">Tydzień 3 | Cel dnia: Zrobić pierwszy mini-projekt SQL.</text:span></text:p>
      <text:p text:style-name="P3"/>
      <table:table table:name="Table46" table:style-name="Table46">
        <table:table-column table:style-name="Table46.A" table:number-columns-repeated="2"/>
        <table:table-row table:style-name="Table46.1">
          <table:table-cell table:style-name="Table46.A1" office:value-type="string">
            <text:p text:style-name="P5"><text:span text:style-name="T15">AI TASKI</text:span></text:p>
          </table:table-cell>
          <table:table-cell table:style-name="Table4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46.1">
          <table:table-cell table:style-name="Table46.A2" office:value-type="string">
            <text:p text:style-name="P5"><text:span text:style-name="T19">SQL</text:span></text:p>
          </table:table-cell>
          <table:table-cell table:style-name="Table46.A2" office:value-type="string">
            <text:p text:style-name="P5"><text:span text:style-name="T18">Projekt: 20 zapytań do datasetu players/matches.</text:span></text:p>
          </table:table-cell>
        </table:table-row>
        <table:table-row table:style-name="Table46.1">
          <table:table-cell table:style-name="Table46.A3" office:value-type="string">
            <text:p text:style-name="P5"><text:span text:style-name="T19">PYTHON</text:span></text:p>
          </table:table-cell>
          <table:table-cell table:style-name="Table46.A3" office:value-type="string">
            <text:p text:style-name="P5"><text:span text:style-name="T18">pandas: sort_values, describe.</text:span></text:p>
          </table:table-cell>
        </table:table-row>
        <table:table-row table:style-name="Table46.1">
          <table:table-cell table:style-name="Table46.A4" office:value-type="string">
            <text:p text:style-name="P5"><text:span text:style-name="T19">FOOTBALL</text:span></text:p>
          </table:table-cell>
          <table:table-cell table:style-name="Table46.A4" office:value-type="string">
            <text:p text:style-name="P5"><text:span text:style-name="T18">Połącz liczby z prostym wnioskiem piłkarskim.</text:span></text:p>
          </table:table-cell>
        </table:table-row>
        <table:table-row table:style-name="Table46.1">
          <table:table-cell table:style-name="Table46.A3" office:value-type="string">
            <text:p text:style-name="P5"><text:span text:style-name="T19">GITHUB / PORTFOLIO</text:span></text:p>
          </table:table-cell>
          <table:table-cell table:style-name="Table46.A3" office:value-type="string">
            <text:p text:style-name="P5"><text:span text:style-name="T18">Zapisz sql_mini_project_v0.md.</text:span></text:p>
          </table:table-cell>
        </table:table-row>
        <table:table-row table:style-name="Table46.1">
          <table:table-cell table:style-name="Table46.A6" office:value-type="string">
            <text:p text:style-name="P5"><text:span text:style-name="T19">EFEKT DNIA</text:span></text:p>
          </table:table-cell>
          <table:table-cell table:style-name="Table46.A6" office:value-type="string">
            <text:p text:style-name="P5"><text:span text:style-name="T18">SQL mini-project draft.</text:span></text:p>
          </table:table-cell>
        </table:table-row>
        <table:table-row table:style-name="Table46.1">
          <table:table-cell table:style-name="Table46.A7" office:value-type="string">
            <text:p text:style-name="P5"><text:span text:style-name="T19">MINIMUM DNIA</text:span></text:p>
          </table:table-cell>
          <table:table-cell table:style-name="Table4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5"><text:span text:style-name="T11">NOTATKA DNIA</text:span></text:p>
          </table:table-cell>
        </table:table-row>
        <table:table-row table:style-name="Table47.1">
          <table:table-cell table:style-name="Table4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19/60 <text:s/>■■■■■■□□□□□□□□□□□□□□</text:span></text:p>
      <text:p text:style-name="Standard"><text:span text:style-name="T7">DAY 19</text:span></text:p>
      <text:p text:style-name="Standard"><text:span text:style-name="T17">Tydzień 3 | Cel dnia: Zrobić pierwszy prosty wykres.</text:span></text:p>
      <text:p text:style-name="P3"/>
      <table:table table:name="Table48" table:style-name="Table48">
        <table:table-column table:style-name="Table48.A" table:number-columns-repeated="2"/>
        <table:table-row table:style-name="Table48.1">
          <table:table-cell table:style-name="Table48.A1" office:value-type="string">
            <text:p text:style-name="P5"><text:span text:style-name="T15">AI TASKI</text:span></text:p>
          </table:table-cell>
          <table:table-cell table:style-name="Table4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48.1">
          <table:table-cell table:style-name="Table48.A2" office:value-type="string">
            <text:p text:style-name="P5"><text:span text:style-name="T19">SQL</text:span></text:p>
          </table:table-cell>
          <table:table-cell table:style-name="Table48.A2" office:value-type="string">
            <text:p text:style-name="P5"><text:span text:style-name="T18">HAVING - filtr po grupach.</text:span></text:p>
          </table:table-cell>
        </table:table-row>
        <table:table-row table:style-name="Table48.1">
          <table:table-cell table:style-name="Table48.A3" office:value-type="string">
            <text:p text:style-name="P5"><text:span text:style-name="T19">PYTHON</text:span></text:p>
          </table:table-cell>
          <table:table-cell table:style-name="Table48.A3" office:value-type="string">
            <text:p text:style-name="P5"><text:span text:style-name="T18">matplotlib: pierwszy wykres słupkowy.</text:span></text:p>
          </table:table-cell>
        </table:table-row>
        <table:table-row table:style-name="Table48.1">
          <table:table-cell table:style-name="Table48.A4" office:value-type="string">
            <text:p text:style-name="P5"><text:span text:style-name="T19">FOOTBALL</text:span></text:p>
          </table:table-cell>
          <table:table-cell table:style-name="Table48.A4" office:value-type="string">
            <text:p text:style-name="P5"><text:span text:style-name="T18">Wybierz jedną metrykę i zrób jej prostą wizualizację.</text:span></text:p>
          </table:table-cell>
        </table:table-row>
        <table:table-row table:style-name="Table48.1">
          <table:table-cell table:style-name="Table48.A3" office:value-type="string">
            <text:p text:style-name="P5"><text:span text:style-name="T19">GITHUB / PORTFOLIO</text:span></text:p>
          </table:table-cell>
          <table:table-cell table:style-name="Table48.A3" office:value-type="string">
            <text:p text:style-name="P5"><text:span text:style-name="T18">Dodaj wykres lub screenshot do folderu Dashboards.</text:span></text:p>
          </table:table-cell>
        </table:table-row>
        <table:table-row table:style-name="Table48.1">
          <table:table-cell table:style-name="Table48.A6" office:value-type="string">
            <text:p text:style-name="P5"><text:span text:style-name="T19">EFEKT DNIA</text:span></text:p>
          </table:table-cell>
          <table:table-cell table:style-name="Table48.A6" office:value-type="string">
            <text:p text:style-name="P5"><text:span text:style-name="T18">Pierwszy wykres.</text:span></text:p>
          </table:table-cell>
        </table:table-row>
        <table:table-row table:style-name="Table48.1">
          <table:table-cell table:style-name="Table48.A7" office:value-type="string">
            <text:p text:style-name="P5"><text:span text:style-name="T19">MINIMUM DNIA</text:span></text:p>
          </table:table-cell>
          <table:table-cell table:style-name="Table4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5"><text:span text:style-name="T11">NOTATKA DNIA</text:span></text:p>
          </table:table-cell>
        </table:table-row>
        <table:table-row table:style-name="Table49.1">
          <table:table-cell table:style-name="Table4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0/60 <text:s/>■■■■■■■□□□□□□□□□□□□□</text:span></text:p>
      <text:p text:style-name="Standard"><text:span text:style-name="T7">DAY 20</text:span></text:p>
      <text:p text:style-name="Standard"><text:span text:style-name="T17">Tydzień 3 | Cel dnia: Ubrać projekt w opis.</text:span></text:p>
      <text:p text:style-name="P3"/>
      <table:table table:name="Table50" table:style-name="Table50">
        <table:table-column table:style-name="Table50.A" table:number-columns-repeated="2"/>
        <table:table-row table:style-name="Table50.1">
          <table:table-cell table:style-name="Table50.A1" office:value-type="string">
            <text:p text:style-name="P5"><text:span text:style-name="T15">AI TASKI</text:span></text:p>
          </table:table-cell>
          <table:table-cell table:style-name="Table5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50.1">
          <table:table-cell table:style-name="Table50.A2" office:value-type="string">
            <text:p text:style-name="P5"><text:span text:style-name="T19">SQL</text:span></text:p>
          </table:table-cell>
          <table:table-cell table:style-name="Table50.A2" office:value-type="string">
            <text:p text:style-name="P5"><text:span text:style-name="T18">Popraw 5 zapytań SQL i dodaj komentarze.</text:span></text:p>
          </table:table-cell>
        </table:table-row>
        <table:table-row table:style-name="Table50.1">
          <table:table-cell table:style-name="Table50.A3" office:value-type="string">
            <text:p text:style-name="P5"><text:span text:style-name="T19">PYTHON</text:span></text:p>
          </table:table-cell>
          <table:table-cell table:style-name="Table50.A3" office:value-type="string">
            <text:p text:style-name="P5"><text:span text:style-name="T18">Dodaj komentarze do kodu Pythona.</text:span></text:p>
          </table:table-cell>
        </table:table-row>
        <table:table-row table:style-name="Table50.1">
          <table:table-cell table:style-name="Table50.A4" office:value-type="string">
            <text:p text:style-name="P5"><text:span text:style-name="T19">FOOTBALL</text:span></text:p>
          </table:table-cell>
          <table:table-cell table:style-name="Table50.A4" office:value-type="string">
            <text:p text:style-name="P5"><text:span text:style-name="T18">Napisz 5 zdań: co pokazuje projekt.</text:span></text:p>
          </table:table-cell>
        </table:table-row>
        <table:table-row table:style-name="Table50.1">
          <table:table-cell table:style-name="Table50.A3" office:value-type="string">
            <text:p text:style-name="P5"><text:span text:style-name="T19">GITHUB / PORTFOLIO</text:span></text:p>
          </table:table-cell>
          <table:table-cell table:style-name="Table50.A3" office:value-type="string">
            <text:p text:style-name="P5"><text:span text:style-name="T18">Utwórz README dla pierwszego mini-projektu.</text:span></text:p>
          </table:table-cell>
        </table:table-row>
        <table:table-row table:style-name="Table50.1">
          <table:table-cell table:style-name="Table50.A6" office:value-type="string">
            <text:p text:style-name="P5"><text:span text:style-name="T19">EFEKT DNIA</text:span></text:p>
          </table:table-cell>
          <table:table-cell table:style-name="Table50.A6" office:value-type="string">
            <text:p text:style-name="P5"><text:span text:style-name="T18">Projekt zaczyna wyglądać publicznie.</text:span></text:p>
          </table:table-cell>
        </table:table-row>
        <table:table-row table:style-name="Table50.1">
          <table:table-cell table:style-name="Table50.A7" office:value-type="string">
            <text:p text:style-name="P5"><text:span text:style-name="T19">MINIMUM DNIA</text:span></text:p>
          </table:table-cell>
          <table:table-cell table:style-name="Table5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5"><text:span text:style-name="T11">NOTATKA DNIA</text:span></text:p>
          </table:table-cell>
        </table:table-row>
        <table:table-row table:style-name="Table51.1">
          <table:table-cell table:style-name="Table5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1/60 <text:s/>■■■■■■■□□□□□□□□□□□□□</text:span></text:p>
      <text:p text:style-name="Standard"><text:span text:style-name="T7">DAY 21</text:span></text:p>
      <text:p text:style-name="Standard"><text:span text:style-name="T17">Tydzień 3 | Cel dnia: Zamknąć tydzień 3 i opublikować część pracy.</text:span></text:p>
      <text:p text:style-name="P3"/>
      <table:table table:name="Table52" table:style-name="Table52">
        <table:table-column table:style-name="Table52.A" table:number-columns-repeated="2"/>
        <table:table-row table:style-name="Table52.1">
          <table:table-cell table:style-name="Table52.A1" office:value-type="string">
            <text:p text:style-name="P5"><text:span text:style-name="T15">AI TASKI</text:span></text:p>
          </table:table-cell>
          <table:table-cell table:style-name="Table5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52.1">
          <table:table-cell table:style-name="Table52.A2" office:value-type="string">
            <text:p text:style-name="P5"><text:span text:style-name="T19">SQL</text:span></text:p>
          </table:table-cell>
          <table:table-cell table:style-name="Table52.A2" office:value-type="string">
            <text:p text:style-name="P5"><text:span text:style-name="T18">Powtórka SQL z tygodnia.</text:span></text:p>
          </table:table-cell>
        </table:table-row>
        <table:table-row table:style-name="Table52.1">
          <table:table-cell table:style-name="Table52.A3" office:value-type="string">
            <text:p text:style-name="P5"><text:span text:style-name="T19">PYTHON</text:span></text:p>
          </table:table-cell>
          <table:table-cell table:style-name="Table52.A3" office:value-type="string">
            <text:p text:style-name="P5"><text:span text:style-name="T18">Powtórka pandas i wykresu.</text:span></text:p>
          </table:table-cell>
        </table:table-row>
        <table:table-row table:style-name="Table52.1">
          <table:table-cell table:style-name="Table52.A4" office:value-type="string">
            <text:p text:style-name="P5"><text:span text:style-name="T19">FOOTBALL</text:span></text:p>
          </table:table-cell>
          <table:table-cell table:style-name="Table52.A4" office:value-type="string">
            <text:p text:style-name="P5"><text:span text:style-name="T18">Sprawdź, czy wnioski nie są udawane i mają sens.</text:span></text:p>
          </table:table-cell>
        </table:table-row>
        <table:table-row table:style-name="Table52.1">
          <table:table-cell table:style-name="Table52.A3" office:value-type="string">
            <text:p text:style-name="P5"><text:span text:style-name="T19">GITHUB / PORTFOLIO</text:span></text:p>
          </table:table-cell>
          <table:table-cell table:style-name="Table52.A3" office:value-type="string">
            <text:p text:style-name="P5"><text:span text:style-name="T18">Commit lub lokalny backup.</text:span></text:p>
          </table:table-cell>
        </table:table-row>
        <table:table-row table:style-name="Table52.1">
          <table:table-cell table:style-name="Table52.A6" office:value-type="string">
            <text:p text:style-name="P5"><text:span text:style-name="T19">EFEKT DNIA</text:span></text:p>
          </table:table-cell>
          <table:table-cell table:style-name="Table52.A6" office:value-type="string">
            <text:p text:style-name="P5"><text:span text:style-name="T18">Weekly Review 3 gotowy.</text:span></text:p>
          </table:table-cell>
        </table:table-row>
        <table:table-row table:style-name="Table52.1">
          <table:table-cell table:style-name="Table52.A7" office:value-type="string">
            <text:p text:style-name="P5"><text:span text:style-name="T19">MINIMUM DNIA</text:span></text:p>
          </table:table-cell>
          <table:table-cell table:style-name="Table5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5"><text:span text:style-name="T11">NOTATKA DNIA</text:span></text:p>
          </table:table-cell>
        </table:table-row>
        <table:table-row table:style-name="Table53.1">
          <table:table-cell table:style-name="Table5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3</text:span></text:p>
      <text:p text:style-name="P3"/>
      <text:p text:style-name="P4"><text:span text:style-name="T9">Podsumowanie dni 15-21. Bez bajek, bez dramatu, bez udawania. Po prostu sprawdzam, co faktycznie zostało zrobione.</text:span></text:p>
      <table:table table:name="Table54" table:style-name="Table54">
        <table:table-column table:style-name="Table54.A" table:number-columns-repeated="2"/>
        <table:table-row table:style-name="Table54.1">
          <table:table-cell table:style-name="Table54.A1" office:value-type="string">
            <text:p text:style-name="P5"><text:span text:style-name="T20">Pytanie</text:span></text:p>
          </table:table-cell>
          <table:table-cell table:style-name="Table54.A1" office:value-type="string">
            <text:p text:style-name="P5"><text:span text:style-name="T20">Odpowiedź</text:span></text:p>
          </table:table-cell>
        </table:table-row>
        <table:table-row table:style-name="Table54.1">
          <table:table-cell table:style-name="Table54.A2" office:value-type="string">
            <text:p text:style-name="P5">Co zrobiłem w tym tygodniu?</text:p>
          </table:table-cell>
          <table:table-cell table:style-name="Table54.B2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Czego się nauczyłem?</text:p>
          </table:table-cell>
          <table:table-cell table:style-name="Table54.B3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Co było najtrudniejsze?</text:p>
          </table:table-cell>
          <table:table-cell table:style-name="Table54.B4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Ile zrobiłem AI tasków?</text:p>
          </table:table-cell>
          <table:table-cell table:style-name="Table54.B5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Ile czasu poświęciłem na SQL?</text:p>
          </table:table-cell>
          <table:table-cell table:style-name="Table54.B6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Ile czasu poświęciłem na Python?</text:p>
          </table:table-cell>
          <table:table-cell table:style-name="Table54.B7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Co dodałem do GitHuba/portfolio?</text:p>
          </table:table-cell>
          <table:table-cell table:style-name="Table54.B8" office:value-type="string">
            <text:p text:style-name="P5"/>
          </table:table-cell>
        </table:table-row>
        <table:table-row table:style-name="Table54.1">
          <table:table-cell table:style-name="Table54.A2" office:value-type="string">
            <text:p text:style-name="P5">Co poprawiam w kolejnym tygodniu?</text:p>
          </table:table-cell>
          <table:table-cell table:style-name="Table54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4: PIERWSZE RAPORTY</text:span></text:p>
      <text:p text:style-name="P3"/>
      <text:p text:style-name="P4"><text:span text:style-name="T9">Od nauki do efektu: pierwszy raport meczowy i pierwszy projekt SQL.</text:span></text:p>
      <table:table table:name="Table55" table:style-name="Table55">
        <table:table-column table:style-name="Table55.A" table:number-columns-repeated="2"/>
        <table:table-row table:style-name="Table55.1">
          <table:table-cell table:style-name="Table55.A1" office:value-type="string">
            <text:p text:style-name="P5"><text:span text:style-name="T13">Cel tygodnia</text:span></text:p>
          </table:table-cell>
          <table:table-cell table:style-name="Table55.B1" office:value-type="string">
            <text:p text:style-name="P5"><text:span text:style-name="T12">Pierwszy raport meczowy, profil zawodnika i domknięcie mini-projektów.</text:span></text:p>
          </table:table-cell>
        </table:table-row>
        <table:table-row table:style-name="Table55.1">
          <table:table-cell table:style-name="Table55.A2" office:value-type="string">
            <text:p text:style-name="P5"><text:span text:style-name="T13">Efekt końcowy</text:span></text:p>
          </table:table-cell>
          <table:table-cell table:style-name="Table55.B1" office:value-type="string">
            <text:p text:style-name="P5"><text:span text:style-name="T12">Pierwsze realne materiały portfolio.</text:span></text:p>
          </table:table-cell>
        </table:table-row>
      </table:table>
      <text:p text:style-name="Standard"/>
      <text:p text:style-name="P7"><text:span text:style-name="T16">Day 22/60 <text:s/>■■■■■■■□□□□□□□□□□□□□</text:span></text:p>
      <text:p text:style-name="Standard"><text:span text:style-name="T7">DAY 22</text:span></text:p>
      <text:p text:style-name="Standard"><text:span text:style-name="T17">Tydzień 4 | Cel dnia: Zacząć pierwszy raport meczowy.</text:span></text:p>
      <text:p text:style-name="P3"/>
      <table:table table:name="Table56" table:style-name="Table56">
        <table:table-column table:style-name="Table56.A" table:number-columns-repeated="2"/>
        <table:table-row table:style-name="Table56.1">
          <table:table-cell table:style-name="Table56.A1" office:value-type="string">
            <text:p text:style-name="P5"><text:span text:style-name="T15">AI TASKI</text:span></text:p>
          </table:table-cell>
          <table:table-cell table:style-name="Table5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56.1">
          <table:table-cell table:style-name="Table56.A2" office:value-type="string">
            <text:p text:style-name="P5"><text:span text:style-name="T19">SQL</text:span></text:p>
          </table:table-cell>
          <table:table-cell table:style-name="Table56.A2" office:value-type="string">
            <text:p text:style-name="P5"><text:span text:style-name="T18">SQL: 10 zapytań powtórkowych.</text:span></text:p>
          </table:table-cell>
        </table:table-row>
        <table:table-row table:style-name="Table56.1">
          <table:table-cell table:style-name="Table56.A3" office:value-type="string">
            <text:p text:style-name="P5"><text:span text:style-name="T19">PYTHON</text:span></text:p>
          </table:table-cell>
          <table:table-cell table:style-name="Table56.A3" office:value-type="string">
            <text:p text:style-name="P5"><text:span text:style-name="T18">Python: odczyt i filtrowanie CSV.</text:span></text:p>
          </table:table-cell>
        </table:table-row>
        <table:table-row table:style-name="Table56.1">
          <table:table-cell table:style-name="Table56.A4" office:value-type="string">
            <text:p text:style-name="P5"><text:span text:style-name="T19">FOOTBALL</text:span></text:p>
          </table:table-cell>
          <table:table-cell table:style-name="Table56.A4" office:value-type="string">
            <text:p text:style-name="P5"><text:span text:style-name="T18">Wybierz mecz i opisz kontekst: drużyny, wynik, cel analizy.</text:span></text:p>
          </table:table-cell>
        </table:table-row>
        <table:table-row table:style-name="Table56.1">
          <table:table-cell table:style-name="Table56.A3" office:value-type="string">
            <text:p text:style-name="P5"><text:span text:style-name="T19">GITHUB / PORTFOLIO</text:span></text:p>
          </table:table-cell>
          <table:table-cell table:style-name="Table56.A3" office:value-type="string">
            <text:p text:style-name="P5"><text:span text:style-name="T18">Utwórz folder Match_Report_01.</text:span></text:p>
          </table:table-cell>
        </table:table-row>
        <table:table-row table:style-name="Table56.1">
          <table:table-cell table:style-name="Table56.A6" office:value-type="string">
            <text:p text:style-name="P5"><text:span text:style-name="T19">EFEKT DNIA</text:span></text:p>
          </table:table-cell>
          <table:table-cell table:style-name="Table56.A6" office:value-type="string">
            <text:p text:style-name="P5"><text:span text:style-name="T18">Raport meczowy wystartował.</text:span></text:p>
          </table:table-cell>
        </table:table-row>
        <table:table-row table:style-name="Table56.1">
          <table:table-cell table:style-name="Table56.A7" office:value-type="string">
            <text:p text:style-name="P5"><text:span text:style-name="T19">MINIMUM DNIA</text:span></text:p>
          </table:table-cell>
          <table:table-cell table:style-name="Table5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5"><text:span text:style-name="T11">NOTATKA DNIA</text:span></text:p>
          </table:table-cell>
        </table:table-row>
        <table:table-row table:style-name="Table57.1">
          <table:table-cell table:style-name="Table5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3/60 <text:s/>■■■■■■■■□□□□□□□□□□□□</text:span></text:p>
      <text:p text:style-name="Standard"><text:span text:style-name="T7">DAY 23</text:span></text:p>
      <text:p text:style-name="Standard"><text:span text:style-name="T17">Tydzień 4 | Cel dnia: Opisać strukturę taktyczną.</text:span></text:p>
      <text:p text:style-name="P3"/>
      <table:table table:name="Table58" table:style-name="Table58">
        <table:table-column table:style-name="Table58.A" table:number-columns-repeated="2"/>
        <table:table-row table:style-name="Table58.1">
          <table:table-cell table:style-name="Table58.A1" office:value-type="string">
            <text:p text:style-name="P5"><text:span text:style-name="T15">AI TASKI</text:span></text:p>
          </table:table-cell>
          <table:table-cell table:style-name="Table5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58.1">
          <table:table-cell table:style-name="Table58.A2" office:value-type="string">
            <text:p text:style-name="P5"><text:span text:style-name="T19">SQL</text:span></text:p>
          </table:table-cell>
          <table:table-cell table:style-name="Table58.A2" office:value-type="string">
            <text:p text:style-name="P5"><text:span text:style-name="T18">SQL: JOIN praktyka na danych meczowych.</text:span></text:p>
          </table:table-cell>
        </table:table-row>
        <table:table-row table:style-name="Table58.1">
          <table:table-cell table:style-name="Table58.A3" office:value-type="string">
            <text:p text:style-name="P5"><text:span text:style-name="T19">PYTHON</text:span></text:p>
          </table:table-cell>
          <table:table-cell table:style-name="Table58.A3" office:value-type="string">
            <text:p text:style-name="P5"><text:span text:style-name="T18">Python: prosty filtr danych.</text:span></text:p>
          </table:table-cell>
        </table:table-row>
        <table:table-row table:style-name="Table58.1">
          <table:table-cell table:style-name="Table58.A4" office:value-type="string">
            <text:p text:style-name="P5"><text:span text:style-name="T19">FOOTBALL</text:span></text:p>
          </table:table-cell>
          <table:table-cell table:style-name="Table58.A4" office:value-type="string">
            <text:p text:style-name="P5"><text:span text:style-name="T18">Opisz ustawienia, pressing, fazy gry i przejścia.</text:span></text:p>
          </table:table-cell>
        </table:table-row>
        <table:table-row table:style-name="Table58.1">
          <table:table-cell table:style-name="Table58.A3" office:value-type="string">
            <text:p text:style-name="P5"><text:span text:style-name="T19">GITHUB / PORTFOLIO</text:span></text:p>
          </table:table-cell>
          <table:table-cell table:style-name="Table58.A3" office:value-type="string">
            <text:p text:style-name="P5"><text:span text:style-name="T18">Dodaj tactical_notes.md.</text:span></text:p>
          </table:table-cell>
        </table:table-row>
        <table:table-row table:style-name="Table58.1">
          <table:table-cell table:style-name="Table58.A6" office:value-type="string">
            <text:p text:style-name="P5"><text:span text:style-name="T19">EFEKT DNIA</text:span></text:p>
          </table:table-cell>
          <table:table-cell table:style-name="Table58.A6" office:value-type="string">
            <text:p text:style-name="P5"><text:span text:style-name="T18">Sekcja taktyczna raportu.</text:span></text:p>
          </table:table-cell>
        </table:table-row>
        <table:table-row table:style-name="Table58.1">
          <table:table-cell table:style-name="Table58.A7" office:value-type="string">
            <text:p text:style-name="P5"><text:span text:style-name="T19">MINIMUM DNIA</text:span></text:p>
          </table:table-cell>
          <table:table-cell table:style-name="Table5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5"><text:span text:style-name="T11">NOTATKA DNIA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4/60 <text:s/>■■■■■■■■□□□□□□□□□□□□</text:span></text:p>
      <text:p text:style-name="Standard"><text:span text:style-name="T7">DAY 24</text:span></text:p>
      <text:p text:style-name="Standard"><text:span text:style-name="T17">Tydzień 4 | Cel dnia: Dodać dane do obserwacji.</text:span></text:p>
      <text:p text:style-name="P3"/>
      <table:table table:name="Table60" table:style-name="Table60">
        <table:table-column table:style-name="Table60.A" table:number-columns-repeated="2"/>
        <table:table-row table:style-name="Table60.1">
          <table:table-cell table:style-name="Table60.A1" office:value-type="string">
            <text:p text:style-name="P5"><text:span text:style-name="T15">AI TASKI</text:span></text:p>
          </table:table-cell>
          <table:table-cell table:style-name="Table6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60.1">
          <table:table-cell table:style-name="Table60.A2" office:value-type="string">
            <text:p text:style-name="P5"><text:span text:style-name="T19">SQL</text:span></text:p>
          </table:table-cell>
          <table:table-cell table:style-name="Table60.A2" office:value-type="string">
            <text:p text:style-name="P5"><text:span text:style-name="T18">SQL: agregacja po drużynie lub zawodniku.</text:span></text:p>
          </table:table-cell>
        </table:table-row>
        <table:table-row table:style-name="Table60.1">
          <table:table-cell table:style-name="Table60.A3" office:value-type="string">
            <text:p text:style-name="P5"><text:span text:style-name="T19">PYTHON</text:span></text:p>
          </table:table-cell>
          <table:table-cell table:style-name="Table60.A3" office:value-type="string">
            <text:p text:style-name="P5"><text:span text:style-name="T18">Python: podstawowe statystyki z CSV.</text:span></text:p>
          </table:table-cell>
        </table:table-row>
        <table:table-row table:style-name="Table60.1">
          <table:table-cell table:style-name="Table60.A4" office:value-type="string">
            <text:p text:style-name="P5"><text:span text:style-name="T19">FOOTBALL</text:span></text:p>
          </table:table-cell>
          <table:table-cell table:style-name="Table60.A4" office:value-type="string">
            <text:p text:style-name="P5"><text:span text:style-name="T18">Dopisz dane wspierające 2-3 obserwacje.</text:span></text:p>
          </table:table-cell>
        </table:table-row>
        <table:table-row table:style-name="Table60.1">
          <table:table-cell table:style-name="Table60.A3" office:value-type="string">
            <text:p text:style-name="P5"><text:span text:style-name="T19">GITHUB / PORTFOLIO</text:span></text:p>
          </table:table-cell>
          <table:table-cell table:style-name="Table60.A3" office:value-type="string">
            <text:p text:style-name="P5"><text:span text:style-name="T18">Dodaj data_context.md.</text:span></text:p>
          </table:table-cell>
        </table:table-row>
        <table:table-row table:style-name="Table60.1">
          <table:table-cell table:style-name="Table60.A6" office:value-type="string">
            <text:p text:style-name="P5"><text:span text:style-name="T19">EFEKT DNIA</text:span></text:p>
          </table:table-cell>
          <table:table-cell table:style-name="Table60.A6" office:value-type="string">
            <text:p text:style-name="P5"><text:span text:style-name="T18">Raport ma dane, nie tylko opinię.</text:span></text:p>
          </table:table-cell>
        </table:table-row>
        <table:table-row table:style-name="Table60.1">
          <table:table-cell table:style-name="Table60.A7" office:value-type="string">
            <text:p text:style-name="P5"><text:span text:style-name="T19">MINIMUM DNIA</text:span></text:p>
          </table:table-cell>
          <table:table-cell table:style-name="Table6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p text:style-name="P5"><text:span text:style-name="T11">NOTATKA DNIA</text:span></text:p>
          </table:table-cell>
        </table:table-row>
        <table:table-row table:style-name="Table61.1">
          <table:table-cell table:style-name="Table6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5/60 <text:s/>■■■■■■■■□□□□□□□□□□□□</text:span></text:p>
      <text:p text:style-name="Standard"><text:span text:style-name="T7">DAY 25</text:span></text:p>
      <text:p text:style-name="Standard"><text:span text:style-name="T17">Tydzień 4 | Cel dnia: Zacząć pierwszy profil zawodnika.</text:span></text:p>
      <text:p text:style-name="P3"/>
      <table:table table:name="Table62" table:style-name="Table62">
        <table:table-column table:style-name="Table62.A" table:number-columns-repeated="2"/>
        <table:table-row table:style-name="Table62.1">
          <table:table-cell table:style-name="Table62.A1" office:value-type="string">
            <text:p text:style-name="P5"><text:span text:style-name="T15">AI TASKI</text:span></text:p>
          </table:table-cell>
          <table:table-cell table:style-name="Table6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62.1">
          <table:table-cell table:style-name="Table62.A2" office:value-type="string">
            <text:p text:style-name="P5"><text:span text:style-name="T19">SQL</text:span></text:p>
          </table:table-cell>
          <table:table-cell table:style-name="Table62.A2" office:value-type="string">
            <text:p text:style-name="P5"><text:span text:style-name="T18">SQL: pytania o jednego zawodnika.</text:span></text:p>
          </table:table-cell>
        </table:table-row>
        <table:table-row table:style-name="Table62.1">
          <table:table-cell table:style-name="Table62.A3" office:value-type="string">
            <text:p text:style-name="P5"><text:span text:style-name="T19">PYTHON</text:span></text:p>
          </table:table-cell>
          <table:table-cell table:style-name="Table62.A3" office:value-type="string">
            <text:p text:style-name="P5"><text:span text:style-name="T18">Python: wybór rekordów dla jednego zawodnika.</text:span></text:p>
          </table:table-cell>
        </table:table-row>
        <table:table-row table:style-name="Table62.1">
          <table:table-cell table:style-name="Table62.A4" office:value-type="string">
            <text:p text:style-name="P5"><text:span text:style-name="T19">FOOTBALL</text:span></text:p>
          </table:table-cell>
          <table:table-cell table:style-name="Table62.A4" office:value-type="string">
            <text:p text:style-name="P5"><text:span text:style-name="T18">Opisz rolę, mocne strony i ograniczenia wybranego zawodnika.</text:span></text:p>
          </table:table-cell>
        </table:table-row>
        <table:table-row table:style-name="Table62.1">
          <table:table-cell table:style-name="Table62.A3" office:value-type="string">
            <text:p text:style-name="P5"><text:span text:style-name="T19">GITHUB / PORTFOLIO</text:span></text:p>
          </table:table-cell>
          <table:table-cell table:style-name="Table62.A3" office:value-type="string">
            <text:p text:style-name="P5"><text:span text:style-name="T18">Utwórz Player_Profile_01.</text:span></text:p>
          </table:table-cell>
        </table:table-row>
        <table:table-row table:style-name="Table62.1">
          <table:table-cell table:style-name="Table62.A6" office:value-type="string">
            <text:p text:style-name="P5"><text:span text:style-name="T19">EFEKT DNIA</text:span></text:p>
          </table:table-cell>
          <table:table-cell table:style-name="Table62.A6" office:value-type="string">
            <text:p text:style-name="P5"><text:span text:style-name="T18">Player Profile draft.</text:span></text:p>
          </table:table-cell>
        </table:table-row>
        <table:table-row table:style-name="Table62.1">
          <table:table-cell table:style-name="Table62.A7" office:value-type="string">
            <text:p text:style-name="P5"><text:span text:style-name="T19">MINIMUM DNIA</text:span></text:p>
          </table:table-cell>
          <table:table-cell table:style-name="Table6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5"><text:span text:style-name="T11">NOTATKA DNIA</text:span></text:p>
          </table:table-cell>
        </table:table-row>
        <table:table-row table:style-name="Table63.1">
          <table:table-cell table:style-name="Table6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6/60 <text:s/>■■■■■■■■■□□□□□□□□□□□</text:span></text:p>
      <text:p text:style-name="Standard"><text:span text:style-name="T7">DAY 26</text:span></text:p>
      <text:p text:style-name="Standard"><text:span text:style-name="T17">Tydzień 4 | Cel dnia: Domknąć SQL mini-projekt.</text:span></text:p>
      <text:p text:style-name="P3"/>
      <table:table table:name="Table64" table:style-name="Table64">
        <table:table-column table:style-name="Table64.A" table:number-columns-repeated="2"/>
        <table:table-row table:style-name="Table64.1">
          <table:table-cell table:style-name="Table64.A1" office:value-type="string">
            <text:p text:style-name="P5"><text:span text:style-name="T15">AI TASKI</text:span></text:p>
          </table:table-cell>
          <table:table-cell table:style-name="Table6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64.1">
          <table:table-cell table:style-name="Table64.A2" office:value-type="string">
            <text:p text:style-name="P5"><text:span text:style-name="T19">SQL</text:span></text:p>
          </table:table-cell>
          <table:table-cell table:style-name="Table64.A2" office:value-type="string">
            <text:p text:style-name="P5"><text:span text:style-name="T18">Uporządkuj zapytania, opisy i wyniki.</text:span></text:p>
          </table:table-cell>
        </table:table-row>
        <table:table-row table:style-name="Table64.1">
          <table:table-cell table:style-name="Table64.A3" office:value-type="string">
            <text:p text:style-name="P5"><text:span text:style-name="T19">PYTHON</text:span></text:p>
          </table:table-cell>
          <table:table-cell table:style-name="Table64.A3" office:value-type="string">
            <text:p text:style-name="P5"><text:span text:style-name="T18">Python: odtwórz wykres bez patrzenia w notatki.</text:span></text:p>
          </table:table-cell>
        </table:table-row>
        <table:table-row table:style-name="Table64.1">
          <table:table-cell table:style-name="Table64.A4" office:value-type="string">
            <text:p text:style-name="P5"><text:span text:style-name="T19">FOOTBALL</text:span></text:p>
          </table:table-cell>
          <table:table-cell table:style-name="Table64.A4" office:value-type="string">
            <text:p text:style-name="P5"><text:span text:style-name="T18">Napisz 3 końcowe wnioski z mini-projektu.</text:span></text:p>
          </table:table-cell>
        </table:table-row>
        <table:table-row table:style-name="Table64.1">
          <table:table-cell table:style-name="Table64.A3" office:value-type="string">
            <text:p text:style-name="P5"><text:span text:style-name="T19">GITHUB / PORTFOLIO</text:span></text:p>
          </table:table-cell>
          <table:table-cell table:style-name="Table64.A3" office:value-type="string">
            <text:p text:style-name="P5"><text:span text:style-name="T18">Zapisz finalną wersję README.</text:span></text:p>
          </table:table-cell>
        </table:table-row>
        <table:table-row table:style-name="Table64.1">
          <table:table-cell table:style-name="Table64.A6" office:value-type="string">
            <text:p text:style-name="P5"><text:span text:style-name="T19">EFEKT DNIA</text:span></text:p>
          </table:table-cell>
          <table:table-cell table:style-name="Table64.A6" office:value-type="string">
            <text:p text:style-name="P5"><text:span text:style-name="T18">SQL project v1.0.</text:span></text:p>
          </table:table-cell>
        </table:table-row>
        <table:table-row table:style-name="Table64.1">
          <table:table-cell table:style-name="Table64.A7" office:value-type="string">
            <text:p text:style-name="P5"><text:span text:style-name="T19">MINIMUM DNIA</text:span></text:p>
          </table:table-cell>
          <table:table-cell table:style-name="Table6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5"><text:span text:style-name="T11">NOTATKA DNIA</text:span></text:p>
          </table:table-cell>
        </table:table-row>
        <table:table-row table:style-name="Table65.1">
          <table:table-cell table:style-name="Table6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7/60 <text:s/>■■■■■■■■■□□□□□□□□□□□</text:span></text:p>
      <text:p text:style-name="Standard"><text:span text:style-name="T7">DAY 27</text:span></text:p>
      <text:p text:style-name="Standard"><text:span text:style-name="T17">Tydzień 4 | Cel dnia: Domknąć Python notebook draft.</text:span></text:p>
      <text:p text:style-name="P3"/>
      <table:table table:name="Table66" table:style-name="Table66">
        <table:table-column table:style-name="Table66.A" table:number-columns-repeated="2"/>
        <table:table-row table:style-name="Table66.1">
          <table:table-cell table:style-name="Table66.A1" office:value-type="string">
            <text:p text:style-name="P5"><text:span text:style-name="T15">AI TASKI</text:span></text:p>
          </table:table-cell>
          <table:table-cell table:style-name="Table6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66.1">
          <table:table-cell table:style-name="Table66.A2" office:value-type="string">
            <text:p text:style-name="P5"><text:span text:style-name="T19">SQL</text:span></text:p>
          </table:table-cell>
          <table:table-cell table:style-name="Table66.A2" office:value-type="string">
            <text:p text:style-name="P5"><text:span text:style-name="T18">SQL: 10 zapytań utrwalających.</text:span></text:p>
          </table:table-cell>
        </table:table-row>
        <table:table-row table:style-name="Table66.1">
          <table:table-cell table:style-name="Table66.A3" office:value-type="string">
            <text:p text:style-name="P5"><text:span text:style-name="T19">PYTHON</text:span></text:p>
          </table:table-cell>
          <table:table-cell table:style-name="Table66.A3" office:value-type="string">
            <text:p text:style-name="P5"><text:span text:style-name="T18">Notebook: CSV, filtr, grupowanie, wykres.</text:span></text:p>
          </table:table-cell>
        </table:table-row>
        <table:table-row table:style-name="Table66.1">
          <table:table-cell table:style-name="Table66.A4" office:value-type="string">
            <text:p text:style-name="P5"><text:span text:style-name="T19">FOOTBALL</text:span></text:p>
          </table:table-cell>
          <table:table-cell table:style-name="Table66.A4" office:value-type="string">
            <text:p text:style-name="P5"><text:span text:style-name="T18">Połącz wykres z jednym sensownym wnioskiem piłkarskim.</text:span></text:p>
          </table:table-cell>
        </table:table-row>
        <table:table-row table:style-name="Table66.1">
          <table:table-cell table:style-name="Table66.A3" office:value-type="string">
            <text:p text:style-name="P5"><text:span text:style-name="T19">GITHUB / PORTFOLIO</text:span></text:p>
          </table:table-cell>
          <table:table-cell table:style-name="Table66.A3" office:value-type="string">
            <text:p text:style-name="P5"><text:span text:style-name="T18">Dodaj notebook do struktury projektu.</text:span></text:p>
          </table:table-cell>
        </table:table-row>
        <table:table-row table:style-name="Table66.1">
          <table:table-cell table:style-name="Table66.A6" office:value-type="string">
            <text:p text:style-name="P5"><text:span text:style-name="T19">EFEKT DNIA</text:span></text:p>
          </table:table-cell>
          <table:table-cell table:style-name="Table66.A6" office:value-type="string">
            <text:p text:style-name="P5"><text:span text:style-name="T18">Python notebook draft.</text:span></text:p>
          </table:table-cell>
        </table:table-row>
        <table:table-row table:style-name="Table66.1">
          <table:table-cell table:style-name="Table66.A7" office:value-type="string">
            <text:p text:style-name="P5"><text:span text:style-name="T19">MINIMUM DNIA</text:span></text:p>
          </table:table-cell>
          <table:table-cell table:style-name="Table6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5"><text:span text:style-name="T11">NOTATKA DNIA</text:span></text:p>
          </table:table-cell>
        </table:table-row>
        <table:table-row table:style-name="Table67.1">
          <table:table-cell table:style-name="Table6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28/60 <text:s/>■■■■■■■■■□□□□□□□□□□□</text:span></text:p>
      <text:p text:style-name="Standard"><text:span text:style-name="T7">DAY 28</text:span></text:p>
      <text:p text:style-name="Standard"><text:span text:style-name="T17">Tydzień 4 | Cel dnia: Zamknąć tydzień 4 jako pierwszy realny etap.</text:span></text:p>
      <text:p text:style-name="P3"/>
      <table:table table:name="Table68" table:style-name="Table68">
        <table:table-column table:style-name="Table68.A" table:number-columns-repeated="2"/>
        <table:table-row table:style-name="Table68.1">
          <table:table-cell table:style-name="Table68.A1" office:value-type="string">
            <text:p text:style-name="P5"><text:span text:style-name="T15">AI TASKI</text:span></text:p>
          </table:table-cell>
          <table:table-cell table:style-name="Table6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68.1">
          <table:table-cell table:style-name="Table68.A2" office:value-type="string">
            <text:p text:style-name="P5"><text:span text:style-name="T19">SQL</text:span></text:p>
          </table:table-cell>
          <table:table-cell table:style-name="Table68.A2" office:value-type="string">
            <text:p text:style-name="P5"><text:span text:style-name="T18">Powtórka SQL: SELECT-JOIN-GROUP BY.</text:span></text:p>
          </table:table-cell>
        </table:table-row>
        <table:table-row table:style-name="Table68.1">
          <table:table-cell table:style-name="Table68.A3" office:value-type="string">
            <text:p text:style-name="P5"><text:span text:style-name="T19">PYTHON</text:span></text:p>
          </table:table-cell>
          <table:table-cell table:style-name="Table68.A3" office:value-type="string">
            <text:p text:style-name="P5"><text:span text:style-name="T18">Powtórka Python: pandas + wykres.</text:span></text:p>
          </table:table-cell>
        </table:table-row>
        <table:table-row table:style-name="Table68.1">
          <table:table-cell table:style-name="Table68.A4" office:value-type="string">
            <text:p text:style-name="P5"><text:span text:style-name="T19">FOOTBALL</text:span></text:p>
          </table:table-cell>
          <table:table-cell table:style-name="Table68.A4" office:value-type="string">
            <text:p text:style-name="P5"><text:span text:style-name="T18">Uzupełnij pierwszy raport meczowy do wersji czytelnej.</text:span></text:p>
          </table:table-cell>
        </table:table-row>
        <table:table-row table:style-name="Table68.1">
          <table:table-cell table:style-name="Table68.A3" office:value-type="string">
            <text:p text:style-name="P5"><text:span text:style-name="T19">GITHUB / PORTFOLIO</text:span></text:p>
          </table:table-cell>
          <table:table-cell table:style-name="Table68.A3" office:value-type="string">
            <text:p text:style-name="P5"><text:span text:style-name="T18">Backup + lista rzeczy do poprawy.</text:span></text:p>
          </table:table-cell>
        </table:table-row>
        <table:table-row table:style-name="Table68.1">
          <table:table-cell table:style-name="Table68.A6" office:value-type="string">
            <text:p text:style-name="P5"><text:span text:style-name="T19">EFEKT DNIA</text:span></text:p>
          </table:table-cell>
          <table:table-cell table:style-name="Table68.A6" office:value-type="string">
            <text:p text:style-name="P5"><text:span text:style-name="T18">Weekly Review 4 gotowy.</text:span></text:p>
          </table:table-cell>
        </table:table-row>
        <table:table-row table:style-name="Table68.1">
          <table:table-cell table:style-name="Table68.A7" office:value-type="string">
            <text:p text:style-name="P5"><text:span text:style-name="T19">MINIMUM DNIA</text:span></text:p>
          </table:table-cell>
          <table:table-cell table:style-name="Table6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5"><text:span text:style-name="T11">NOTATKA DNIA</text:span></text:p>
          </table:table-cell>
        </table:table-row>
        <table:table-row table:style-name="Table69.1">
          <table:table-cell table:style-name="Table6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4</text:span></text:p>
      <text:p text:style-name="P3"/>
      <text:p text:style-name="P4"><text:span text:style-name="T9">Podsumowanie dni 22-28. Bez bajek, bez dramatu, bez udawania. Po prostu sprawdzam, co faktycznie zostało zrobione.</text:span></text:p>
      <table:table table:name="Table70" table:style-name="Table70">
        <table:table-column table:style-name="Table70.A" table:number-columns-repeated="2"/>
        <table:table-row table:style-name="Table70.1">
          <table:table-cell table:style-name="Table70.A1" office:value-type="string">
            <text:p text:style-name="P5"><text:span text:style-name="T20">Pytanie</text:span></text:p>
          </table:table-cell>
          <table:table-cell table:style-name="Table70.A1" office:value-type="string">
            <text:p text:style-name="P5"><text:span text:style-name="T20">Odpowiedź</text:span></text:p>
          </table:table-cell>
        </table:table-row>
        <table:table-row table:style-name="Table70.1">
          <table:table-cell table:style-name="Table70.A2" office:value-type="string">
            <text:p text:style-name="P5">Co zrobiłem w tym tygodniu?</text:p>
          </table:table-cell>
          <table:table-cell table:style-name="Table70.B2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Czego się nauczyłem?</text:p>
          </table:table-cell>
          <table:table-cell table:style-name="Table70.B3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Co było najtrudniejsze?</text:p>
          </table:table-cell>
          <table:table-cell table:style-name="Table70.B4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Ile zrobiłem AI tasków?</text:p>
          </table:table-cell>
          <table:table-cell table:style-name="Table70.B5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Ile czasu poświęciłem na SQL?</text:p>
          </table:table-cell>
          <table:table-cell table:style-name="Table70.B6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Ile czasu poświęciłem na Python?</text:p>
          </table:table-cell>
          <table:table-cell table:style-name="Table70.B7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Co dodałem do GitHuba/portfolio?</text:p>
          </table:table-cell>
          <table:table-cell table:style-name="Table70.B8" office:value-type="string">
            <text:p text:style-name="P5"/>
          </table:table-cell>
        </table:table-row>
        <table:table-row table:style-name="Table70.1">
          <table:table-cell table:style-name="Table70.A2" office:value-type="string">
            <text:p text:style-name="P5">Co poprawiam w kolejnym tygodniu?</text:p>
          </table:table-cell>
          <table:table-cell table:style-name="Table70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5: PORTFOLIO</text:span></text:p>
      <text:p text:style-name="P3"/>
      <text:p text:style-name="P4"><text:span text:style-name="T9">Porządkowanie dowodów pracy i pierwszy profil zawodnika.</text:span></text:p>
      <table:table table:name="Table71" table:style-name="Table71">
        <table:table-column table:style-name="Table71.A" table:number-columns-repeated="2"/>
        <table:table-row table:style-name="Table71.1">
          <table:table-cell table:style-name="Table71.A1" office:value-type="string">
            <text:p text:style-name="P5"><text:span text:style-name="T13">Cel tygodnia</text:span></text:p>
          </table:table-cell>
          <table:table-cell table:style-name="Table71.B1" office:value-type="string">
            <text:p text:style-name="P5"><text:span text:style-name="T12">Zebrać prace w portfolio i przygotować pierwszą komunikację na zewnątrz.</text:span></text:p>
          </table:table-cell>
        </table:table-row>
        <table:table-row table:style-name="Table71.1">
          <table:table-cell table:style-name="Table71.A2" office:value-type="string">
            <text:p text:style-name="P5"><text:span text:style-name="T13">Efekt końcowy</text:span></text:p>
          </table:table-cell>
          <table:table-cell table:style-name="Table71.B1" office:value-type="string">
            <text:p text:style-name="P5"><text:span text:style-name="T12">Portfolio draft + LinkedIn post draft.</text:span></text:p>
          </table:table-cell>
        </table:table-row>
      </table:table>
      <text:p text:style-name="Standard"/>
      <text:p text:style-name="P7"><text:span text:style-name="T16">Day 29/60 <text:s/>■■■■■■■■■■□□□□□□□□□□</text:span></text:p>
      <text:p text:style-name="Standard"><text:span text:style-name="T7">DAY 29</text:span></text:p>
      <text:p text:style-name="Standard"><text:span text:style-name="T17">Tydzień 5 | Cel dnia: Zacząć budowę portfolio.</text:span></text:p>
      <text:p text:style-name="P3"/>
      <table:table table:name="Table72" table:style-name="Table72">
        <table:table-column table:style-name="Table72.A" table:number-columns-repeated="2"/>
        <table:table-row table:style-name="Table72.1">
          <table:table-cell table:style-name="Table72.A1" office:value-type="string">
            <text:p text:style-name="P5"><text:span text:style-name="T15">AI TASKI</text:span></text:p>
          </table:table-cell>
          <table:table-cell table:style-name="Table7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72.1">
          <table:table-cell table:style-name="Table72.A2" office:value-type="string">
            <text:p text:style-name="P5"><text:span text:style-name="T19">SQL</text:span></text:p>
          </table:table-cell>
          <table:table-cell table:style-name="Table72.A2" office:value-type="string">
            <text:p text:style-name="P5"><text:span text:style-name="T18">SQL: wybierz 5 najlepszych zapytań do pokazania.</text:span></text:p>
          </table:table-cell>
        </table:table-row>
        <table:table-row table:style-name="Table72.1">
          <table:table-cell table:style-name="Table72.A3" office:value-type="string">
            <text:p text:style-name="P5"><text:span text:style-name="T19">PYTHON</text:span></text:p>
          </table:table-cell>
          <table:table-cell table:style-name="Table72.A3" office:value-type="string">
            <text:p text:style-name="P5"><text:span text:style-name="T18">Python: wybierz najlepszy wykres lub notebook.</text:span></text:p>
          </table:table-cell>
        </table:table-row>
        <table:table-row table:style-name="Table72.1">
          <table:table-cell table:style-name="Table72.A4" office:value-type="string">
            <text:p text:style-name="P5"><text:span text:style-name="T19">FOOTBALL</text:span></text:p>
          </table:table-cell>
          <table:table-cell table:style-name="Table72.A4" office:value-type="string">
            <text:p text:style-name="P5"><text:span text:style-name="T18">Wybierz 2 materiały piłkarskie do portfolio.</text:span></text:p>
          </table:table-cell>
        </table:table-row>
        <table:table-row table:style-name="Table72.1">
          <table:table-cell table:style-name="Table72.A3" office:value-type="string">
            <text:p text:style-name="P5"><text:span text:style-name="T19">GITHUB / PORTFOLIO</text:span></text:p>
          </table:table-cell>
          <table:table-cell table:style-name="Table72.A3" office:value-type="string">
            <text:p text:style-name="P5"><text:span text:style-name="T18">Utwórz Portfolio/index.md.</text:span></text:p>
          </table:table-cell>
        </table:table-row>
        <table:table-row table:style-name="Table72.1">
          <table:table-cell table:style-name="Table72.A6" office:value-type="string">
            <text:p text:style-name="P5"><text:span text:style-name="T19">EFEKT DNIA</text:span></text:p>
          </table:table-cell>
          <table:table-cell table:style-name="Table72.A6" office:value-type="string">
            <text:p text:style-name="P5"><text:span text:style-name="T18">Szkielet portfolio.</text:span></text:p>
          </table:table-cell>
        </table:table-row>
        <table:table-row table:style-name="Table72.1">
          <table:table-cell table:style-name="Table72.A7" office:value-type="string">
            <text:p text:style-name="P5"><text:span text:style-name="T19">MINIMUM DNIA</text:span></text:p>
          </table:table-cell>
          <table:table-cell table:style-name="Table7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P5"><text:span text:style-name="T11">NOTATKA DNIA</text:span></text:p>
          </table:table-cell>
        </table:table-row>
        <table:table-row table:style-name="Table73.1">
          <table:table-cell table:style-name="Table7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0/60 <text:s/>■■■■■■■■■■□□□□□□□□□□</text:span></text:p>
      <text:p text:style-name="Standard"><text:span text:style-name="T7">DAY 30</text:span></text:p>
      <text:p text:style-name="Standard"><text:span text:style-name="T17">Tydzień 5 | Cel dnia: Opisać doświadczenie AI tasków.</text:span></text:p>
      <text:p text:style-name="P3"/>
      <table:table table:name="Table74" table:style-name="Table74">
        <table:table-column table:style-name="Table74.A" table:number-columns-repeated="2"/>
        <table:table-row table:style-name="Table74.1">
          <table:table-cell table:style-name="Table74.A1" office:value-type="string">
            <text:p text:style-name="P5"><text:span text:style-name="T15">AI TASKI</text:span></text:p>
          </table:table-cell>
          <table:table-cell table:style-name="Table7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74.1">
          <table:table-cell table:style-name="Table74.A2" office:value-type="string">
            <text:p text:style-name="P5"><text:span text:style-name="T19">SQL</text:span></text:p>
          </table:table-cell>
          <table:table-cell table:style-name="Table74.A2" office:value-type="string">
            <text:p text:style-name="P5"><text:span text:style-name="T18">SQL: krótka powtórka filtrów.</text:span></text:p>
          </table:table-cell>
        </table:table-row>
        <table:table-row table:style-name="Table74.1">
          <table:table-cell table:style-name="Table74.A3" office:value-type="string">
            <text:p text:style-name="P5"><text:span text:style-name="T19">PYTHON</text:span></text:p>
          </table:table-cell>
          <table:table-cell table:style-name="Table74.A3" office:value-type="string">
            <text:p text:style-name="P5"><text:span text:style-name="T18">Python: krótka powtórka funkcji.</text:span></text:p>
          </table:table-cell>
        </table:table-row>
        <table:table-row table:style-name="Table74.1">
          <table:table-cell table:style-name="Table74.A4" office:value-type="string">
            <text:p text:style-name="P5"><text:span text:style-name="T19">FOOTBALL</text:span></text:p>
          </table:table-cell>
          <table:table-cell table:style-name="Table74.A4" office:value-type="string">
            <text:p text:style-name="P5"><text:span text:style-name="T18">Zapisz, jak AI evaluation łączy się z analizą jakości danych.</text:span></text:p>
          </table:table-cell>
        </table:table-row>
        <table:table-row table:style-name="Table74.1">
          <table:table-cell table:style-name="Table74.A3" office:value-type="string">
            <text:p text:style-name="P5"><text:span text:style-name="T19">GITHUB / PORTFOLIO</text:span></text:p>
          </table:table-cell>
          <table:table-cell table:style-name="Table74.A3" office:value-type="string">
            <text:p text:style-name="P5"><text:span text:style-name="T18">Dodaj ai_work_notes.md.</text:span></text:p>
          </table:table-cell>
        </table:table-row>
        <table:table-row table:style-name="Table74.1">
          <table:table-cell table:style-name="Table74.A6" office:value-type="string">
            <text:p text:style-name="P5"><text:span text:style-name="T19">EFEKT DNIA</text:span></text:p>
          </table:table-cell>
          <table:table-cell table:style-name="Table74.A6" office:value-type="string">
            <text:p text:style-name="P5"><text:span text:style-name="T18">Most między AI taskami a karierą.</text:span></text:p>
          </table:table-cell>
        </table:table-row>
        <table:table-row table:style-name="Table74.1">
          <table:table-cell table:style-name="Table74.A7" office:value-type="string">
            <text:p text:style-name="P5"><text:span text:style-name="T19">MINIMUM DNIA</text:span></text:p>
          </table:table-cell>
          <table:table-cell table:style-name="Table7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75" table:style-name="Table75">
        <table:table-column table:style-name="Table75.A"/>
        <table:table-row table:style-name="Table75.1">
          <table:table-cell table:style-name="Table75.A1" office:value-type="string">
            <text:p text:style-name="P5"><text:span text:style-name="T11">NOTATKA DNIA</text:span></text:p>
          </table:table-cell>
        </table:table-row>
        <table:table-row table:style-name="Table75.1">
          <table:table-cell table:style-name="Table7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1/60 <text:s/>■■■■■■■■■■□□□□□□□□□□</text:span></text:p>
      <text:p text:style-name="Standard"><text:span text:style-name="T7">DAY 31</text:span></text:p>
      <text:p text:style-name="Standard"><text:span text:style-name="T17">Tydzień 5 | Cel dnia: Poprawić jakość danych.</text:span></text:p>
      <text:p text:style-name="P3"/>
      <table:table table:name="Table76" table:style-name="Table76">
        <table:table-column table:style-name="Table76.A" table:number-columns-repeated="2"/>
        <table:table-row table:style-name="Table76.1">
          <table:table-cell table:style-name="Table76.A1" office:value-type="string">
            <text:p text:style-name="P5"><text:span text:style-name="T15">AI TASKI</text:span></text:p>
          </table:table-cell>
          <table:table-cell table:style-name="Table7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76.1">
          <table:table-cell table:style-name="Table76.A2" office:value-type="string">
            <text:p text:style-name="P5"><text:span text:style-name="T19">SQL</text:span></text:p>
          </table:table-cell>
          <table:table-cell table:style-name="Table76.A2" office:value-type="string">
            <text:p text:style-name="P5"><text:span text:style-name="T18">SQL: znajdowanie braków i duplikatów.</text:span></text:p>
          </table:table-cell>
        </table:table-row>
        <table:table-row table:style-name="Table76.1">
          <table:table-cell table:style-name="Table76.A3" office:value-type="string">
            <text:p text:style-name="P5"><text:span text:style-name="T19">PYTHON</text:span></text:p>
          </table:table-cell>
          <table:table-cell table:style-name="Table76.A3" office:value-type="string">
            <text:p text:style-name="P5"><text:span text:style-name="T18">Python/pandas: dropna, fillna, podstawowe czyszczenie.</text:span></text:p>
          </table:table-cell>
        </table:table-row>
        <table:table-row table:style-name="Table76.1">
          <table:table-cell table:style-name="Table76.A4" office:value-type="string">
            <text:p text:style-name="P5"><text:span text:style-name="T19">FOOTBALL</text:span></text:p>
          </table:table-cell>
          <table:table-cell table:style-name="Table76.A4" office:value-type="string">
            <text:p text:style-name="P5"><text:span text:style-name="T18">Opisz, dlaczego jakość danych ma znaczenie w piłce.</text:span></text:p>
          </table:table-cell>
        </table:table-row>
        <table:table-row table:style-name="Table76.1">
          <table:table-cell table:style-name="Table76.A3" office:value-type="string">
            <text:p text:style-name="P5"><text:span text:style-name="T19">GITHUB / PORTFOLIO</text:span></text:p>
          </table:table-cell>
          <table:table-cell table:style-name="Table76.A3" office:value-type="string">
            <text:p text:style-name="P5"><text:span text:style-name="T18">Dodaj data_quality_notes.md.</text:span></text:p>
          </table:table-cell>
        </table:table-row>
        <table:table-row table:style-name="Table76.1">
          <table:table-cell table:style-name="Table76.A6" office:value-type="string">
            <text:p text:style-name="P5"><text:span text:style-name="T19">EFEKT DNIA</text:span></text:p>
          </table:table-cell>
          <table:table-cell table:style-name="Table76.A6" office:value-type="string">
            <text:p text:style-name="P5"><text:span text:style-name="T18">Notatka o jakości danych.</text:span></text:p>
          </table:table-cell>
        </table:table-row>
        <table:table-row table:style-name="Table76.1">
          <table:table-cell table:style-name="Table76.A7" office:value-type="string">
            <text:p text:style-name="P5"><text:span text:style-name="T19">MINIMUM DNIA</text:span></text:p>
          </table:table-cell>
          <table:table-cell table:style-name="Table7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5"><text:span text:style-name="T11">NOTATKA DNIA</text:span></text:p>
          </table:table-cell>
        </table:table-row>
        <table:table-row table:style-name="Table77.1">
          <table:table-cell table:style-name="Table7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2/60 <text:s/>■■■■■■■■■■■□□□□□□□□□</text:span></text:p>
      <text:p text:style-name="Standard"><text:span text:style-name="T7">DAY 32</text:span></text:p>
      <text:p text:style-name="Standard"><text:span text:style-name="T17">Tydzień 5 | Cel dnia: Dopisać profil zawodnika.</text:span></text:p>
      <text:p text:style-name="P3"/>
      <table:table table:name="Table78" table:style-name="Table78">
        <table:table-column table:style-name="Table78.A" table:number-columns-repeated="2"/>
        <table:table-row table:style-name="Table78.1">
          <table:table-cell table:style-name="Table78.A1" office:value-type="string">
            <text:p text:style-name="P5"><text:span text:style-name="T15">AI TASKI</text:span></text:p>
          </table:table-cell>
          <table:table-cell table:style-name="Table7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78.1">
          <table:table-cell table:style-name="Table78.A2" office:value-type="string">
            <text:p text:style-name="P5"><text:span text:style-name="T19">SQL</text:span></text:p>
          </table:table-cell>
          <table:table-cell table:style-name="Table78.A2" office:value-type="string">
            <text:p text:style-name="P5"><text:span text:style-name="T18">SQL: pytania o zawodnika i drużynę.</text:span></text:p>
          </table:table-cell>
        </table:table-row>
        <table:table-row table:style-name="Table78.1">
          <table:table-cell table:style-name="Table78.A3" office:value-type="string">
            <text:p text:style-name="P5"><text:span text:style-name="T19">PYTHON</text:span></text:p>
          </table:table-cell>
          <table:table-cell table:style-name="Table78.A3" office:value-type="string">
            <text:p text:style-name="P5"><text:span text:style-name="T18">Python: filtr zawodnika z CSV.</text:span></text:p>
          </table:table-cell>
        </table:table-row>
        <table:table-row table:style-name="Table78.1">
          <table:table-cell table:style-name="Table78.A4" office:value-type="string">
            <text:p text:style-name="P5"><text:span text:style-name="T19">FOOTBALL</text:span></text:p>
          </table:table-cell>
          <table:table-cell table:style-name="Table78.A4" office:value-type="string">
            <text:p text:style-name="P5"><text:span text:style-name="T18">Dokończ profil zawodnika: rola, plusy, minusy, rekomendacja.</text:span></text:p>
          </table:table-cell>
        </table:table-row>
        <table:table-row table:style-name="Table78.1">
          <table:table-cell table:style-name="Table78.A3" office:value-type="string">
            <text:p text:style-name="P5"><text:span text:style-name="T19">GITHUB / PORTFOLIO</text:span></text:p>
          </table:table-cell>
          <table:table-cell table:style-name="Table78.A3" office:value-type="string">
            <text:p text:style-name="P5"><text:span text:style-name="T18">Dodaj Player_Profile_01 do portfolio.</text:span></text:p>
          </table:table-cell>
        </table:table-row>
        <table:table-row table:style-name="Table78.1">
          <table:table-cell table:style-name="Table78.A6" office:value-type="string">
            <text:p text:style-name="P5"><text:span text:style-name="T19">EFEKT DNIA</text:span></text:p>
          </table:table-cell>
          <table:table-cell table:style-name="Table78.A6" office:value-type="string">
            <text:p text:style-name="P5"><text:span text:style-name="T18">Pierwszy profil zawodnika.</text:span></text:p>
          </table:table-cell>
        </table:table-row>
        <table:table-row table:style-name="Table78.1">
          <table:table-cell table:style-name="Table78.A7" office:value-type="string">
            <text:p text:style-name="P5"><text:span text:style-name="T19">MINIMUM DNIA</text:span></text:p>
          </table:table-cell>
          <table:table-cell table:style-name="Table7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79" table:style-name="Table79">
        <table:table-column table:style-name="Table79.A"/>
        <table:table-row table:style-name="Table79.1">
          <table:table-cell table:style-name="Table79.A1" office:value-type="string">
            <text:p text:style-name="P5"><text:span text:style-name="T11">NOTATKA DNIA</text:span></text:p>
          </table:table-cell>
        </table:table-row>
        <table:table-row table:style-name="Table79.1">
          <table:table-cell table:style-name="Table7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3/60 <text:s/>■■■■■■■■■■■□□□□□□□□□</text:span></text:p>
      <text:p text:style-name="Standard"><text:span text:style-name="T7">DAY 33</text:span></text:p>
      <text:p text:style-name="Standard"><text:span text:style-name="T17">Tydzień 5 | Cel dnia: Zrobić mini-dashboard koncepcyjny.</text:span></text:p>
      <text:p text:style-name="P3"/>
      <table:table table:name="Table80" table:style-name="Table80">
        <table:table-column table:style-name="Table80.A" table:number-columns-repeated="2"/>
        <table:table-row table:style-name="Table80.1">
          <table:table-cell table:style-name="Table80.A1" office:value-type="string">
            <text:p text:style-name="P5"><text:span text:style-name="T15">AI TASKI</text:span></text:p>
          </table:table-cell>
          <table:table-cell table:style-name="Table8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80.1">
          <table:table-cell table:style-name="Table80.A2" office:value-type="string">
            <text:p text:style-name="P5"><text:span text:style-name="T19">SQL</text:span></text:p>
          </table:table-cell>
          <table:table-cell table:style-name="Table80.A2" office:value-type="string">
            <text:p text:style-name="P5"><text:span text:style-name="T18">SQL: metryki do dashboardu.</text:span></text:p>
          </table:table-cell>
        </table:table-row>
        <table:table-row table:style-name="Table80.1">
          <table:table-cell table:style-name="Table80.A3" office:value-type="string">
            <text:p text:style-name="P5"><text:span text:style-name="T19">PYTHON</text:span></text:p>
          </table:table-cell>
          <table:table-cell table:style-name="Table80.A3" office:value-type="string">
            <text:p text:style-name="P5"><text:span text:style-name="T18">Python: prosty wykres porównawczy.</text:span></text:p>
          </table:table-cell>
        </table:table-row>
        <table:table-row table:style-name="Table80.1">
          <table:table-cell table:style-name="Table80.A4" office:value-type="string">
            <text:p text:style-name="P5"><text:span text:style-name="T19">FOOTBALL</text:span></text:p>
          </table:table-cell>
          <table:table-cell table:style-name="Table80.A4" office:value-type="string">
            <text:p text:style-name="P5"><text:span text:style-name="T18">Zaprojektuj 4 kafelki dashboardu piłkarskiego.</text:span></text:p>
          </table:table-cell>
        </table:table-row>
        <table:table-row table:style-name="Table80.1">
          <table:table-cell table:style-name="Table80.A3" office:value-type="string">
            <text:p text:style-name="P5"><text:span text:style-name="T19">GITHUB / PORTFOLIO</text:span></text:p>
          </table:table-cell>
          <table:table-cell table:style-name="Table80.A3" office:value-type="string">
            <text:p text:style-name="P5"><text:span text:style-name="T18">Dodaj dashboard_concept.md.</text:span></text:p>
          </table:table-cell>
        </table:table-row>
        <table:table-row table:style-name="Table80.1">
          <table:table-cell table:style-name="Table80.A6" office:value-type="string">
            <text:p text:style-name="P5"><text:span text:style-name="T19">EFEKT DNIA</text:span></text:p>
          </table:table-cell>
          <table:table-cell table:style-name="Table80.A6" office:value-type="string">
            <text:p text:style-name="P5"><text:span text:style-name="T18">Plan pierwszego dashboardu.</text:span></text:p>
          </table:table-cell>
        </table:table-row>
        <table:table-row table:style-name="Table80.1">
          <table:table-cell table:style-name="Table80.A7" office:value-type="string">
            <text:p text:style-name="P5"><text:span text:style-name="T19">MINIMUM DNIA</text:span></text:p>
          </table:table-cell>
          <table:table-cell table:style-name="Table8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81" table:style-name="Table81">
        <table:table-column table:style-name="Table81.A"/>
        <table:table-row table:style-name="Table81.1">
          <table:table-cell table:style-name="Table81.A1" office:value-type="string">
            <text:p text:style-name="P5"><text:span text:style-name="T11">NOTATKA DNIA</text:span></text:p>
          </table:table-cell>
        </table:table-row>
        <table:table-row table:style-name="Table81.1">
          <table:table-cell table:style-name="Table8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4/60 <text:s/>■■■■■■■■■■■□□□□□□□□□</text:span></text:p>
      <text:p text:style-name="Standard"><text:span text:style-name="T7">DAY 34</text:span></text:p>
      <text:p text:style-name="Standard"><text:span text:style-name="T17">Tydzień 5 | Cel dnia: Pokazać projekt na LinkedIn lub przygotować szkic.</text:span></text:p>
      <text:p text:style-name="P3"/>
      <table:table table:name="Table82" table:style-name="Table82">
        <table:table-column table:style-name="Table82.A" table:number-columns-repeated="2"/>
        <table:table-row table:style-name="Table82.1">
          <table:table-cell table:style-name="Table82.A1" office:value-type="string">
            <text:p text:style-name="P5"><text:span text:style-name="T15">AI TASKI</text:span></text:p>
          </table:table-cell>
          <table:table-cell table:style-name="Table8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82.1">
          <table:table-cell table:style-name="Table82.A2" office:value-type="string">
            <text:p text:style-name="P5"><text:span text:style-name="T19">SQL</text:span></text:p>
          </table:table-cell>
          <table:table-cell table:style-name="Table82.A2" office:value-type="string">
            <text:p text:style-name="P5"><text:span text:style-name="T18">SQL: 5 zapytań utrwalających.</text:span></text:p>
          </table:table-cell>
        </table:table-row>
        <table:table-row table:style-name="Table82.1">
          <table:table-cell table:style-name="Table82.A3" office:value-type="string">
            <text:p text:style-name="P5"><text:span text:style-name="T19">PYTHON</text:span></text:p>
          </table:table-cell>
          <table:table-cell table:style-name="Table82.A3" office:value-type="string">
            <text:p text:style-name="P5"><text:span text:style-name="T18">Python: 15 minut praktyki.</text:span></text:p>
          </table:table-cell>
        </table:table-row>
        <table:table-row table:style-name="Table82.1">
          <table:table-cell table:style-name="Table82.A4" office:value-type="string">
            <text:p text:style-name="P5"><text:span text:style-name="T19">FOOTBALL</text:span></text:p>
          </table:table-cell>
          <table:table-cell table:style-name="Table82.A4" office:value-type="string">
            <text:p text:style-name="P5"><text:span text:style-name="T18">Napisz 5 zdań o FALCONIE bez udawania eksperta.</text:span></text:p>
          </table:table-cell>
        </table:table-row>
        <table:table-row table:style-name="Table82.1">
          <table:table-cell table:style-name="Table82.A3" office:value-type="string">
            <text:p text:style-name="P5"><text:span text:style-name="T19">GITHUB / PORTFOLIO</text:span></text:p>
          </table:table-cell>
          <table:table-cell table:style-name="Table82.A3" office:value-type="string">
            <text:p text:style-name="P5"><text:span text:style-name="T18">Przygotuj LinkedIn post draft.</text:span></text:p>
          </table:table-cell>
        </table:table-row>
        <table:table-row table:style-name="Table82.1">
          <table:table-cell table:style-name="Table82.A6" office:value-type="string">
            <text:p text:style-name="P5"><text:span text:style-name="T19">EFEKT DNIA</text:span></text:p>
          </table:table-cell>
          <table:table-cell table:style-name="Table82.A6" office:value-type="string">
            <text:p text:style-name="P5"><text:span text:style-name="T18">Pierwszy post draft.</text:span></text:p>
          </table:table-cell>
        </table:table-row>
        <table:table-row table:style-name="Table82.1">
          <table:table-cell table:style-name="Table82.A7" office:value-type="string">
            <text:p text:style-name="P5"><text:span text:style-name="T19">MINIMUM DNIA</text:span></text:p>
          </table:table-cell>
          <table:table-cell table:style-name="Table8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83" table:style-name="Table83">
        <table:table-column table:style-name="Table83.A"/>
        <table:table-row table:style-name="Table83.1">
          <table:table-cell table:style-name="Table83.A1" office:value-type="string">
            <text:p text:style-name="P5"><text:span text:style-name="T11">NOTATKA DNIA</text:span></text:p>
          </table:table-cell>
        </table:table-row>
        <table:table-row table:style-name="Table83.1">
          <table:table-cell table:style-name="Table8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5/60 <text:s/>■■■■■■■■■■■■□□□□□□□□</text:span></text:p>
      <text:p text:style-name="Standard"><text:span text:style-name="T7">DAY 35</text:span></text:p>
      <text:p text:style-name="Standard"><text:span text:style-name="T17">Tydzień 5 | Cel dnia: Zamknąć tydzień 5 i sprawdzić portfolio.</text:span></text:p>
      <text:p text:style-name="P3"/>
      <table:table table:name="Table84" table:style-name="Table84">
        <table:table-column table:style-name="Table84.A" table:number-columns-repeated="2"/>
        <table:table-row table:style-name="Table84.1">
          <table:table-cell table:style-name="Table84.A1" office:value-type="string">
            <text:p text:style-name="P5"><text:span text:style-name="T15">AI TASKI</text:span></text:p>
          </table:table-cell>
          <table:table-cell table:style-name="Table8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84.1">
          <table:table-cell table:style-name="Table84.A2" office:value-type="string">
            <text:p text:style-name="P5"><text:span text:style-name="T19">SQL</text:span></text:p>
          </table:table-cell>
          <table:table-cell table:style-name="Table84.A2" office:value-type="string">
            <text:p text:style-name="P5"><text:span text:style-name="T18">SQL: powtórka tygodnia.</text:span></text:p>
          </table:table-cell>
        </table:table-row>
        <table:table-row table:style-name="Table84.1">
          <table:table-cell table:style-name="Table84.A3" office:value-type="string">
            <text:p text:style-name="P5"><text:span text:style-name="T19">PYTHON</text:span></text:p>
          </table:table-cell>
          <table:table-cell table:style-name="Table84.A3" office:value-type="string">
            <text:p text:style-name="P5"><text:span text:style-name="T18">Python: powtórka tygodnia.</text:span></text:p>
          </table:table-cell>
        </table:table-row>
        <table:table-row table:style-name="Table84.1">
          <table:table-cell table:style-name="Table84.A4" office:value-type="string">
            <text:p text:style-name="P5"><text:span text:style-name="T19">FOOTBALL</text:span></text:p>
          </table:table-cell>
          <table:table-cell table:style-name="Table84.A4" office:value-type="string">
            <text:p text:style-name="P5"><text:span text:style-name="T18">Sprawdź, czy raport i profil zawodnika są zrozumiałe.</text:span></text:p>
          </table:table-cell>
        </table:table-row>
        <table:table-row table:style-name="Table84.1">
          <table:table-cell table:style-name="Table84.A3" office:value-type="string">
            <text:p text:style-name="P5"><text:span text:style-name="T19">GITHUB / PORTFOLIO</text:span></text:p>
          </table:table-cell>
          <table:table-cell table:style-name="Table84.A3" office:value-type="string">
            <text:p text:style-name="P5"><text:span text:style-name="T18">Backup + checklist portfolio.</text:span></text:p>
          </table:table-cell>
        </table:table-row>
        <table:table-row table:style-name="Table84.1">
          <table:table-cell table:style-name="Table84.A6" office:value-type="string">
            <text:p text:style-name="P5"><text:span text:style-name="T19">EFEKT DNIA</text:span></text:p>
          </table:table-cell>
          <table:table-cell table:style-name="Table84.A6" office:value-type="string">
            <text:p text:style-name="P5"><text:span text:style-name="T18">Weekly Review 5 gotowy.</text:span></text:p>
          </table:table-cell>
        </table:table-row>
        <table:table-row table:style-name="Table84.1">
          <table:table-cell table:style-name="Table84.A7" office:value-type="string">
            <text:p text:style-name="P5"><text:span text:style-name="T19">MINIMUM DNIA</text:span></text:p>
          </table:table-cell>
          <table:table-cell table:style-name="Table8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85" table:style-name="Table85">
        <table:table-column table:style-name="Table85.A"/>
        <table:table-row table:style-name="Table85.1">
          <table:table-cell table:style-name="Table85.A1" office:value-type="string">
            <text:p text:style-name="P5"><text:span text:style-name="T11">NOTATKA DNIA</text:span></text:p>
          </table:table-cell>
        </table:table-row>
        <table:table-row table:style-name="Table85.1">
          <table:table-cell table:style-name="Table8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5</text:span></text:p>
      <text:p text:style-name="P3"/>
      <text:p text:style-name="P4"><text:span text:style-name="T9">Podsumowanie dni 29-35. Bez bajek, bez dramatu, bez udawania. Po prostu sprawdzam, co faktycznie zostało zrobione.</text:span></text:p>
      <table:table table:name="Table86" table:style-name="Table86">
        <table:table-column table:style-name="Table86.A" table:number-columns-repeated="2"/>
        <table:table-row table:style-name="Table86.1">
          <table:table-cell table:style-name="Table86.A1" office:value-type="string">
            <text:p text:style-name="P5"><text:span text:style-name="T20">Pytanie</text:span></text:p>
          </table:table-cell>
          <table:table-cell table:style-name="Table86.A1" office:value-type="string">
            <text:p text:style-name="P5"><text:span text:style-name="T20">Odpowiedź</text:span></text:p>
          </table:table-cell>
        </table:table-row>
        <table:table-row table:style-name="Table86.1">
          <table:table-cell table:style-name="Table86.A2" office:value-type="string">
            <text:p text:style-name="P5">Co zrobiłem w tym tygodniu?</text:p>
          </table:table-cell>
          <table:table-cell table:style-name="Table86.B2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Czego się nauczyłem?</text:p>
          </table:table-cell>
          <table:table-cell table:style-name="Table86.B3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Co było najtrudniejsze?</text:p>
          </table:table-cell>
          <table:table-cell table:style-name="Table86.B4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Ile zrobiłem AI tasków?</text:p>
          </table:table-cell>
          <table:table-cell table:style-name="Table86.B5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Ile czasu poświęciłem na SQL?</text:p>
          </table:table-cell>
          <table:table-cell table:style-name="Table86.B6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Ile czasu poświęciłem na Python?</text:p>
          </table:table-cell>
          <table:table-cell table:style-name="Table86.B7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Co dodałem do GitHuba/portfolio?</text:p>
          </table:table-cell>
          <table:table-cell table:style-name="Table86.B8" office:value-type="string">
            <text:p text:style-name="P5"/>
          </table:table-cell>
        </table:table-row>
        <table:table-row table:style-name="Table86.1">
          <table:table-cell table:style-name="Table86.A2" office:value-type="string">
            <text:p text:style-name="P5">Co poprawiam w kolejnym tygodniu?</text:p>
          </table:table-cell>
          <table:table-cell table:style-name="Table86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6: KARIERA I APLIKACJE</text:span></text:p>
      <text:p text:style-name="P3"/>
      <text:p text:style-name="P4"><text:span text:style-name="T9">CV, LinkedIn, aplikacje, pytania rekrutacyjne i dalsza praktyka.</text:span></text:p>
      <table:table table:name="Table87" table:style-name="Table87">
        <table:table-column table:style-name="Table87.A" table:number-columns-repeated="2"/>
        <table:table-row table:style-name="Table87.1">
          <table:table-cell table:style-name="Table87.A1" office:value-type="string">
            <text:p text:style-name="P5"><text:span text:style-name="T13">Cel tygodnia</text:span></text:p>
          </table:table-cell>
          <table:table-cell table:style-name="Table87.B1" office:value-type="string">
            <text:p text:style-name="P5"><text:span text:style-name="T12">Połączyć FALCON z rynkiem pracy: CV, LinkedIn, aplikacje, rozmowa.</text:span></text:p>
          </table:table-cell>
        </table:table-row>
        <table:table-row table:style-name="Table87.1">
          <table:table-cell table:style-name="Table87.A2" office:value-type="string">
            <text:p text:style-name="P5"><text:span text:style-name="T13">Efekt końcowy</text:span></text:p>
          </table:table-cell>
          <table:table-cell table:style-name="Table87.B1" office:value-type="string">
            <text:p text:style-name="P5"><text:span text:style-name="T12">Tracker aplikacji i odpowiedzi rekrutacyjne.</text:span></text:p>
          </table:table-cell>
        </table:table-row>
      </table:table>
      <text:p text:style-name="Standard"/>
      <text:p text:style-name="P7"><text:span text:style-name="T16">Day 36/60 <text:s/>■■■■■■■■■■■■□□□□□□□□</text:span></text:p>
      <text:p text:style-name="Standard"><text:span text:style-name="T7">DAY 36</text:span></text:p>
      <text:p text:style-name="Standard"><text:span text:style-name="T17">Tydzień 6 | Cel dnia: Zaktualizować CV pod nowe efekty.</text:span></text:p>
      <text:p text:style-name="P3"/>
      <table:table table:name="Table88" table:style-name="Table88">
        <table:table-column table:style-name="Table88.A" table:number-columns-repeated="2"/>
        <table:table-row table:style-name="Table88.1">
          <table:table-cell table:style-name="Table88.A1" office:value-type="string">
            <text:p text:style-name="P5"><text:span text:style-name="T15">AI TASKI</text:span></text:p>
          </table:table-cell>
          <table:table-cell table:style-name="Table8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88.1">
          <table:table-cell table:style-name="Table88.A2" office:value-type="string">
            <text:p text:style-name="P5"><text:span text:style-name="T19">SQL</text:span></text:p>
          </table:table-cell>
          <table:table-cell table:style-name="Table88.A2" office:value-type="string">
            <text:p text:style-name="P5"><text:span text:style-name="T18">SQL: wypisz, co realnie już umiesz.</text:span></text:p>
          </table:table-cell>
        </table:table-row>
        <table:table-row table:style-name="Table88.1">
          <table:table-cell table:style-name="Table88.A3" office:value-type="string">
            <text:p text:style-name="P5"><text:span text:style-name="T19">PYTHON</text:span></text:p>
          </table:table-cell>
          <table:table-cell table:style-name="Table88.A3" office:value-type="string">
            <text:p text:style-name="P5"><text:span text:style-name="T18">Python: wypisz, co realnie już umiesz.</text:span></text:p>
          </table:table-cell>
        </table:table-row>
        <table:table-row table:style-name="Table88.1">
          <table:table-cell table:style-name="Table88.A4" office:value-type="string">
            <text:p text:style-name="P5"><text:span text:style-name="T19">FOOTBALL</text:span></text:p>
          </table:table-cell>
          <table:table-cell table:style-name="Table88.A4" office:value-type="string">
            <text:p text:style-name="P5"><text:span text:style-name="T18">Dodaj do CV kierunek Football Analytics bez przesady.</text:span></text:p>
          </table:table-cell>
        </table:table-row>
        <table:table-row table:style-name="Table88.1">
          <table:table-cell table:style-name="Table88.A3" office:value-type="string">
            <text:p text:style-name="P5"><text:span text:style-name="T19">GITHUB / PORTFOLIO</text:span></text:p>
          </table:table-cell>
          <table:table-cell table:style-name="Table88.A3" office:value-type="string">
            <text:p text:style-name="P5"><text:span text:style-name="T18">Zapisz listę zmian do CV.</text:span></text:p>
          </table:table-cell>
        </table:table-row>
        <table:table-row table:style-name="Table88.1">
          <table:table-cell table:style-name="Table88.A6" office:value-type="string">
            <text:p text:style-name="P5"><text:span text:style-name="T19">EFEKT DNIA</text:span></text:p>
          </table:table-cell>
          <table:table-cell table:style-name="Table88.A6" office:value-type="string">
            <text:p text:style-name="P5"><text:span text:style-name="T18">CV update notes.</text:span></text:p>
          </table:table-cell>
        </table:table-row>
        <table:table-row table:style-name="Table88.1">
          <table:table-cell table:style-name="Table88.A7" office:value-type="string">
            <text:p text:style-name="P5"><text:span text:style-name="T19">MINIMUM DNIA</text:span></text:p>
          </table:table-cell>
          <table:table-cell table:style-name="Table8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89" table:style-name="Table89">
        <table:table-column table:style-name="Table89.A"/>
        <table:table-row table:style-name="Table89.1">
          <table:table-cell table:style-name="Table89.A1" office:value-type="string">
            <text:p text:style-name="P5"><text:span text:style-name="T11">NOTATKA DNIA</text:span></text:p>
          </table:table-cell>
        </table:table-row>
        <table:table-row table:style-name="Table89.1">
          <table:table-cell table:style-name="Table8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7/60 <text:s/>■■■■■■■■■■■■□□□□□□□□</text:span></text:p>
      <text:p text:style-name="Standard"><text:span text:style-name="T7">DAY 37</text:span></text:p>
      <text:p text:style-name="Standard"><text:span text:style-name="T17">Tydzień 6 | Cel dnia: Ułożyć LinkedIn About.</text:span></text:p>
      <text:p text:style-name="P3"/>
      <table:table table:name="Table90" table:style-name="Table90">
        <table:table-column table:style-name="Table90.A" table:number-columns-repeated="2"/>
        <table:table-row table:style-name="Table90.1">
          <table:table-cell table:style-name="Table90.A1" office:value-type="string">
            <text:p text:style-name="P5"><text:span text:style-name="T15">AI TASKI</text:span></text:p>
          </table:table-cell>
          <table:table-cell table:style-name="Table9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90.1">
          <table:table-cell table:style-name="Table90.A2" office:value-type="string">
            <text:p text:style-name="P5"><text:span text:style-name="T19">SQL</text:span></text:p>
          </table:table-cell>
          <table:table-cell table:style-name="Table90.A2" office:value-type="string">
            <text:p text:style-name="P5"><text:span text:style-name="T18">SQL: jedno ćwiczenie JOIN.</text:span></text:p>
          </table:table-cell>
        </table:table-row>
        <table:table-row table:style-name="Table90.1">
          <table:table-cell table:style-name="Table90.A3" office:value-type="string">
            <text:p text:style-name="P5"><text:span text:style-name="T19">PYTHON</text:span></text:p>
          </table:table-cell>
          <table:table-cell table:style-name="Table90.A3" office:value-type="string">
            <text:p text:style-name="P5"><text:span text:style-name="T18">Python: jedno ćwiczenie pandas.</text:span></text:p>
          </table:table-cell>
        </table:table-row>
        <table:table-row table:style-name="Table90.1">
          <table:table-cell table:style-name="Table90.A4" office:value-type="string">
            <text:p text:style-name="P5"><text:span text:style-name="T19">FOOTBALL</text:span></text:p>
          </table:table-cell>
          <table:table-cell table:style-name="Table90.A4" office:value-type="string">
            <text:p text:style-name="P5"><text:span text:style-name="T18">Napisz krótki opis FALCONA po angielsku.</text:span></text:p>
          </table:table-cell>
        </table:table-row>
        <table:table-row table:style-name="Table90.1">
          <table:table-cell table:style-name="Table90.A3" office:value-type="string">
            <text:p text:style-name="P5"><text:span text:style-name="T19">GITHUB / PORTFOLIO</text:span></text:p>
          </table:table-cell>
          <table:table-cell table:style-name="Table90.A3" office:value-type="string">
            <text:p text:style-name="P5"><text:span text:style-name="T18">Dodaj linkedin_about_draft.md.</text:span></text:p>
          </table:table-cell>
        </table:table-row>
        <table:table-row table:style-name="Table90.1">
          <table:table-cell table:style-name="Table90.A6" office:value-type="string">
            <text:p text:style-name="P5"><text:span text:style-name="T19">EFEKT DNIA</text:span></text:p>
          </table:table-cell>
          <table:table-cell table:style-name="Table90.A6" office:value-type="string">
            <text:p text:style-name="P5"><text:span text:style-name="T18">LinkedIn About draft.</text:span></text:p>
          </table:table-cell>
        </table:table-row>
        <table:table-row table:style-name="Table90.1">
          <table:table-cell table:style-name="Table90.A7" office:value-type="string">
            <text:p text:style-name="P5"><text:span text:style-name="T19">MINIMUM DNIA</text:span></text:p>
          </table:table-cell>
          <table:table-cell table:style-name="Table9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1" table:style-name="Table91">
        <table:table-column table:style-name="Table91.A"/>
        <table:table-row table:style-name="Table91.1">
          <table:table-cell table:style-name="Table91.A1" office:value-type="string">
            <text:p text:style-name="P5"><text:span text:style-name="T11">NOTATKA DNIA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8/60 <text:s/>■■■■■■■■■■■■■□□□□□□□</text:span></text:p>
      <text:p text:style-name="Standard"><text:span text:style-name="T7">DAY 38</text:span></text:p>
      <text:p text:style-name="Standard"><text:span text:style-name="T17">Tydzień 6 | Cel dnia: Przygotować listę aplikacji.</text:span></text:p>
      <text:p text:style-name="P3"/>
      <table:table table:name="Table92" table:style-name="Table92">
        <table:table-column table:style-name="Table92.A" table:number-columns-repeated="2"/>
        <table:table-row table:style-name="Table92.1">
          <table:table-cell table:style-name="Table92.A1" office:value-type="string">
            <text:p text:style-name="P5"><text:span text:style-name="T15">AI TASKI</text:span></text:p>
          </table:table-cell>
          <table:table-cell table:style-name="Table9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92.1">
          <table:table-cell table:style-name="Table92.A2" office:value-type="string">
            <text:p text:style-name="P5"><text:span text:style-name="T19">SQL</text:span></text:p>
          </table:table-cell>
          <table:table-cell table:style-name="Table92.A2" office:value-type="string">
            <text:p text:style-name="P5"><text:span text:style-name="T18">SQL: 20 minut praktyki.</text:span></text:p>
          </table:table-cell>
        </table:table-row>
        <table:table-row table:style-name="Table92.1">
          <table:table-cell table:style-name="Table92.A3" office:value-type="string">
            <text:p text:style-name="P5"><text:span text:style-name="T19">PYTHON</text:span></text:p>
          </table:table-cell>
          <table:table-cell table:style-name="Table92.A3" office:value-type="string">
            <text:p text:style-name="P5"><text:span text:style-name="T18">Python: 20 minut praktyki.</text:span></text:p>
          </table:table-cell>
        </table:table-row>
        <table:table-row table:style-name="Table92.1">
          <table:table-cell table:style-name="Table92.A4" office:value-type="string">
            <text:p text:style-name="P5"><text:span text:style-name="T19">FOOTBALL</text:span></text:p>
          </table:table-cell>
          <table:table-cell table:style-name="Table92.A4" office:value-type="string">
            <text:p text:style-name="P5"><text:span text:style-name="T18">Wypisz role: AI Evaluator, Search Quality, Data Annotation, Junior QA/Data.</text:span></text:p>
          </table:table-cell>
        </table:table-row>
        <table:table-row table:style-name="Table92.1">
          <table:table-cell table:style-name="Table92.A3" office:value-type="string">
            <text:p text:style-name="P5"><text:span text:style-name="T19">GITHUB / PORTFOLIO</text:span></text:p>
          </table:table-cell>
          <table:table-cell table:style-name="Table92.A3" office:value-type="string">
            <text:p text:style-name="P5"><text:span text:style-name="T18">Utwórz applications_tracker.csv.</text:span></text:p>
          </table:table-cell>
        </table:table-row>
        <table:table-row table:style-name="Table92.1">
          <table:table-cell table:style-name="Table92.A6" office:value-type="string">
            <text:p text:style-name="P5"><text:span text:style-name="T19">EFEKT DNIA</text:span></text:p>
          </table:table-cell>
          <table:table-cell table:style-name="Table92.A6" office:value-type="string">
            <text:p text:style-name="P5"><text:span text:style-name="T18">Tracker aplikacji.</text:span></text:p>
          </table:table-cell>
        </table:table-row>
        <table:table-row table:style-name="Table92.1">
          <table:table-cell table:style-name="Table92.A7" office:value-type="string">
            <text:p text:style-name="P5"><text:span text:style-name="T19">MINIMUM DNIA</text:span></text:p>
          </table:table-cell>
          <table:table-cell table:style-name="Table9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3" table:style-name="Table93">
        <table:table-column table:style-name="Table93.A"/>
        <table:table-row table:style-name="Table93.1">
          <table:table-cell table:style-name="Table93.A1" office:value-type="string">
            <text:p text:style-name="P5"><text:span text:style-name="T11">NOTATKA DNIA</text:span></text:p>
          </table:table-cell>
        </table:table-row>
        <table:table-row table:style-name="Table93.1">
          <table:table-cell table:style-name="Table9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39/60 <text:s/>■■■■■■■■■■■■■□□□□□□□</text:span></text:p>
      <text:p text:style-name="Standard"><text:span text:style-name="T7">DAY 39</text:span></text:p>
      <text:p text:style-name="Standard"><text:span text:style-name="T17">Tydzień 6 | Cel dnia: Przygotować odpowiedzi rekrutacyjne.</text:span></text:p>
      <text:p text:style-name="P3"/>
      <table:table table:name="Table94" table:style-name="Table94">
        <table:table-column table:style-name="Table94.A" table:number-columns-repeated="2"/>
        <table:table-row table:style-name="Table94.1">
          <table:table-cell table:style-name="Table94.A1" office:value-type="string">
            <text:p text:style-name="P5"><text:span text:style-name="T15">AI TASKI</text:span></text:p>
          </table:table-cell>
          <table:table-cell table:style-name="Table9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94.1">
          <table:table-cell table:style-name="Table94.A2" office:value-type="string">
            <text:p text:style-name="P5"><text:span text:style-name="T19">SQL</text:span></text:p>
          </table:table-cell>
          <table:table-cell table:style-name="Table94.A2" office:value-type="string">
            <text:p text:style-name="P5"><text:span text:style-name="T18">SQL: opisz własnymi słowami GROUP BY i JOIN.</text:span></text:p>
          </table:table-cell>
        </table:table-row>
        <table:table-row table:style-name="Table94.1">
          <table:table-cell table:style-name="Table94.A3" office:value-type="string">
            <text:p text:style-name="P5"><text:span text:style-name="T19">PYTHON</text:span></text:p>
          </table:table-cell>
          <table:table-cell table:style-name="Table94.A3" office:value-type="string">
            <text:p text:style-name="P5"><text:span text:style-name="T18">Python: opisz własnymi słowami funkcję i DataFrame.</text:span></text:p>
          </table:table-cell>
        </table:table-row>
        <table:table-row table:style-name="Table94.1">
          <table:table-cell table:style-name="Table94.A4" office:value-type="string">
            <text:p text:style-name="P5"><text:span text:style-name="T19">FOOTBALL</text:span></text:p>
          </table:table-cell>
          <table:table-cell table:style-name="Table94.A4" office:value-type="string">
            <text:p text:style-name="P5"><text:span text:style-name="T18">Przygotuj odpowiedź: dlaczego Football Analytics.</text:span></text:p>
          </table:table-cell>
        </table:table-row>
        <table:table-row table:style-name="Table94.1">
          <table:table-cell table:style-name="Table94.A3" office:value-type="string">
            <text:p text:style-name="P5"><text:span text:style-name="T19">GITHUB / PORTFOLIO</text:span></text:p>
          </table:table-cell>
          <table:table-cell table:style-name="Table94.A3" office:value-type="string">
            <text:p text:style-name="P5"><text:span text:style-name="T18">Dodaj interview_answers.md.</text:span></text:p>
          </table:table-cell>
        </table:table-row>
        <table:table-row table:style-name="Table94.1">
          <table:table-cell table:style-name="Table94.A6" office:value-type="string">
            <text:p text:style-name="P5"><text:span text:style-name="T19">EFEKT DNIA</text:span></text:p>
          </table:table-cell>
          <table:table-cell table:style-name="Table94.A6" office:value-type="string">
            <text:p text:style-name="P5"><text:span text:style-name="T18">Pierwsze odpowiedzi na rozmowę.</text:span></text:p>
          </table:table-cell>
        </table:table-row>
        <table:table-row table:style-name="Table94.1">
          <table:table-cell table:style-name="Table94.A7" office:value-type="string">
            <text:p text:style-name="P5"><text:span text:style-name="T19">MINIMUM DNIA</text:span></text:p>
          </table:table-cell>
          <table:table-cell table:style-name="Table9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5" table:style-name="Table95">
        <table:table-column table:style-name="Table95.A"/>
        <table:table-row table:style-name="Table95.1">
          <table:table-cell table:style-name="Table95.A1" office:value-type="string">
            <text:p text:style-name="P5"><text:span text:style-name="T11">NOTATKA DNIA</text:span></text:p>
          </table:table-cell>
        </table:table-row>
        <table:table-row table:style-name="Table95.1">
          <table:table-cell table:style-name="Table9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0/60 <text:s/>■■■■■■■■■■■■■□□□□□□□</text:span></text:p>
      <text:p text:style-name="Standard"><text:span text:style-name="T7">DAY 40</text:span></text:p>
      <text:p text:style-name="Standard"><text:span text:style-name="T17">Tydzień 6 | Cel dnia: Wejść w CTE bez paniki.</text:span></text:p>
      <text:p text:style-name="P3"/>
      <table:table table:name="Table96" table:style-name="Table96">
        <table:table-column table:style-name="Table96.A" table:number-columns-repeated="2"/>
        <table:table-row table:style-name="Table96.1">
          <table:table-cell table:style-name="Table96.A1" office:value-type="string">
            <text:p text:style-name="P5"><text:span text:style-name="T15">AI TASKI</text:span></text:p>
          </table:table-cell>
          <table:table-cell table:style-name="Table9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96.1">
          <table:table-cell table:style-name="Table96.A2" office:value-type="string">
            <text:p text:style-name="P5"><text:span text:style-name="T19">SQL</text:span></text:p>
          </table:table-cell>
          <table:table-cell table:style-name="Table96.A2" office:value-type="string">
            <text:p text:style-name="P5"><text:span text:style-name="T18">CTE - WITH, po co się tego używa.</text:span></text:p>
          </table:table-cell>
        </table:table-row>
        <table:table-row table:style-name="Table96.1">
          <table:table-cell table:style-name="Table96.A3" office:value-type="string">
            <text:p text:style-name="P5"><text:span text:style-name="T19">PYTHON</text:span></text:p>
          </table:table-cell>
          <table:table-cell table:style-name="Table96.A3" office:value-type="string">
            <text:p text:style-name="P5"><text:span text:style-name="T18">Python: rozbij kod na funkcje.</text:span></text:p>
          </table:table-cell>
        </table:table-row>
        <table:table-row table:style-name="Table96.1">
          <table:table-cell table:style-name="Table96.A4" office:value-type="string">
            <text:p text:style-name="P5"><text:span text:style-name="T19">FOOTBALL</text:span></text:p>
          </table:table-cell>
          <table:table-cell table:style-name="Table96.A4" office:value-type="string">
            <text:p text:style-name="P5"><text:span text:style-name="T18">Opisz jeden proces analizy meczu jako kroki.</text:span></text:p>
          </table:table-cell>
        </table:table-row>
        <table:table-row table:style-name="Table96.1">
          <table:table-cell table:style-name="Table96.A3" office:value-type="string">
            <text:p text:style-name="P5"><text:span text:style-name="T19">GITHUB / PORTFOLIO</text:span></text:p>
          </table:table-cell>
          <table:table-cell table:style-name="Table96.A3" office:value-type="string">
            <text:p text:style-name="P5"><text:span text:style-name="T18">Dodaj cte_notes.md.</text:span></text:p>
          </table:table-cell>
        </table:table-row>
        <table:table-row table:style-name="Table96.1">
          <table:table-cell table:style-name="Table96.A6" office:value-type="string">
            <text:p text:style-name="P5"><text:span text:style-name="T19">EFEKT DNIA</text:span></text:p>
          </table:table-cell>
          <table:table-cell table:style-name="Table96.A6" office:value-type="string">
            <text:p text:style-name="P5"><text:span text:style-name="T18">Pierwsze CTE notes.</text:span></text:p>
          </table:table-cell>
        </table:table-row>
        <table:table-row table:style-name="Table96.1">
          <table:table-cell table:style-name="Table96.A7" office:value-type="string">
            <text:p text:style-name="P5"><text:span text:style-name="T19">MINIMUM DNIA</text:span></text:p>
          </table:table-cell>
          <table:table-cell table:style-name="Table9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7" table:style-name="Table97">
        <table:table-column table:style-name="Table97.A"/>
        <table:table-row table:style-name="Table97.1">
          <table:table-cell table:style-name="Table97.A1" office:value-type="string">
            <text:p text:style-name="P5"><text:span text:style-name="T11">NOTATKA DNIA</text:span></text:p>
          </table:table-cell>
        </table:table-row>
        <table:table-row table:style-name="Table97.1">
          <table:table-cell table:style-name="Table9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1/60 <text:s/>■■■■■■■■■■■■■■□□□□□□</text:span></text:p>
      <text:p text:style-name="Standard"><text:span text:style-name="T7">DAY 41</text:span></text:p>
      <text:p text:style-name="Standard"><text:span text:style-name="T17">Tydzień 6 | Cel dnia: Uporządkować kod i notatki.</text:span></text:p>
      <text:p text:style-name="P3"/>
      <table:table table:name="Table98" table:style-name="Table98">
        <table:table-column table:style-name="Table98.A" table:number-columns-repeated="2"/>
        <table:table-row table:style-name="Table98.1">
          <table:table-cell table:style-name="Table98.A1" office:value-type="string">
            <text:p text:style-name="P5"><text:span text:style-name="T15">AI TASKI</text:span></text:p>
          </table:table-cell>
          <table:table-cell table:style-name="Table9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98.1">
          <table:table-cell table:style-name="Table98.A2" office:value-type="string">
            <text:p text:style-name="P5"><text:span text:style-name="T19">SQL</text:span></text:p>
          </table:table-cell>
          <table:table-cell table:style-name="Table98.A2" office:value-type="string">
            <text:p text:style-name="P5"><text:span text:style-name="T18">SQL: popraw nazwy zapytań i komentarze.</text:span></text:p>
          </table:table-cell>
        </table:table-row>
        <table:table-row table:style-name="Table98.1">
          <table:table-cell table:style-name="Table98.A3" office:value-type="string">
            <text:p text:style-name="P5"><text:span text:style-name="T19">PYTHON</text:span></text:p>
          </table:table-cell>
          <table:table-cell table:style-name="Table98.A3" office:value-type="string">
            <text:p text:style-name="P5"><text:span text:style-name="T18">Python: refactor prostego skryptu.</text:span></text:p>
          </table:table-cell>
        </table:table-row>
        <table:table-row table:style-name="Table98.1">
          <table:table-cell table:style-name="Table98.A4" office:value-type="string">
            <text:p text:style-name="P5"><text:span text:style-name="T19">FOOTBALL</text:span></text:p>
          </table:table-cell>
          <table:table-cell table:style-name="Table98.A4" office:value-type="string">
            <text:p text:style-name="P5"><text:span text:style-name="T18">Popraw czytelność raportu meczowego.</text:span></text:p>
          </table:table-cell>
        </table:table-row>
        <table:table-row table:style-name="Table98.1">
          <table:table-cell table:style-name="Table98.A3" office:value-type="string">
            <text:p text:style-name="P5"><text:span text:style-name="T19">GITHUB / PORTFOLIO</text:span></text:p>
          </table:table-cell>
          <table:table-cell table:style-name="Table98.A3" office:value-type="string">
            <text:p text:style-name="P5"><text:span text:style-name="T18">Commit/backup porządkowy.</text:span></text:p>
          </table:table-cell>
        </table:table-row>
        <table:table-row table:style-name="Table98.1">
          <table:table-cell table:style-name="Table98.A6" office:value-type="string">
            <text:p text:style-name="P5"><text:span text:style-name="T19">EFEKT DNIA</text:span></text:p>
          </table:table-cell>
          <table:table-cell table:style-name="Table98.A6" office:value-type="string">
            <text:p text:style-name="P5"><text:span text:style-name="T18">Projekt mniej chaotyczny. Cud, jednak się da.</text:span></text:p>
          </table:table-cell>
        </table:table-row>
        <table:table-row table:style-name="Table98.1">
          <table:table-cell table:style-name="Table98.A7" office:value-type="string">
            <text:p text:style-name="P5"><text:span text:style-name="T19">MINIMUM DNIA</text:span></text:p>
          </table:table-cell>
          <table:table-cell table:style-name="Table9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99" table:style-name="Table99">
        <table:table-column table:style-name="Table99.A"/>
        <table:table-row table:style-name="Table99.1">
          <table:table-cell table:style-name="Table99.A1" office:value-type="string">
            <text:p text:style-name="P5"><text:span text:style-name="T11">NOTATKA DNIA</text:span></text:p>
          </table:table-cell>
        </table:table-row>
        <table:table-row table:style-name="Table99.1">
          <table:table-cell table:style-name="Table9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2/60 <text:s/>■■■■■■■■■■■■■■□□□□□□</text:span></text:p>
      <text:p text:style-name="Standard"><text:span text:style-name="T7">DAY 42</text:span></text:p>
      <text:p text:style-name="Standard"><text:span text:style-name="T17">Tydzień 6 | Cel dnia: Zamknąć tydzień 6 i wejść w tryb rynku pracy.</text:span></text:p>
      <text:p text:style-name="P3"/>
      <table:table table:name="Table100" table:style-name="Table100">
        <table:table-column table:style-name="Table100.A" table:number-columns-repeated="2"/>
        <table:table-row table:style-name="Table100.1">
          <table:table-cell table:style-name="Table100.A1" office:value-type="string">
            <text:p text:style-name="P5"><text:span text:style-name="T15">AI TASKI</text:span></text:p>
          </table:table-cell>
          <table:table-cell table:style-name="Table10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00.1">
          <table:table-cell table:style-name="Table100.A2" office:value-type="string">
            <text:p text:style-name="P5"><text:span text:style-name="T19">SQL</text:span></text:p>
          </table:table-cell>
          <table:table-cell table:style-name="Table100.A2" office:value-type="string">
            <text:p text:style-name="P5"><text:span text:style-name="T18">SQL: test własny z 15 pytań.</text:span></text:p>
          </table:table-cell>
        </table:table-row>
        <table:table-row table:style-name="Table100.1">
          <table:table-cell table:style-name="Table100.A3" office:value-type="string">
            <text:p text:style-name="P5"><text:span text:style-name="T19">PYTHON</text:span></text:p>
          </table:table-cell>
          <table:table-cell table:style-name="Table100.A3" office:value-type="string">
            <text:p text:style-name="P5"><text:span text:style-name="T18">Python: test własny z 5 zadań.</text:span></text:p>
          </table:table-cell>
        </table:table-row>
        <table:table-row table:style-name="Table100.1">
          <table:table-cell table:style-name="Table100.A4" office:value-type="string">
            <text:p text:style-name="P5"><text:span text:style-name="T19">FOOTBALL</text:span></text:p>
          </table:table-cell>
          <table:table-cell table:style-name="Table100.A4" office:value-type="string">
            <text:p text:style-name="P5"><text:span text:style-name="T18">Sprawdź, które materiały nadają się do pokazania.</text:span></text:p>
          </table:table-cell>
        </table:table-row>
        <table:table-row table:style-name="Table100.1">
          <table:table-cell table:style-name="Table100.A3" office:value-type="string">
            <text:p text:style-name="P5"><text:span text:style-name="T19">GITHUB / PORTFOLIO</text:span></text:p>
          </table:table-cell>
          <table:table-cell table:style-name="Table100.A3" office:value-type="string">
            <text:p text:style-name="P5"><text:span text:style-name="T18">Backup + lista aplikacji.</text:span></text:p>
          </table:table-cell>
        </table:table-row>
        <table:table-row table:style-name="Table100.1">
          <table:table-cell table:style-name="Table100.A6" office:value-type="string">
            <text:p text:style-name="P5"><text:span text:style-name="T19">EFEKT DNIA</text:span></text:p>
          </table:table-cell>
          <table:table-cell table:style-name="Table100.A6" office:value-type="string">
            <text:p text:style-name="P5"><text:span text:style-name="T18">Weekly Review 6 gotowy.</text:span></text:p>
          </table:table-cell>
        </table:table-row>
        <table:table-row table:style-name="Table100.1">
          <table:table-cell table:style-name="Table100.A7" office:value-type="string">
            <text:p text:style-name="P5"><text:span text:style-name="T19">MINIMUM DNIA</text:span></text:p>
          </table:table-cell>
          <table:table-cell table:style-name="Table10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01" table:style-name="Table101">
        <table:table-column table:style-name="Table101.A"/>
        <table:table-row table:style-name="Table101.1">
          <table:table-cell table:style-name="Table101.A1" office:value-type="string">
            <text:p text:style-name="P5"><text:span text:style-name="T11">NOTATKA DNIA</text:span></text:p>
          </table:table-cell>
        </table:table-row>
        <table:table-row table:style-name="Table101.1">
          <table:table-cell table:style-name="Table10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6</text:span></text:p>
      <text:p text:style-name="P3"/>
      <text:p text:style-name="P4"><text:span text:style-name="T9">Podsumowanie dni 36-42. Bez bajek, bez dramatu, bez udawania. Po prostu sprawdzam, co faktycznie zostało zrobione.</text:span></text:p>
      <table:table table:name="Table102" table:style-name="Table102">
        <table:table-column table:style-name="Table102.A" table:number-columns-repeated="2"/>
        <table:table-row table:style-name="Table102.1">
          <table:table-cell table:style-name="Table102.A1" office:value-type="string">
            <text:p text:style-name="P5"><text:span text:style-name="T20">Pytanie</text:span></text:p>
          </table:table-cell>
          <table:table-cell table:style-name="Table102.A1" office:value-type="string">
            <text:p text:style-name="P5"><text:span text:style-name="T20">Odpowiedź</text:span></text:p>
          </table:table-cell>
        </table:table-row>
        <table:table-row table:style-name="Table102.1">
          <table:table-cell table:style-name="Table102.A2" office:value-type="string">
            <text:p text:style-name="P5">Co zrobiłem w tym tygodniu?</text:p>
          </table:table-cell>
          <table:table-cell table:style-name="Table102.B2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Czego się nauczyłem?</text:p>
          </table:table-cell>
          <table:table-cell table:style-name="Table102.B3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Co było najtrudniejsze?</text:p>
          </table:table-cell>
          <table:table-cell table:style-name="Table102.B4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Ile zrobiłem AI tasków?</text:p>
          </table:table-cell>
          <table:table-cell table:style-name="Table102.B5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Ile czasu poświęciłem na SQL?</text:p>
          </table:table-cell>
          <table:table-cell table:style-name="Table102.B6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Ile czasu poświęciłem na Python?</text:p>
          </table:table-cell>
          <table:table-cell table:style-name="Table102.B7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Co dodałem do GitHuba/portfolio?</text:p>
          </table:table-cell>
          <table:table-cell table:style-name="Table102.B8" office:value-type="string">
            <text:p text:style-name="P5"/>
          </table:table-cell>
        </table:table-row>
        <table:table-row table:style-name="Table102.1">
          <table:table-cell table:style-name="Table102.A2" office:value-type="string">
            <text:p text:style-name="P5">Co poprawiam w kolejnym tygodniu?</text:p>
          </table:table-cell>
          <table:table-cell table:style-name="Table102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7: POZIOM WYŻEJ</text:span></text:p>
      <text:p text:style-name="P3"/>
      <text:p text:style-name="P4"><text:span text:style-name="T9">Subqueries, CTE, pandas groupby, wykresy i drugi raport.</text:span></text:p>
      <table:table table:name="Table103" table:style-name="Table103">
        <table:table-column table:style-name="Table103.A" table:number-columns-repeated="2"/>
        <table:table-row table:style-name="Table103.1">
          <table:table-cell table:style-name="Table103.A1" office:value-type="string">
            <text:p text:style-name="P5"><text:span text:style-name="T13">Cel tygodnia</text:span></text:p>
          </table:table-cell>
          <table:table-cell table:style-name="Table103.B1" office:value-type="string">
            <text:p text:style-name="P5"><text:span text:style-name="T12">Dodać trochę mocniejsze SQL/Python i drugi materiał Football Analytics.</text:span></text:p>
          </table:table-cell>
        </table:table-row>
        <table:table-row table:style-name="Table103.1">
          <table:table-cell table:style-name="Table103.A2" office:value-type="string">
            <text:p text:style-name="P5"><text:span text:style-name="T13">Efekt końcowy</text:span></text:p>
          </table:table-cell>
          <table:table-cell table:style-name="Table103.B1" office:value-type="string">
            <text:p text:style-name="P5"><text:span text:style-name="T12">Subqueries, CTE, ranking, groupby i drugi raport start.</text:span></text:p>
          </table:table-cell>
        </table:table-row>
      </table:table>
      <text:p text:style-name="Standard"/>
      <text:p text:style-name="P7"><text:span text:style-name="T16">Day 43/60 <text:s/>■■■■■■■■■■■■■■□□□□□□</text:span></text:p>
      <text:p text:style-name="Standard"><text:span text:style-name="T7">DAY 43</text:span></text:p>
      <text:p text:style-name="Standard"><text:span text:style-name="T17">Tydzień 7 | Cel dnia: Dodać subqueries.</text:span></text:p>
      <text:p text:style-name="P3"/>
      <table:table table:name="Table104" table:style-name="Table104">
        <table:table-column table:style-name="Table104.A" table:number-columns-repeated="2"/>
        <table:table-row table:style-name="Table104.1">
          <table:table-cell table:style-name="Table104.A1" office:value-type="string">
            <text:p text:style-name="P5"><text:span text:style-name="T15">AI TASKI</text:span></text:p>
          </table:table-cell>
          <table:table-cell table:style-name="Table10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04.1">
          <table:table-cell table:style-name="Table104.A2" office:value-type="string">
            <text:p text:style-name="P5"><text:span text:style-name="T19">SQL</text:span></text:p>
          </table:table-cell>
          <table:table-cell table:style-name="Table104.A2" office:value-type="string">
            <text:p text:style-name="P5"><text:span text:style-name="T18">Subquery w WHERE i FROM - podstawy.</text:span></text:p>
          </table:table-cell>
        </table:table-row>
        <table:table-row table:style-name="Table104.1">
          <table:table-cell table:style-name="Table104.A3" office:value-type="string">
            <text:p text:style-name="P5"><text:span text:style-name="T19">PYTHON</text:span></text:p>
          </table:table-cell>
          <table:table-cell table:style-name="Table104.A3" office:value-type="string">
            <text:p text:style-name="P5"><text:span text:style-name="T18">Python: pandas filtering practice.</text:span></text:p>
          </table:table-cell>
        </table:table-row>
        <table:table-row table:style-name="Table104.1">
          <table:table-cell table:style-name="Table104.A4" office:value-type="string">
            <text:p text:style-name="P5"><text:span text:style-name="T19">FOOTBALL</text:span></text:p>
          </table:table-cell>
          <table:table-cell table:style-name="Table104.A4" office:value-type="string">
            <text:p text:style-name="P5"><text:span text:style-name="T18">Wymyśl pytanie piłkarskie wymagające porównania do średniej.</text:span></text:p>
          </table:table-cell>
        </table:table-row>
        <table:table-row table:style-name="Table104.1">
          <table:table-cell table:style-name="Table104.A3" office:value-type="string">
            <text:p text:style-name="P5"><text:span text:style-name="T19">GITHUB / PORTFOLIO</text:span></text:p>
          </table:table-cell>
          <table:table-cell table:style-name="Table104.A3" office:value-type="string">
            <text:p text:style-name="P5"><text:span text:style-name="T18">Dodaj subquery_examples.sql.</text:span></text:p>
          </table:table-cell>
        </table:table-row>
        <table:table-row table:style-name="Table104.1">
          <table:table-cell table:style-name="Table104.A6" office:value-type="string">
            <text:p text:style-name="P5"><text:span text:style-name="T19">EFEKT DNIA</text:span></text:p>
          </table:table-cell>
          <table:table-cell table:style-name="Table104.A6" office:value-type="string">
            <text:p text:style-name="P5"><text:span text:style-name="T18">Subquery examples.</text:span></text:p>
          </table:table-cell>
        </table:table-row>
        <table:table-row table:style-name="Table104.1">
          <table:table-cell table:style-name="Table104.A7" office:value-type="string">
            <text:p text:style-name="P5"><text:span text:style-name="T19">MINIMUM DNIA</text:span></text:p>
          </table:table-cell>
          <table:table-cell table:style-name="Table10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05" table:style-name="Table105">
        <table:table-column table:style-name="Table105.A"/>
        <table:table-row table:style-name="Table105.1">
          <table:table-cell table:style-name="Table105.A1" office:value-type="string">
            <text:p text:style-name="P5"><text:span text:style-name="T11">NOTATKA DNIA</text:span></text:p>
          </table:table-cell>
        </table:table-row>
        <table:table-row table:style-name="Table105.1">
          <table:table-cell table:style-name="Table10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4/60 <text:s/>■■■■■■■■■■■■■■■□□□□□</text:span></text:p>
      <text:p text:style-name="Standard"><text:span text:style-name="T7">DAY 44</text:span></text:p>
      <text:p text:style-name="Standard"><text:span text:style-name="T17">Tydzień 7 | Cel dnia: Utrwalić CTE.</text:span></text:p>
      <text:p text:style-name="P3"/>
      <table:table table:name="Table106" table:style-name="Table106">
        <table:table-column table:style-name="Table106.A" table:number-columns-repeated="2"/>
        <table:table-row table:style-name="Table106.1">
          <table:table-cell table:style-name="Table106.A1" office:value-type="string">
            <text:p text:style-name="P5"><text:span text:style-name="T15">AI TASKI</text:span></text:p>
          </table:table-cell>
          <table:table-cell table:style-name="Table10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06.1">
          <table:table-cell table:style-name="Table106.A2" office:value-type="string">
            <text:p text:style-name="P5"><text:span text:style-name="T19">SQL</text:span></text:p>
          </table:table-cell>
          <table:table-cell table:style-name="Table106.A2" office:value-type="string">
            <text:p text:style-name="P5"><text:span text:style-name="T18">CTE + agregacja - czytelniejsze zapytania.</text:span></text:p>
          </table:table-cell>
        </table:table-row>
        <table:table-row table:style-name="Table106.1">
          <table:table-cell table:style-name="Table106.A3" office:value-type="string">
            <text:p text:style-name="P5"><text:span text:style-name="T19">PYTHON</text:span></text:p>
          </table:table-cell>
          <table:table-cell table:style-name="Table106.A3" office:value-type="string">
            <text:p text:style-name="P5"><text:span text:style-name="T18">Python: groupby w pandas.</text:span></text:p>
          </table:table-cell>
        </table:table-row>
        <table:table-row table:style-name="Table106.1">
          <table:table-cell table:style-name="Table106.A4" office:value-type="string">
            <text:p text:style-name="P5"><text:span text:style-name="T19">FOOTBALL</text:span></text:p>
          </table:table-cell>
          <table:table-cell table:style-name="Table106.A4" office:value-type="string">
            <text:p text:style-name="P5"><text:span text:style-name="T18">Porównaj zawodnika lub drużynę do grupy.</text:span></text:p>
          </table:table-cell>
        </table:table-row>
        <table:table-row table:style-name="Table106.1">
          <table:table-cell table:style-name="Table106.A3" office:value-type="string">
            <text:p text:style-name="P5"><text:span text:style-name="T19">GITHUB / PORTFOLIO</text:span></text:p>
          </table:table-cell>
          <table:table-cell table:style-name="Table106.A3" office:value-type="string">
            <text:p text:style-name="P5"><text:span text:style-name="T18">Dodaj cte_examples.sql.</text:span></text:p>
          </table:table-cell>
        </table:table-row>
        <table:table-row table:style-name="Table106.1">
          <table:table-cell table:style-name="Table106.A6" office:value-type="string">
            <text:p text:style-name="P5"><text:span text:style-name="T19">EFEKT DNIA</text:span></text:p>
          </table:table-cell>
          <table:table-cell table:style-name="Table106.A6" office:value-type="string">
            <text:p text:style-name="P5"><text:span text:style-name="T18">CTE examples.</text:span></text:p>
          </table:table-cell>
        </table:table-row>
        <table:table-row table:style-name="Table106.1">
          <table:table-cell table:style-name="Table106.A7" office:value-type="string">
            <text:p text:style-name="P5"><text:span text:style-name="T19">MINIMUM DNIA</text:span></text:p>
          </table:table-cell>
          <table:table-cell table:style-name="Table10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07" table:style-name="Table107">
        <table:table-column table:style-name="Table107.A"/>
        <table:table-row table:style-name="Table107.1">
          <table:table-cell table:style-name="Table107.A1" office:value-type="string">
            <text:p text:style-name="P5"><text:span text:style-name="T11">NOTATKA DNIA</text:span></text:p>
          </table:table-cell>
        </table:table-row>
        <table:table-row table:style-name="Table107.1">
          <table:table-cell table:style-name="Table10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5/60 <text:s/>■■■■■■■■■■■■■■■□□□□□</text:span></text:p>
      <text:p text:style-name="Standard"><text:span text:style-name="T7">DAY 45</text:span></text:p>
      <text:p text:style-name="Standard"><text:span text:style-name="T17">Tydzień 7 | Cel dnia: Dotknąć window functions.</text:span></text:p>
      <text:p text:style-name="P3"/>
      <table:table table:name="Table108" table:style-name="Table108">
        <table:table-column table:style-name="Table108.A" table:number-columns-repeated="2"/>
        <table:table-row table:style-name="Table108.1">
          <table:table-cell table:style-name="Table108.A1" office:value-type="string">
            <text:p text:style-name="P5"><text:span text:style-name="T15">AI TASKI</text:span></text:p>
          </table:table-cell>
          <table:table-cell table:style-name="Table10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08.1">
          <table:table-cell table:style-name="Table108.A2" office:value-type="string">
            <text:p text:style-name="P5"><text:span text:style-name="T19">SQL</text:span></text:p>
          </table:table-cell>
          <table:table-cell table:style-name="Table108.A2" office:value-type="string">
            <text:p text:style-name="P5"><text:span text:style-name="T18">ROW_NUMBER, RANK - koncepcja rankingu.</text:span></text:p>
          </table:table-cell>
        </table:table-row>
        <table:table-row table:style-name="Table108.1">
          <table:table-cell table:style-name="Table108.A3" office:value-type="string">
            <text:p text:style-name="P5"><text:span text:style-name="T19">PYTHON</text:span></text:p>
          </table:table-cell>
          <table:table-cell table:style-name="Table108.A3" office:value-type="string">
            <text:p text:style-name="P5"><text:span text:style-name="T18">Python: sortowanie i ranking w pandas.</text:span></text:p>
          </table:table-cell>
        </table:table-row>
        <table:table-row table:style-name="Table108.1">
          <table:table-cell table:style-name="Table108.A4" office:value-type="string">
            <text:p text:style-name="P5"><text:span text:style-name="T19">FOOTBALL</text:span></text:p>
          </table:table-cell>
          <table:table-cell table:style-name="Table108.A4" office:value-type="string">
            <text:p text:style-name="P5"><text:span text:style-name="T18">Zrób ranking 5 zawodników według wybranej metryki.</text:span></text:p>
          </table:table-cell>
        </table:table-row>
        <table:table-row table:style-name="Table108.1">
          <table:table-cell table:style-name="Table108.A3" office:value-type="string">
            <text:p text:style-name="P5"><text:span text:style-name="T19">GITHUB / PORTFOLIO</text:span></text:p>
          </table:table-cell>
          <table:table-cell table:style-name="Table108.A3" office:value-type="string">
            <text:p text:style-name="P5"><text:span text:style-name="T18">Dodaj ranking_notes.md.</text:span></text:p>
          </table:table-cell>
        </table:table-row>
        <table:table-row table:style-name="Table108.1">
          <table:table-cell table:style-name="Table108.A6" office:value-type="string">
            <text:p text:style-name="P5"><text:span text:style-name="T19">EFEKT DNIA</text:span></text:p>
          </table:table-cell>
          <table:table-cell table:style-name="Table108.A6" office:value-type="string">
            <text:p text:style-name="P5"><text:span text:style-name="T18">Pierwszy ranking.</text:span></text:p>
          </table:table-cell>
        </table:table-row>
        <table:table-row table:style-name="Table108.1">
          <table:table-cell table:style-name="Table108.A7" office:value-type="string">
            <text:p text:style-name="P5"><text:span text:style-name="T19">MINIMUM DNIA</text:span></text:p>
          </table:table-cell>
          <table:table-cell table:style-name="Table10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09" table:style-name="Table109">
        <table:table-column table:style-name="Table109.A"/>
        <table:table-row table:style-name="Table109.1">
          <table:table-cell table:style-name="Table109.A1" office:value-type="string">
            <text:p text:style-name="P5"><text:span text:style-name="T11">NOTATKA DNIA</text:span></text:p>
          </table:table-cell>
        </table:table-row>
        <table:table-row table:style-name="Table109.1">
          <table:table-cell table:style-name="Table10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6/60 <text:s/>■■■■■■■■■■■■■■■□□□□□</text:span></text:p>
      <text:p text:style-name="Standard"><text:span text:style-name="T7">DAY 46</text:span></text:p>
      <text:p text:style-name="Standard"><text:span text:style-name="T17">Tydzień 7 | Cel dnia: Zrobić groupby w Pythonie.</text:span></text:p>
      <text:p text:style-name="P3"/>
      <table:table table:name="Table110" table:style-name="Table110">
        <table:table-column table:style-name="Table110.A" table:number-columns-repeated="2"/>
        <table:table-row table:style-name="Table110.1">
          <table:table-cell table:style-name="Table110.A1" office:value-type="string">
            <text:p text:style-name="P5"><text:span text:style-name="T15">AI TASKI</text:span></text:p>
          </table:table-cell>
          <table:table-cell table:style-name="Table11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10.1">
          <table:table-cell table:style-name="Table110.A2" office:value-type="string">
            <text:p text:style-name="P5"><text:span text:style-name="T19">SQL</text:span></text:p>
          </table:table-cell>
          <table:table-cell table:style-name="Table110.A2" office:value-type="string">
            <text:p text:style-name="P5"><text:span text:style-name="T18">SQL: GROUP BY vs pandas groupby - porównanie.</text:span></text:p>
          </table:table-cell>
        </table:table-row>
        <table:table-row table:style-name="Table110.1">
          <table:table-cell table:style-name="Table110.A3" office:value-type="string">
            <text:p text:style-name="P5"><text:span text:style-name="T19">PYTHON</text:span></text:p>
          </table:table-cell>
          <table:table-cell table:style-name="Table110.A3" office:value-type="string">
            <text:p text:style-name="P5"><text:span text:style-name="T18">pandas groupby, agg.</text:span></text:p>
          </table:table-cell>
        </table:table-row>
        <table:table-row table:style-name="Table110.1">
          <table:table-cell table:style-name="Table110.A4" office:value-type="string">
            <text:p text:style-name="P5"><text:span text:style-name="T19">FOOTBALL</text:span></text:p>
          </table:table-cell>
          <table:table-cell table:style-name="Table110.A4" office:value-type="string">
            <text:p text:style-name="P5"><text:span text:style-name="T18">Opisz różnicę między liderem danych a liderem realnego wpływu.</text:span></text:p>
          </table:table-cell>
        </table:table-row>
        <table:table-row table:style-name="Table110.1">
          <table:table-cell table:style-name="Table110.A3" office:value-type="string">
            <text:p text:style-name="P5"><text:span text:style-name="T19">GITHUB / PORTFOLIO</text:span></text:p>
          </table:table-cell>
          <table:table-cell table:style-name="Table110.A3" office:value-type="string">
            <text:p text:style-name="P5"><text:span text:style-name="T18">Dodaj python_groupby_example.py.</text:span></text:p>
          </table:table-cell>
        </table:table-row>
        <table:table-row table:style-name="Table110.1">
          <table:table-cell table:style-name="Table110.A6" office:value-type="string">
            <text:p text:style-name="P5"><text:span text:style-name="T19">EFEKT DNIA</text:span></text:p>
          </table:table-cell>
          <table:table-cell table:style-name="Table110.A6" office:value-type="string">
            <text:p text:style-name="P5"><text:span text:style-name="T18">Groupby w Pythonie.</text:span></text:p>
          </table:table-cell>
        </table:table-row>
        <table:table-row table:style-name="Table110.1">
          <table:table-cell table:style-name="Table110.A7" office:value-type="string">
            <text:p text:style-name="P5"><text:span text:style-name="T19">MINIMUM DNIA</text:span></text:p>
          </table:table-cell>
          <table:table-cell table:style-name="Table11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11" table:style-name="Table111">
        <table:table-column table:style-name="Table111.A"/>
        <table:table-row table:style-name="Table111.1">
          <table:table-cell table:style-name="Table111.A1" office:value-type="string">
            <text:p text:style-name="P5"><text:span text:style-name="T11">NOTATKA DNIA</text:span></text:p>
          </table:table-cell>
        </table:table-row>
        <table:table-row table:style-name="Table111.1">
          <table:table-cell table:style-name="Table11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7/60 <text:s/>■■■■■■■■■■■■■■■■□□□□</text:span></text:p>
      <text:p text:style-name="Standard"><text:span text:style-name="T7">DAY 47</text:span></text:p>
      <text:p text:style-name="Standard"><text:span text:style-name="T17">Tydzień 7 | Cel dnia: Poprawić wykresy.</text:span></text:p>
      <text:p text:style-name="P3"/>
      <table:table table:name="Table112" table:style-name="Table112">
        <table:table-column table:style-name="Table112.A" table:number-columns-repeated="2"/>
        <table:table-row table:style-name="Table112.1">
          <table:table-cell table:style-name="Table112.A1" office:value-type="string">
            <text:p text:style-name="P5"><text:span text:style-name="T15">AI TASKI</text:span></text:p>
          </table:table-cell>
          <table:table-cell table:style-name="Table11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12.1">
          <table:table-cell table:style-name="Table112.A2" office:value-type="string">
            <text:p text:style-name="P5"><text:span text:style-name="T19">SQL</text:span></text:p>
          </table:table-cell>
          <table:table-cell table:style-name="Table112.A2" office:value-type="string">
            <text:p text:style-name="P5"><text:span text:style-name="T18">SQL: przygotuj dane pod wykres.</text:span></text:p>
          </table:table-cell>
        </table:table-row>
        <table:table-row table:style-name="Table112.1">
          <table:table-cell table:style-name="Table112.A3" office:value-type="string">
            <text:p text:style-name="P5"><text:span text:style-name="T19">PYTHON</text:span></text:p>
          </table:table-cell>
          <table:table-cell table:style-name="Table112.A3" office:value-type="string">
            <text:p text:style-name="P5"><text:span text:style-name="T18">matplotlib: tytuł, osie, zapis pliku.</text:span></text:p>
          </table:table-cell>
        </table:table-row>
        <table:table-row table:style-name="Table112.1">
          <table:table-cell table:style-name="Table112.A4" office:value-type="string">
            <text:p text:style-name="P5"><text:span text:style-name="T19">FOOTBALL</text:span></text:p>
          </table:table-cell>
          <table:table-cell table:style-name="Table112.A4" office:value-type="string">
            <text:p text:style-name="P5"><text:span text:style-name="T18">Wybierz wykres, który realnie coś wyjaśnia.</text:span></text:p>
          </table:table-cell>
        </table:table-row>
        <table:table-row table:style-name="Table112.1">
          <table:table-cell table:style-name="Table112.A3" office:value-type="string">
            <text:p text:style-name="P5"><text:span text:style-name="T19">GITHUB / PORTFOLIO</text:span></text:p>
          </table:table-cell>
          <table:table-cell table:style-name="Table112.A3" office:value-type="string">
            <text:p text:style-name="P5"><text:span text:style-name="T18">Dodaj chart_v2.png lub opis.</text:span></text:p>
          </table:table-cell>
        </table:table-row>
        <table:table-row table:style-name="Table112.1">
          <table:table-cell table:style-name="Table112.A6" office:value-type="string">
            <text:p text:style-name="P5"><text:span text:style-name="T19">EFEKT DNIA</text:span></text:p>
          </table:table-cell>
          <table:table-cell table:style-name="Table112.A6" office:value-type="string">
            <text:p text:style-name="P5"><text:span text:style-name="T18">Lepszy wykres.</text:span></text:p>
          </table:table-cell>
        </table:table-row>
        <table:table-row table:style-name="Table112.1">
          <table:table-cell table:style-name="Table112.A7" office:value-type="string">
            <text:p text:style-name="P5"><text:span text:style-name="T19">MINIMUM DNIA</text:span></text:p>
          </table:table-cell>
          <table:table-cell table:style-name="Table11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5"><text:span text:style-name="T11">NOTATKA DNIA</text:span></text:p>
          </table:table-cell>
        </table:table-row>
        <table:table-row table:style-name="Table113.1">
          <table:table-cell table:style-name="Table11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8/60 <text:s/>■■■■■■■■■■■■■■■■□□□□</text:span></text:p>
      <text:p text:style-name="Standard"><text:span text:style-name="T7">DAY 48</text:span></text:p>
      <text:p text:style-name="Standard"><text:span text:style-name="T17">Tydzień 7 | Cel dnia: Zacząć drugi raport piłkarski.</text:span></text:p>
      <text:p text:style-name="P3"/>
      <table:table table:name="Table114" table:style-name="Table114">
        <table:table-column table:style-name="Table114.A" table:number-columns-repeated="2"/>
        <table:table-row table:style-name="Table114.1">
          <table:table-cell table:style-name="Table114.A1" office:value-type="string">
            <text:p text:style-name="P5"><text:span text:style-name="T15">AI TASKI</text:span></text:p>
          </table:table-cell>
          <table:table-cell table:style-name="Table11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14.1">
          <table:table-cell table:style-name="Table114.A2" office:value-type="string">
            <text:p text:style-name="P5"><text:span text:style-name="T19">SQL</text:span></text:p>
          </table:table-cell>
          <table:table-cell table:style-name="Table114.A2" office:value-type="string">
            <text:p text:style-name="P5"><text:span text:style-name="T18">SQL: 10 zapytań do danych raportu.</text:span></text:p>
          </table:table-cell>
        </table:table-row>
        <table:table-row table:style-name="Table114.1">
          <table:table-cell table:style-name="Table114.A3" office:value-type="string">
            <text:p text:style-name="P5"><text:span text:style-name="T19">PYTHON</text:span></text:p>
          </table:table-cell>
          <table:table-cell table:style-name="Table114.A3" office:value-type="string">
            <text:p text:style-name="P5"><text:span text:style-name="T18">Python: przygotowanie danych pod raport.</text:span></text:p>
          </table:table-cell>
        </table:table-row>
        <table:table-row table:style-name="Table114.1">
          <table:table-cell table:style-name="Table114.A4" office:value-type="string">
            <text:p text:style-name="P5"><text:span text:style-name="T19">FOOTBALL</text:span></text:p>
          </table:table-cell>
          <table:table-cell table:style-name="Table114.A4" office:value-type="string">
            <text:p text:style-name="P5"><text:span text:style-name="T18">Wybierz drugi mecz lub drugiego zawodnika.</text:span></text:p>
          </table:table-cell>
        </table:table-row>
        <table:table-row table:style-name="Table114.1">
          <table:table-cell table:style-name="Table114.A3" office:value-type="string">
            <text:p text:style-name="P5"><text:span text:style-name="T19">GITHUB / PORTFOLIO</text:span></text:p>
          </table:table-cell>
          <table:table-cell table:style-name="Table114.A3" office:value-type="string">
            <text:p text:style-name="P5"><text:span text:style-name="T18">Utwórz Match_Report_02.</text:span></text:p>
          </table:table-cell>
        </table:table-row>
        <table:table-row table:style-name="Table114.1">
          <table:table-cell table:style-name="Table114.A6" office:value-type="string">
            <text:p text:style-name="P5"><text:span text:style-name="T19">EFEKT DNIA</text:span></text:p>
          </table:table-cell>
          <table:table-cell table:style-name="Table114.A6" office:value-type="string">
            <text:p text:style-name="P5"><text:span text:style-name="T18">Drugi raport start.</text:span></text:p>
          </table:table-cell>
        </table:table-row>
        <table:table-row table:style-name="Table114.1">
          <table:table-cell table:style-name="Table114.A7" office:value-type="string">
            <text:p text:style-name="P5"><text:span text:style-name="T19">MINIMUM DNIA</text:span></text:p>
          </table:table-cell>
          <table:table-cell table:style-name="Table11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15" table:style-name="Table115">
        <table:table-column table:style-name="Table115.A"/>
        <table:table-row table:style-name="Table115.1">
          <table:table-cell table:style-name="Table115.A1" office:value-type="string">
            <text:p text:style-name="P5"><text:span text:style-name="T11">NOTATKA DNIA</text:span></text:p>
          </table:table-cell>
        </table:table-row>
        <table:table-row table:style-name="Table115.1">
          <table:table-cell table:style-name="Table11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49/60 <text:s/>■■■■■■■■■■■■■■■■□□□□</text:span></text:p>
      <text:p text:style-name="Standard"><text:span text:style-name="T7">DAY 49</text:span></text:p>
      <text:p text:style-name="Standard"><text:span text:style-name="T17">Tydzień 7 | Cel dnia: Zamknąć tydzień 7 i wybrać najlepsze materiały.</text:span></text:p>
      <text:p text:style-name="P3"/>
      <table:table table:name="Table116" table:style-name="Table116">
        <table:table-column table:style-name="Table116.A" table:number-columns-repeated="2"/>
        <table:table-row table:style-name="Table116.1">
          <table:table-cell table:style-name="Table116.A1" office:value-type="string">
            <text:p text:style-name="P5"><text:span text:style-name="T15">AI TASKI</text:span></text:p>
          </table:table-cell>
          <table:table-cell table:style-name="Table11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16.1">
          <table:table-cell table:style-name="Table116.A2" office:value-type="string">
            <text:p text:style-name="P5"><text:span text:style-name="T19">SQL</text:span></text:p>
          </table:table-cell>
          <table:table-cell table:style-name="Table116.A2" office:value-type="string">
            <text:p text:style-name="P5"><text:span text:style-name="T18">SQL: powtórka subquery/CTE/ranking.</text:span></text:p>
          </table:table-cell>
        </table:table-row>
        <table:table-row table:style-name="Table116.1">
          <table:table-cell table:style-name="Table116.A3" office:value-type="string">
            <text:p text:style-name="P5"><text:span text:style-name="T19">PYTHON</text:span></text:p>
          </table:table-cell>
          <table:table-cell table:style-name="Table116.A3" office:value-type="string">
            <text:p text:style-name="P5"><text:span text:style-name="T18">Python: powtórka groupby/wykres.</text:span></text:p>
          </table:table-cell>
        </table:table-row>
        <table:table-row table:style-name="Table116.1">
          <table:table-cell table:style-name="Table116.A4" office:value-type="string">
            <text:p text:style-name="P5"><text:span text:style-name="T19">FOOTBALL</text:span></text:p>
          </table:table-cell>
          <table:table-cell table:style-name="Table116.A4" office:value-type="string">
            <text:p text:style-name="P5"><text:span text:style-name="T18">Wybierz 3 najmocniejsze prace do portfolio.</text:span></text:p>
          </table:table-cell>
        </table:table-row>
        <table:table-row table:style-name="Table116.1">
          <table:table-cell table:style-name="Table116.A3" office:value-type="string">
            <text:p text:style-name="P5"><text:span text:style-name="T19">GITHUB / PORTFOLIO</text:span></text:p>
          </table:table-cell>
          <table:table-cell table:style-name="Table116.A3" office:value-type="string">
            <text:p text:style-name="P5"><text:span text:style-name="T18">Backup + portfolio shortlist.</text:span></text:p>
          </table:table-cell>
        </table:table-row>
        <table:table-row table:style-name="Table116.1">
          <table:table-cell table:style-name="Table116.A6" office:value-type="string">
            <text:p text:style-name="P5"><text:span text:style-name="T19">EFEKT DNIA</text:span></text:p>
          </table:table-cell>
          <table:table-cell table:style-name="Table116.A6" office:value-type="string">
            <text:p text:style-name="P5"><text:span text:style-name="T18">Weekly Review 7 gotowy.</text:span></text:p>
          </table:table-cell>
        </table:table-row>
        <table:table-row table:style-name="Table116.1">
          <table:table-cell table:style-name="Table116.A7" office:value-type="string">
            <text:p text:style-name="P5"><text:span text:style-name="T19">MINIMUM DNIA</text:span></text:p>
          </table:table-cell>
          <table:table-cell table:style-name="Table11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17" table:style-name="Table117">
        <table:table-column table:style-name="Table117.A"/>
        <table:table-row table:style-name="Table117.1">
          <table:table-cell table:style-name="Table117.A1" office:value-type="string">
            <text:p text:style-name="P5"><text:span text:style-name="T11">NOTATKA DNIA</text:span></text:p>
          </table:table-cell>
        </table:table-row>
        <table:table-row table:style-name="Table117.1">
          <table:table-cell table:style-name="Table11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7</text:span></text:p>
      <text:p text:style-name="P3"/>
      <text:p text:style-name="P4"><text:span text:style-name="T9">Podsumowanie dni 43-49. Bez bajek, bez dramatu, bez udawania. Po prostu sprawdzam, co faktycznie zostało zrobione.</text:span></text:p>
      <table:table table:name="Table118" table:style-name="Table118">
        <table:table-column table:style-name="Table118.A" table:number-columns-repeated="2"/>
        <table:table-row table:style-name="Table118.1">
          <table:table-cell table:style-name="Table118.A1" office:value-type="string">
            <text:p text:style-name="P5"><text:span text:style-name="T20">Pytanie</text:span></text:p>
          </table:table-cell>
          <table:table-cell table:style-name="Table118.A1" office:value-type="string">
            <text:p text:style-name="P5"><text:span text:style-name="T20">Odpowiedź</text:span></text:p>
          </table:table-cell>
        </table:table-row>
        <table:table-row table:style-name="Table118.1">
          <table:table-cell table:style-name="Table118.A2" office:value-type="string">
            <text:p text:style-name="P5">Co zrobiłem w tym tygodniu?</text:p>
          </table:table-cell>
          <table:table-cell table:style-name="Table118.B2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Czego się nauczyłem?</text:p>
          </table:table-cell>
          <table:table-cell table:style-name="Table118.B3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Co było najtrudniejsze?</text:p>
          </table:table-cell>
          <table:table-cell table:style-name="Table118.B4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Ile zrobiłem AI tasków?</text:p>
          </table:table-cell>
          <table:table-cell table:style-name="Table118.B5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Ile czasu poświęciłem na SQL?</text:p>
          </table:table-cell>
          <table:table-cell table:style-name="Table118.B6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Ile czasu poświęciłem na Python?</text:p>
          </table:table-cell>
          <table:table-cell table:style-name="Table118.B7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Co dodałem do GitHuba/portfolio?</text:p>
          </table:table-cell>
          <table:table-cell table:style-name="Table118.B8" office:value-type="string">
            <text:p text:style-name="P5"/>
          </table:table-cell>
        </table:table-row>
        <table:table-row table:style-name="Table118.1">
          <table:table-cell table:style-name="Table118.A2" office:value-type="string">
            <text:p text:style-name="P5">Co poprawiam w kolejnym tygodniu?</text:p>
          </table:table-cell>
          <table:table-cell table:style-name="Table118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8: FINALIZACJA</text:span></text:p>
      <text:p text:style-name="P3"/>
      <text:p text:style-name="P4"><text:span text:style-name="T9">Sprzątanie GitHuba, portfolio, komunikacja i przygotowanie do kolejnego etapu.</text:span></text:p>
      <table:table table:name="Table119" table:style-name="Table119">
        <table:table-column table:style-name="Table119.A" table:number-columns-repeated="2"/>
        <table:table-row table:style-name="Table119.1">
          <table:table-cell table:style-name="Table119.A1" office:value-type="string">
            <text:p text:style-name="P5"><text:span text:style-name="T13">Cel tygodnia</text:span></text:p>
          </table:table-cell>
          <table:table-cell table:style-name="Table119.B1" office:value-type="string">
            <text:p text:style-name="P5"><text:span text:style-name="T12">Posprzątać, opisać, przygotować do pokazania i aplikować.</text:span></text:p>
          </table:table-cell>
        </table:table-row>
        <table:table-row table:style-name="Table119.1">
          <table:table-cell table:style-name="Table119.A2" office:value-type="string">
            <text:p text:style-name="P5"><text:span text:style-name="T13">Efekt końcowy</text:span></text:p>
          </table:table-cell>
          <table:table-cell table:style-name="Table119.B1" office:value-type="string">
            <text:p text:style-name="P5"><text:span text:style-name="T12">GitHub i portfolio w wersji v1.0.</text:span></text:p>
          </table:table-cell>
        </table:table-row>
      </table:table>
      <text:p text:style-name="Standard"/>
      <text:p text:style-name="P7"><text:span text:style-name="T16">Day 50/60 <text:s/>■■■■■■■■■■■■■■■■■□□□</text:span></text:p>
      <text:p text:style-name="Standard"><text:span text:style-name="T7">DAY 50</text:span></text:p>
      <text:p text:style-name="Standard"><text:span text:style-name="T17">Tydzień 8 | Cel dnia: Posprzątać GitHub.</text:span></text:p>
      <text:p text:style-name="P3"/>
      <table:table table:name="Table120" table:style-name="Table120">
        <table:table-column table:style-name="Table120.A" table:number-columns-repeated="2"/>
        <table:table-row table:style-name="Table120.1">
          <table:table-cell table:style-name="Table120.A1" office:value-type="string">
            <text:p text:style-name="P5"><text:span text:style-name="T15">AI TASKI</text:span></text:p>
          </table:table-cell>
          <table:table-cell table:style-name="Table12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0.1">
          <table:table-cell table:style-name="Table120.A2" office:value-type="string">
            <text:p text:style-name="P5"><text:span text:style-name="T19">SQL</text:span></text:p>
          </table:table-cell>
          <table:table-cell table:style-name="Table120.A2" office:value-type="string">
            <text:p text:style-name="P5"><text:span text:style-name="T18">SQL: przenieś najlepsze pliki do finalnych folderów.</text:span></text:p>
          </table:table-cell>
        </table:table-row>
        <table:table-row table:style-name="Table120.1">
          <table:table-cell table:style-name="Table120.A3" office:value-type="string">
            <text:p text:style-name="P5"><text:span text:style-name="T19">PYTHON</text:span></text:p>
          </table:table-cell>
          <table:table-cell table:style-name="Table120.A3" office:value-type="string">
            <text:p text:style-name="P5"><text:span text:style-name="T18">Python: przenieś najlepsze skrypty/notebooki.</text:span></text:p>
          </table:table-cell>
        </table:table-row>
        <table:table-row table:style-name="Table120.1">
          <table:table-cell table:style-name="Table120.A4" office:value-type="string">
            <text:p text:style-name="P5"><text:span text:style-name="T19">FOOTBALL</text:span></text:p>
          </table:table-cell>
          <table:table-cell table:style-name="Table120.A4" office:value-type="string">
            <text:p text:style-name="P5"><text:span text:style-name="T18">Upewnij się, że raporty mają sensowne nazwy.</text:span></text:p>
          </table:table-cell>
        </table:table-row>
        <table:table-row table:style-name="Table120.1">
          <table:table-cell table:style-name="Table120.A3" office:value-type="string">
            <text:p text:style-name="P5"><text:span text:style-name="T19">GITHUB / PORTFOLIO</text:span></text:p>
          </table:table-cell>
          <table:table-cell table:style-name="Table120.A3" office:value-type="string">
            <text:p text:style-name="P5"><text:span text:style-name="T18">Popraw strukturę repozytorium.</text:span></text:p>
          </table:table-cell>
        </table:table-row>
        <table:table-row table:style-name="Table120.1">
          <table:table-cell table:style-name="Table120.A6" office:value-type="string">
            <text:p text:style-name="P5"><text:span text:style-name="T19">EFEKT DNIA</text:span></text:p>
          </table:table-cell>
          <table:table-cell table:style-name="Table120.A6" office:value-type="string">
            <text:p text:style-name="P5"><text:span text:style-name="T18">GitHub cleanup.</text:span></text:p>
          </table:table-cell>
        </table:table-row>
        <table:table-row table:style-name="Table120.1">
          <table:table-cell table:style-name="Table120.A7" office:value-type="string">
            <text:p text:style-name="P5"><text:span text:style-name="T19">MINIMUM DNIA</text:span></text:p>
          </table:table-cell>
          <table:table-cell table:style-name="Table12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21" table:style-name="Table121">
        <table:table-column table:style-name="Table121.A"/>
        <table:table-row table:style-name="Table121.1">
          <table:table-cell table:style-name="Table121.A1" office:value-type="string">
            <text:p text:style-name="P5"><text:span text:style-name="T11">NOTATKA DNIA</text:span></text:p>
          </table:table-cell>
        </table:table-row>
        <table:table-row table:style-name="Table121.1">
          <table:table-cell table:style-name="Table12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1/60 <text:s/>■■■■■■■■■■■■■■■■■□□□</text:span></text:p>
      <text:p text:style-name="Standard"><text:span text:style-name="T7">DAY 51</text:span></text:p>
      <text:p text:style-name="Standard"><text:span text:style-name="T17">Tydzień 8 | Cel dnia: Dopisać README główne.</text:span></text:p>
      <text:p text:style-name="P3"/>
      <table:table table:name="Table122" table:style-name="Table122">
        <table:table-column table:style-name="Table122.A" table:number-columns-repeated="2"/>
        <table:table-row table:style-name="Table122.1">
          <table:table-cell table:style-name="Table122.A1" office:value-type="string">
            <text:p text:style-name="P5"><text:span text:style-name="T15">AI TASKI</text:span></text:p>
          </table:table-cell>
          <table:table-cell table:style-name="Table12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2.1">
          <table:table-cell table:style-name="Table122.A2" office:value-type="string">
            <text:p text:style-name="P5"><text:span text:style-name="T19">SQL</text:span></text:p>
          </table:table-cell>
          <table:table-cell table:style-name="Table122.A2" office:value-type="string">
            <text:p text:style-name="P5"><text:span text:style-name="T18">SQL: opis projektu SQL w 5 zdaniach.</text:span></text:p>
          </table:table-cell>
        </table:table-row>
        <table:table-row table:style-name="Table122.1">
          <table:table-cell table:style-name="Table122.A3" office:value-type="string">
            <text:p text:style-name="P5"><text:span text:style-name="T19">PYTHON</text:span></text:p>
          </table:table-cell>
          <table:table-cell table:style-name="Table122.A3" office:value-type="string">
            <text:p text:style-name="P5"><text:span text:style-name="T18">Python: opis projektu Python w 5 zdaniach.</text:span></text:p>
          </table:table-cell>
        </table:table-row>
        <table:table-row table:style-name="Table122.1">
          <table:table-cell table:style-name="Table122.A4" office:value-type="string">
            <text:p text:style-name="P5"><text:span text:style-name="T19">FOOTBALL</text:span></text:p>
          </table:table-cell>
          <table:table-cell table:style-name="Table122.A4" office:value-type="string">
            <text:p text:style-name="P5"><text:span text:style-name="T18">Opis Football Analytics track w 5 zdaniach.</text:span></text:p>
          </table:table-cell>
        </table:table-row>
        <table:table-row table:style-name="Table122.1">
          <table:table-cell table:style-name="Table122.A3" office:value-type="string">
            <text:p text:style-name="P5"><text:span text:style-name="T19">GITHUB / PORTFOLIO</text:span></text:p>
          </table:table-cell>
          <table:table-cell table:style-name="Table122.A3" office:value-type="string">
            <text:p text:style-name="P5"><text:span text:style-name="T18">Utwórz lub popraw README główne.</text:span></text:p>
          </table:table-cell>
        </table:table-row>
        <table:table-row table:style-name="Table122.1">
          <table:table-cell table:style-name="Table122.A6" office:value-type="string">
            <text:p text:style-name="P5"><text:span text:style-name="T19">EFEKT DNIA</text:span></text:p>
          </table:table-cell>
          <table:table-cell table:style-name="Table122.A6" office:value-type="string">
            <text:p text:style-name="P5"><text:span text:style-name="T18">README v1.0.</text:span></text:p>
          </table:table-cell>
        </table:table-row>
        <table:table-row table:style-name="Table122.1">
          <table:table-cell table:style-name="Table122.A7" office:value-type="string">
            <text:p text:style-name="P5"><text:span text:style-name="T19">MINIMUM DNIA</text:span></text:p>
          </table:table-cell>
          <table:table-cell table:style-name="Table12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23" table:style-name="Table123">
        <table:table-column table:style-name="Table123.A"/>
        <table:table-row table:style-name="Table123.1">
          <table:table-cell table:style-name="Table123.A1" office:value-type="string">
            <text:p text:style-name="P5"><text:span text:style-name="T11">NOTATKA DNIA</text:span></text:p>
          </table:table-cell>
        </table:table-row>
        <table:table-row table:style-name="Table123.1">
          <table:table-cell table:style-name="Table12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2/60 <text:s/>■■■■■■■■■■■■■■■■■□□□</text:span></text:p>
      <text:p text:style-name="Standard"><text:span text:style-name="T7">DAY 52</text:span></text:p>
      <text:p text:style-name="Standard"><text:span text:style-name="T17">Tydzień 8 | Cel dnia: Napisać executive summary FALCONA.</text:span></text:p>
      <text:p text:style-name="P3"/>
      <table:table table:name="Table124" table:style-name="Table124">
        <table:table-column table:style-name="Table124.A" table:number-columns-repeated="2"/>
        <table:table-row table:style-name="Table124.1">
          <table:table-cell table:style-name="Table124.A1" office:value-type="string">
            <text:p text:style-name="P5"><text:span text:style-name="T15">AI TASKI</text:span></text:p>
          </table:table-cell>
          <table:table-cell table:style-name="Table124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4.1">
          <table:table-cell table:style-name="Table124.A2" office:value-type="string">
            <text:p text:style-name="P5"><text:span text:style-name="T19">SQL</text:span></text:p>
          </table:table-cell>
          <table:table-cell table:style-name="Table124.A2" office:value-type="string">
            <text:p text:style-name="P5"><text:span text:style-name="T18">SQL: lista umiejętności.</text:span></text:p>
          </table:table-cell>
        </table:table-row>
        <table:table-row table:style-name="Table124.1">
          <table:table-cell table:style-name="Table124.A3" office:value-type="string">
            <text:p text:style-name="P5"><text:span text:style-name="T19">PYTHON</text:span></text:p>
          </table:table-cell>
          <table:table-cell table:style-name="Table124.A3" office:value-type="string">
            <text:p text:style-name="P5"><text:span text:style-name="T18">Python: lista umiejętności.</text:span></text:p>
          </table:table-cell>
        </table:table-row>
        <table:table-row table:style-name="Table124.1">
          <table:table-cell table:style-name="Table124.A4" office:value-type="string">
            <text:p text:style-name="P5"><text:span text:style-name="T19">FOOTBALL</text:span></text:p>
          </table:table-cell>
          <table:table-cell table:style-name="Table124.A4" office:value-type="string">
            <text:p text:style-name="P5"><text:span text:style-name="T18">Opisz, co powstało przez 52 dni.</text:span></text:p>
          </table:table-cell>
        </table:table-row>
        <table:table-row table:style-name="Table124.1">
          <table:table-cell table:style-name="Table124.A3" office:value-type="string">
            <text:p text:style-name="P5"><text:span text:style-name="T19">GITHUB / PORTFOLIO</text:span></text:p>
          </table:table-cell>
          <table:table-cell table:style-name="Table124.A3" office:value-type="string">
            <text:p text:style-name="P5"><text:span text:style-name="T18">Dodaj falcon_summary.md.</text:span></text:p>
          </table:table-cell>
        </table:table-row>
        <table:table-row table:style-name="Table124.1">
          <table:table-cell table:style-name="Table124.A6" office:value-type="string">
            <text:p text:style-name="P5"><text:span text:style-name="T19">EFEKT DNIA</text:span></text:p>
          </table:table-cell>
          <table:table-cell table:style-name="Table124.A6" office:value-type="string">
            <text:p text:style-name="P5"><text:span text:style-name="T18">Executive summary.</text:span></text:p>
          </table:table-cell>
        </table:table-row>
        <table:table-row table:style-name="Table124.1">
          <table:table-cell table:style-name="Table124.A7" office:value-type="string">
            <text:p text:style-name="P5"><text:span text:style-name="T19">MINIMUM DNIA</text:span></text:p>
          </table:table-cell>
          <table:table-cell table:style-name="Table124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25" table:style-name="Table125">
        <table:table-column table:style-name="Table125.A"/>
        <table:table-row table:style-name="Table125.1">
          <table:table-cell table:style-name="Table125.A1" office:value-type="string">
            <text:p text:style-name="P5"><text:span text:style-name="T11">NOTATKA DNIA</text:span></text:p>
          </table:table-cell>
        </table:table-row>
        <table:table-row table:style-name="Table125.1">
          <table:table-cell table:style-name="Table125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3/60 <text:s/>■■■■■■■■■■■■■■■■■■□□</text:span></text:p>
      <text:p text:style-name="Standard"><text:span text:style-name="T7">DAY 53</text:span></text:p>
      <text:p text:style-name="Standard"><text:span text:style-name="T17">Tydzień 8 | Cel dnia: Przygotować LinkedIn post 1.</text:span></text:p>
      <text:p text:style-name="P3"/>
      <table:table table:name="Table126" table:style-name="Table126">
        <table:table-column table:style-name="Table126.A" table:number-columns-repeated="2"/>
        <table:table-row table:style-name="Table126.1">
          <table:table-cell table:style-name="Table126.A1" office:value-type="string">
            <text:p text:style-name="P5"><text:span text:style-name="T15">AI TASKI</text:span></text:p>
          </table:table-cell>
          <table:table-cell table:style-name="Table12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6.1">
          <table:table-cell table:style-name="Table126.A2" office:value-type="string">
            <text:p text:style-name="P5"><text:span text:style-name="T19">SQL</text:span></text:p>
          </table:table-cell>
          <table:table-cell table:style-name="Table126.A2" office:value-type="string">
            <text:p text:style-name="P5"><text:span text:style-name="T18">SQL: mała powtórka.</text:span></text:p>
          </table:table-cell>
        </table:table-row>
        <table:table-row table:style-name="Table126.1">
          <table:table-cell table:style-name="Table126.A3" office:value-type="string">
            <text:p text:style-name="P5"><text:span text:style-name="T19">PYTHON</text:span></text:p>
          </table:table-cell>
          <table:table-cell table:style-name="Table126.A3" office:value-type="string">
            <text:p text:style-name="P5"><text:span text:style-name="T18">Python: mała powtórka.</text:span></text:p>
          </table:table-cell>
        </table:table-row>
        <table:table-row table:style-name="Table126.1">
          <table:table-cell table:style-name="Table126.A4" office:value-type="string">
            <text:p text:style-name="P5"><text:span text:style-name="T19">FOOTBALL</text:span></text:p>
          </table:table-cell>
          <table:table-cell table:style-name="Table126.A4" office:value-type="string">
            <text:p text:style-name="P5"><text:span text:style-name="T18">Post: czego uczysz się w FALCONIE i co już powstało.</text:span></text:p>
          </table:table-cell>
        </table:table-row>
        <table:table-row table:style-name="Table126.1">
          <table:table-cell table:style-name="Table126.A3" office:value-type="string">
            <text:p text:style-name="P5"><text:span text:style-name="T19">GITHUB / PORTFOLIO</text:span></text:p>
          </table:table-cell>
          <table:table-cell table:style-name="Table126.A3" office:value-type="string">
            <text:p text:style-name="P5"><text:span text:style-name="T18">Dodaj linkedin_post_01.md.</text:span></text:p>
          </table:table-cell>
        </table:table-row>
        <table:table-row table:style-name="Table126.1">
          <table:table-cell table:style-name="Table126.A6" office:value-type="string">
            <text:p text:style-name="P5"><text:span text:style-name="T19">EFEKT DNIA</text:span></text:p>
          </table:table-cell>
          <table:table-cell table:style-name="Table126.A6" office:value-type="string">
            <text:p text:style-name="P5"><text:span text:style-name="T18">Post gotowy.</text:span></text:p>
          </table:table-cell>
        </table:table-row>
        <table:table-row table:style-name="Table126.1">
          <table:table-cell table:style-name="Table126.A7" office:value-type="string">
            <text:p text:style-name="P5"><text:span text:style-name="T19">MINIMUM DNIA</text:span></text:p>
          </table:table-cell>
          <table:table-cell table:style-name="Table12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27" table:style-name="Table127">
        <table:table-column table:style-name="Table127.A"/>
        <table:table-row table:style-name="Table127.1">
          <table:table-cell table:style-name="Table127.A1" office:value-type="string">
            <text:p text:style-name="P5"><text:span text:style-name="T11">NOTATKA DNIA</text:span></text:p>
          </table:table-cell>
        </table:table-row>
        <table:table-row table:style-name="Table127.1">
          <table:table-cell table:style-name="Table12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4/60 <text:s/>■■■■■■■■■■■■■■■■■■□□</text:span></text:p>
      <text:p text:style-name="Standard"><text:span text:style-name="T7">DAY 54</text:span></text:p>
      <text:p text:style-name="Standard"><text:span text:style-name="T17">Tydzień 8 | Cel dnia: Zaktualizować listę platform i aplikacji.</text:span></text:p>
      <text:p text:style-name="P3"/>
      <table:table table:name="Table128" table:style-name="Table128">
        <table:table-column table:style-name="Table128.A" table:number-columns-repeated="2"/>
        <table:table-row table:style-name="Table128.1">
          <table:table-cell table:style-name="Table128.A1" office:value-type="string">
            <text:p text:style-name="P5"><text:span text:style-name="T15">AI TASKI</text:span></text:p>
          </table:table-cell>
          <table:table-cell table:style-name="Table12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28.1">
          <table:table-cell table:style-name="Table128.A2" office:value-type="string">
            <text:p text:style-name="P5"><text:span text:style-name="T19">SQL</text:span></text:p>
          </table:table-cell>
          <table:table-cell table:style-name="Table128.A2" office:value-type="string">
            <text:p text:style-name="P5"><text:span text:style-name="T18">SQL: 20 minut praktyki.</text:span></text:p>
          </table:table-cell>
        </table:table-row>
        <table:table-row table:style-name="Table128.1">
          <table:table-cell table:style-name="Table128.A3" office:value-type="string">
            <text:p text:style-name="P5"><text:span text:style-name="T19">PYTHON</text:span></text:p>
          </table:table-cell>
          <table:table-cell table:style-name="Table128.A3" office:value-type="string">
            <text:p text:style-name="P5"><text:span text:style-name="T18">Python: 20 minut praktyki.</text:span></text:p>
          </table:table-cell>
        </table:table-row>
        <table:table-row table:style-name="Table128.1">
          <table:table-cell table:style-name="Table128.A4" office:value-type="string">
            <text:p text:style-name="P5"><text:span text:style-name="T19">FOOTBALL</text:span></text:p>
          </table:table-cell>
          <table:table-cell table:style-name="Table128.A4" office:value-type="string">
            <text:p text:style-name="P5"><text:span text:style-name="T18">Wybierz 10 ofert/platform zgodnych z kierunkiem.</text:span></text:p>
          </table:table-cell>
        </table:table-row>
        <table:table-row table:style-name="Table128.1">
          <table:table-cell table:style-name="Table128.A3" office:value-type="string">
            <text:p text:style-name="P5"><text:span text:style-name="T19">GITHUB / PORTFOLIO</text:span></text:p>
          </table:table-cell>
          <table:table-cell table:style-name="Table128.A3" office:value-type="string">
            <text:p text:style-name="P5"><text:span text:style-name="T18">Uzupełnij applications_tracker.csv.</text:span></text:p>
          </table:table-cell>
        </table:table-row>
        <table:table-row table:style-name="Table128.1">
          <table:table-cell table:style-name="Table128.A6" office:value-type="string">
            <text:p text:style-name="P5"><text:span text:style-name="T19">EFEKT DNIA</text:span></text:p>
          </table:table-cell>
          <table:table-cell table:style-name="Table128.A6" office:value-type="string">
            <text:p text:style-name="P5"><text:span text:style-name="T18">Lista aplikacji.</text:span></text:p>
          </table:table-cell>
        </table:table-row>
        <table:table-row table:style-name="Table128.1">
          <table:table-cell table:style-name="Table128.A7" office:value-type="string">
            <text:p text:style-name="P5"><text:span text:style-name="T19">MINIMUM DNIA</text:span></text:p>
          </table:table-cell>
          <table:table-cell table:style-name="Table12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29" table:style-name="Table129">
        <table:table-column table:style-name="Table129.A"/>
        <table:table-row table:style-name="Table129.1">
          <table:table-cell table:style-name="Table129.A1" office:value-type="string">
            <text:p text:style-name="P5"><text:span text:style-name="T11">NOTATKA DNIA</text:span></text:p>
          </table:table-cell>
        </table:table-row>
        <table:table-row table:style-name="Table129.1">
          <table:table-cell table:style-name="Table12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5/60 <text:s/>■■■■■■■■■■■■■■■■■■□□</text:span></text:p>
      <text:p text:style-name="Standard"><text:span text:style-name="T7">DAY 55</text:span></text:p>
      <text:p text:style-name="Standard"><text:span text:style-name="T17">Tydzień 8 | Cel dnia: Przećwiczyć rozmowę.</text:span></text:p>
      <text:p text:style-name="P3"/>
      <table:table table:name="Table130" table:style-name="Table130">
        <table:table-column table:style-name="Table130.A" table:number-columns-repeated="2"/>
        <table:table-row table:style-name="Table130.1">
          <table:table-cell table:style-name="Table130.A1" office:value-type="string">
            <text:p text:style-name="P5"><text:span text:style-name="T15">AI TASKI</text:span></text:p>
          </table:table-cell>
          <table:table-cell table:style-name="Table13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30.1">
          <table:table-cell table:style-name="Table130.A2" office:value-type="string">
            <text:p text:style-name="P5"><text:span text:style-name="T19">SQL</text:span></text:p>
          </table:table-cell>
          <table:table-cell table:style-name="Table130.A2" office:value-type="string">
            <text:p text:style-name="P5"><text:span text:style-name="T18">SQL: wytłumacz JOIN prostym językiem.</text:span></text:p>
          </table:table-cell>
        </table:table-row>
        <table:table-row table:style-name="Table130.1">
          <table:table-cell table:style-name="Table130.A3" office:value-type="string">
            <text:p text:style-name="P5"><text:span text:style-name="T19">PYTHON</text:span></text:p>
          </table:table-cell>
          <table:table-cell table:style-name="Table130.A3" office:value-type="string">
            <text:p text:style-name="P5"><text:span text:style-name="T18">Python: wytłumacz pandas prostym językiem.</text:span></text:p>
          </table:table-cell>
        </table:table-row>
        <table:table-row table:style-name="Table130.1">
          <table:table-cell table:style-name="Table130.A4" office:value-type="string">
            <text:p text:style-name="P5"><text:span text:style-name="T19">FOOTBALL</text:span></text:p>
          </table:table-cell>
          <table:table-cell table:style-name="Table130.A4" office:value-type="string">
            <text:p text:style-name="P5"><text:span text:style-name="T18">Przygotuj odpowiedź: jak FALCON łączy AI i piłkę.</text:span></text:p>
          </table:table-cell>
        </table:table-row>
        <table:table-row table:style-name="Table130.1">
          <table:table-cell table:style-name="Table130.A3" office:value-type="string">
            <text:p text:style-name="P5"><text:span text:style-name="T19">GITHUB / PORTFOLIO</text:span></text:p>
          </table:table-cell>
          <table:table-cell table:style-name="Table130.A3" office:value-type="string">
            <text:p text:style-name="P5"><text:span text:style-name="T18">Dodaj mock_interview_notes.md.</text:span></text:p>
          </table:table-cell>
        </table:table-row>
        <table:table-row table:style-name="Table130.1">
          <table:table-cell table:style-name="Table130.A6" office:value-type="string">
            <text:p text:style-name="P5"><text:span text:style-name="T19">EFEKT DNIA</text:span></text:p>
          </table:table-cell>
          <table:table-cell table:style-name="Table130.A6" office:value-type="string">
            <text:p text:style-name="P5"><text:span text:style-name="T18">Mock interview notes.</text:span></text:p>
          </table:table-cell>
        </table:table-row>
        <table:table-row table:style-name="Table130.1">
          <table:table-cell table:style-name="Table130.A7" office:value-type="string">
            <text:p text:style-name="P5"><text:span text:style-name="T19">MINIMUM DNIA</text:span></text:p>
          </table:table-cell>
          <table:table-cell table:style-name="Table13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31" table:style-name="Table131">
        <table:table-column table:style-name="Table131.A"/>
        <table:table-row table:style-name="Table131.1">
          <table:table-cell table:style-name="Table131.A1" office:value-type="string">
            <text:p text:style-name="P5"><text:span text:style-name="T11">NOTATKA DNIA</text:span></text:p>
          </table:table-cell>
        </table:table-row>
        <table:table-row table:style-name="Table131.1">
          <table:table-cell table:style-name="Table13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6/60 <text:s/>■■■■■■■■■■■■■■■■■■■□</text:span></text:p>
      <text:p text:style-name="Standard"><text:span text:style-name="T7">DAY 56</text:span></text:p>
      <text:p text:style-name="Standard"><text:span text:style-name="T17">Tydzień 8 | Cel dnia: Zamknąć tydzień 8.</text:span></text:p>
      <text:p text:style-name="P3"/>
      <table:table table:name="Table132" table:style-name="Table132">
        <table:table-column table:style-name="Table132.A" table:number-columns-repeated="2"/>
        <table:table-row table:style-name="Table132.1">
          <table:table-cell table:style-name="Table132.A1" office:value-type="string">
            <text:p text:style-name="P5"><text:span text:style-name="T15">AI TASKI</text:span></text:p>
          </table:table-cell>
          <table:table-cell table:style-name="Table13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32.1">
          <table:table-cell table:style-name="Table132.A2" office:value-type="string">
            <text:p text:style-name="P5"><text:span text:style-name="T19">SQL</text:span></text:p>
          </table:table-cell>
          <table:table-cell table:style-name="Table132.A2" office:value-type="string">
            <text:p text:style-name="P5"><text:span text:style-name="T18">SQL: końcowy test podstaw.</text:span></text:p>
          </table:table-cell>
        </table:table-row>
        <table:table-row table:style-name="Table132.1">
          <table:table-cell table:style-name="Table132.A3" office:value-type="string">
            <text:p text:style-name="P5"><text:span text:style-name="T19">PYTHON</text:span></text:p>
          </table:table-cell>
          <table:table-cell table:style-name="Table132.A3" office:value-type="string">
            <text:p text:style-name="P5"><text:span text:style-name="T18">Python: końcowy test podstaw.</text:span></text:p>
          </table:table-cell>
        </table:table-row>
        <table:table-row table:style-name="Table132.1">
          <table:table-cell table:style-name="Table132.A4" office:value-type="string">
            <text:p text:style-name="P5"><text:span text:style-name="T19">FOOTBALL</text:span></text:p>
          </table:table-cell>
          <table:table-cell table:style-name="Table132.A4" office:value-type="string">
            <text:p text:style-name="P5"><text:span text:style-name="T18">Sprawdź raporty i profile pod czytelność.</text:span></text:p>
          </table:table-cell>
        </table:table-row>
        <table:table-row table:style-name="Table132.1">
          <table:table-cell table:style-name="Table132.A3" office:value-type="string">
            <text:p text:style-name="P5"><text:span text:style-name="T19">GITHUB / PORTFOLIO</text:span></text:p>
          </table:table-cell>
          <table:table-cell table:style-name="Table132.A3" office:value-type="string">
            <text:p text:style-name="P5"><text:span text:style-name="T18">Backup final week.</text:span></text:p>
          </table:table-cell>
        </table:table-row>
        <table:table-row table:style-name="Table132.1">
          <table:table-cell table:style-name="Table132.A6" office:value-type="string">
            <text:p text:style-name="P5"><text:span text:style-name="T19">EFEKT DNIA</text:span></text:p>
          </table:table-cell>
          <table:table-cell table:style-name="Table132.A6" office:value-type="string">
            <text:p text:style-name="P5"><text:span text:style-name="T18">Weekly Review 8 gotowy.</text:span></text:p>
          </table:table-cell>
        </table:table-row>
        <table:table-row table:style-name="Table132.1">
          <table:table-cell table:style-name="Table132.A7" office:value-type="string">
            <text:p text:style-name="P5"><text:span text:style-name="T19">MINIMUM DNIA</text:span></text:p>
          </table:table-cell>
          <table:table-cell table:style-name="Table13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33" table:style-name="Table133">
        <table:table-column table:style-name="Table133.A"/>
        <table:table-row table:style-name="Table133.1">
          <table:table-cell table:style-name="Table133.A1" office:value-type="string">
            <text:p text:style-name="P5"><text:span text:style-name="T11">NOTATKA DNIA</text:span></text:p>
          </table:table-cell>
        </table:table-row>
        <table:table-row table:style-name="Table133.1">
          <table:table-cell table:style-name="Table13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WEEKLY REVIEW 8</text:span></text:p>
      <text:p text:style-name="P3"/>
      <text:p text:style-name="P4"><text:span text:style-name="T9">Podsumowanie dni 50-56. Bez bajek, bez dramatu, bez udawania. Po prostu sprawdzam, co faktycznie zostało zrobione.</text:span></text:p>
      <table:table table:name="Table134" table:style-name="Table134">
        <table:table-column table:style-name="Table134.A" table:number-columns-repeated="2"/>
        <table:table-row table:style-name="Table134.1">
          <table:table-cell table:style-name="Table134.A1" office:value-type="string">
            <text:p text:style-name="P5"><text:span text:style-name="T20">Pytanie</text:span></text:p>
          </table:table-cell>
          <table:table-cell table:style-name="Table134.A1" office:value-type="string">
            <text:p text:style-name="P5"><text:span text:style-name="T20">Odpowiedź</text:span></text:p>
          </table:table-cell>
        </table:table-row>
        <table:table-row table:style-name="Table134.1">
          <table:table-cell table:style-name="Table134.A2" office:value-type="string">
            <text:p text:style-name="P5">Co zrobiłem w tym tygodniu?</text:p>
          </table:table-cell>
          <table:table-cell table:style-name="Table134.B2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Czego się nauczyłem?</text:p>
          </table:table-cell>
          <table:table-cell table:style-name="Table134.B3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Co było najtrudniejsze?</text:p>
          </table:table-cell>
          <table:table-cell table:style-name="Table134.B4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Ile zrobiłem AI tasków?</text:p>
          </table:table-cell>
          <table:table-cell table:style-name="Table134.B5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Ile czasu poświęciłem na SQL?</text:p>
          </table:table-cell>
          <table:table-cell table:style-name="Table134.B6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Ile czasu poświęciłem na Python?</text:p>
          </table:table-cell>
          <table:table-cell table:style-name="Table134.B7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Co dodałem do GitHuba/portfolio?</text:p>
          </table:table-cell>
          <table:table-cell table:style-name="Table134.B8" office:value-type="string">
            <text:p text:style-name="P5"/>
          </table:table-cell>
        </table:table-row>
        <table:table-row table:style-name="Table134.1">
          <table:table-cell table:style-name="Table134.A2" office:value-type="string">
            <text:p text:style-name="P5">Co poprawiam w kolejnym tygodniu?</text:p>
          </table:table-cell>
          <table:table-cell table:style-name="Table134.B9" office:value-type="string">
            <text:p text:style-name="P5"/>
          </table:table-cell>
        </table:table-row>
      </table:table>
      <text:p text:style-name="Standard"><text:span text:style-name="T10">Decyzja tygodnia</text:span></text:p>
      <text:p text:style-name="P4"><text:span text:style-name="T9">Jedna rzecz, którą zostawiam. Jedna rzecz, którą poprawiam. Jedna rzecz, której nie robię, bo odciąga od FALCONA.</text:span></text:p>
      <text:p text:style-name="Standard"/>
      <text:p text:style-name="P2"><text:span text:style-name="T7">TYDZIEŃ 9: DOMKNIĘCIE</text:span></text:p>
      <text:p text:style-name="P3"/>
      <text:p text:style-name="P4"><text:span text:style-name="T9">Końcowy przegląd FALCON v1.0 i plan następnych 90 dni.</text:span></text:p>
      <table:table table:name="Table135" table:style-name="Table135">
        <table:table-column table:style-name="Table135.A" table:number-columns-repeated="2"/>
        <table:table-row table:style-name="Table135.1">
          <table:table-cell table:style-name="Table135.A1" office:value-type="string">
            <text:p text:style-name="P5"><text:span text:style-name="T13">Cel</text:span></text:p>
          </table:table-cell>
          <table:table-cell table:style-name="Table135.B1" office:value-type="string">
            <text:p text:style-name="P5"><text:span text:style-name="T12">Domknąć FALCON v1.0 i przygotować kolejny etap.</text:span></text:p>
          </table:table-cell>
        </table:table-row>
        <table:table-row table:style-name="Table135.1">
          <table:table-cell table:style-name="Table135.A2" office:value-type="string">
            <text:p text:style-name="P5"><text:span text:style-name="T13">Efekt końcowy</text:span></text:p>
          </table:table-cell>
          <table:table-cell table:style-name="Table135.B1" office:value-type="string">
            <text:p text:style-name="P5"><text:span text:style-name="T12">Portfolio, CV, proof of work i plan 90 dni.</text:span></text:p>
          </table:table-cell>
        </table:table-row>
      </table:table>
      <text:p text:style-name="Standard"/>
      <text:p text:style-name="P7"><text:span text:style-name="T16">Day 57/60 <text:s/>■■■■■■■■■■■■■■■■■■■□</text:span></text:p>
      <text:p text:style-name="Standard"><text:span text:style-name="T7">DAY 57</text:span></text:p>
      <text:p text:style-name="Standard"><text:span text:style-name="T17">Tydzień 9 | Cel dnia: Domknąć portfolio.</text:span></text:p>
      <text:p text:style-name="P3"/>
      <table:table table:name="Table136" table:style-name="Table136">
        <table:table-column table:style-name="Table136.A" table:number-columns-repeated="2"/>
        <table:table-row table:style-name="Table136.1">
          <table:table-cell table:style-name="Table136.A1" office:value-type="string">
            <text:p text:style-name="P5"><text:span text:style-name="T15">AI TASKI</text:span></text:p>
          </table:table-cell>
          <table:table-cell table:style-name="Table136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36.1">
          <table:table-cell table:style-name="Table136.A2" office:value-type="string">
            <text:p text:style-name="P5"><text:span text:style-name="T19">SQL</text:span></text:p>
          </table:table-cell>
          <table:table-cell table:style-name="Table136.A2" office:value-type="string">
            <text:p text:style-name="P5"><text:span text:style-name="T18">Wybierz finalne zapytania SQL do pokazania.</text:span></text:p>
          </table:table-cell>
        </table:table-row>
        <table:table-row table:style-name="Table136.1">
          <table:table-cell table:style-name="Table136.A3" office:value-type="string">
            <text:p text:style-name="P5"><text:span text:style-name="T19">PYTHON</text:span></text:p>
          </table:table-cell>
          <table:table-cell table:style-name="Table136.A3" office:value-type="string">
            <text:p text:style-name="P5"><text:span text:style-name="T18">Wybierz finalne pliki Python do pokazania.</text:span></text:p>
          </table:table-cell>
        </table:table-row>
        <table:table-row table:style-name="Table136.1">
          <table:table-cell table:style-name="Table136.A4" office:value-type="string">
            <text:p text:style-name="P5"><text:span text:style-name="T19">FOOTBALL</text:span></text:p>
          </table:table-cell>
          <table:table-cell table:style-name="Table136.A4" office:value-type="string">
            <text:p text:style-name="P5"><text:span text:style-name="T18">Wybierz finalne raporty Football Analytics.</text:span></text:p>
          </table:table-cell>
        </table:table-row>
        <table:table-row table:style-name="Table136.1">
          <table:table-cell table:style-name="Table136.A3" office:value-type="string">
            <text:p text:style-name="P5"><text:span text:style-name="T19">GITHUB / PORTFOLIO</text:span></text:p>
          </table:table-cell>
          <table:table-cell table:style-name="Table136.A3" office:value-type="string">
            <text:p text:style-name="P5"><text:span text:style-name="T18">Ułóż Portfolio/index.md w finalnej kolejności.</text:span></text:p>
          </table:table-cell>
        </table:table-row>
        <table:table-row table:style-name="Table136.1">
          <table:table-cell table:style-name="Table136.A6" office:value-type="string">
            <text:p text:style-name="P5"><text:span text:style-name="T19">EFEKT DNIA</text:span></text:p>
          </table:table-cell>
          <table:table-cell table:style-name="Table136.A6" office:value-type="string">
            <text:p text:style-name="P5"><text:span text:style-name="T18">Portfolio v1.0.</text:span></text:p>
          </table:table-cell>
        </table:table-row>
        <table:table-row table:style-name="Table136.1">
          <table:table-cell table:style-name="Table136.A7" office:value-type="string">
            <text:p text:style-name="P5"><text:span text:style-name="T19">MINIMUM DNIA</text:span></text:p>
          </table:table-cell>
          <table:table-cell table:style-name="Table136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37" table:style-name="Table137">
        <table:table-column table:style-name="Table137.A"/>
        <table:table-row table:style-name="Table137.1">
          <table:table-cell table:style-name="Table137.A1" office:value-type="string">
            <text:p text:style-name="P5"><text:span text:style-name="T11">NOTATKA DNIA</text:span></text:p>
          </table:table-cell>
        </table:table-row>
        <table:table-row table:style-name="Table137.1">
          <table:table-cell table:style-name="Table137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8/60 <text:s/>■■■■■■■■■■■■■■■■■■■□</text:span></text:p>
      <text:p text:style-name="Standard"><text:span text:style-name="T7">DAY 58</text:span></text:p>
      <text:p text:style-name="Standard"><text:span text:style-name="T17">Tydzień 9 | Cel dnia: Zaktualizować CV po FALCONIE.</text:span></text:p>
      <text:p text:style-name="P3"/>
      <table:table table:name="Table138" table:style-name="Table138">
        <table:table-column table:style-name="Table138.A" table:number-columns-repeated="2"/>
        <table:table-row table:style-name="Table138.1">
          <table:table-cell table:style-name="Table138.A1" office:value-type="string">
            <text:p text:style-name="P5"><text:span text:style-name="T15">AI TASKI</text:span></text:p>
          </table:table-cell>
          <table:table-cell table:style-name="Table138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38.1">
          <table:table-cell table:style-name="Table138.A2" office:value-type="string">
            <text:p text:style-name="P5"><text:span text:style-name="T19">SQL</text:span></text:p>
          </table:table-cell>
          <table:table-cell table:style-name="Table138.A2" office:value-type="string">
            <text:p text:style-name="P5"><text:span text:style-name="T18">Wpisz realne SQL skills bez bajek.</text:span></text:p>
          </table:table-cell>
        </table:table-row>
        <table:table-row table:style-name="Table138.1">
          <table:table-cell table:style-name="Table138.A3" office:value-type="string">
            <text:p text:style-name="P5"><text:span text:style-name="T19">PYTHON</text:span></text:p>
          </table:table-cell>
          <table:table-cell table:style-name="Table138.A3" office:value-type="string">
            <text:p text:style-name="P5"><text:span text:style-name="T18">Wpisz realne Python skills bez bajek.</text:span></text:p>
          </table:table-cell>
        </table:table-row>
        <table:table-row table:style-name="Table138.1">
          <table:table-cell table:style-name="Table138.A4" office:value-type="string">
            <text:p text:style-name="P5"><text:span text:style-name="T19">FOOTBALL</text:span></text:p>
          </table:table-cell>
          <table:table-cell table:style-name="Table138.A4" office:value-type="string">
            <text:p text:style-name="P5"><text:span text:style-name="T18">Dodaj projekty Football Analytics do CV.</text:span></text:p>
          </table:table-cell>
        </table:table-row>
        <table:table-row table:style-name="Table138.1">
          <table:table-cell table:style-name="Table138.A3" office:value-type="string">
            <text:p text:style-name="P5"><text:span text:style-name="T19">GITHUB / PORTFOLIO</text:span></text:p>
          </table:table-cell>
          <table:table-cell table:style-name="Table138.A3" office:value-type="string">
            <text:p text:style-name="P5"><text:span text:style-name="T18">Zapisz finalną listę zmian do CV.</text:span></text:p>
          </table:table-cell>
        </table:table-row>
        <table:table-row table:style-name="Table138.1">
          <table:table-cell table:style-name="Table138.A6" office:value-type="string">
            <text:p text:style-name="P5"><text:span text:style-name="T19">EFEKT DNIA</text:span></text:p>
          </table:table-cell>
          <table:table-cell table:style-name="Table138.A6" office:value-type="string">
            <text:p text:style-name="P5"><text:span text:style-name="T18">CV update v1.</text:span></text:p>
          </table:table-cell>
        </table:table-row>
        <table:table-row table:style-name="Table138.1">
          <table:table-cell table:style-name="Table138.A7" office:value-type="string">
            <text:p text:style-name="P5"><text:span text:style-name="T19">MINIMUM DNIA</text:span></text:p>
          </table:table-cell>
          <table:table-cell table:style-name="Table138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39" table:style-name="Table139">
        <table:table-column table:style-name="Table139.A"/>
        <table:table-row table:style-name="Table139.1">
          <table:table-cell table:style-name="Table139.A1" office:value-type="string">
            <text:p text:style-name="P5"><text:span text:style-name="T11">NOTATKA DNIA</text:span></text:p>
          </table:table-cell>
        </table:table-row>
        <table:table-row table:style-name="Table139.1">
          <table:table-cell table:style-name="Table139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59/60 <text:s/>■■■■■■■■■■■■■■■■■■■■</text:span></text:p>
      <text:p text:style-name="Standard"><text:span text:style-name="T7">DAY 59</text:span></text:p>
      <text:p text:style-name="Standard"><text:span text:style-name="T17">Tydzień 9 | Cel dnia: Napisać stronę dowodów pracy.</text:span></text:p>
      <text:p text:style-name="P3"/>
      <table:table table:name="Table140" table:style-name="Table140">
        <table:table-column table:style-name="Table140.A" table:number-columns-repeated="2"/>
        <table:table-row table:style-name="Table140.1">
          <table:table-cell table:style-name="Table140.A1" office:value-type="string">
            <text:p text:style-name="P5"><text:span text:style-name="T15">AI TASKI</text:span></text:p>
          </table:table-cell>
          <table:table-cell table:style-name="Table140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40.1">
          <table:table-cell table:style-name="Table140.A2" office:value-type="string">
            <text:p text:style-name="P5"><text:span text:style-name="T19">SQL</text:span></text:p>
          </table:table-cell>
          <table:table-cell table:style-name="Table140.A2" office:value-type="string">
            <text:p text:style-name="P5"><text:span text:style-name="T18">Spisz projekty, linki, pliki i efekty.</text:span></text:p>
          </table:table-cell>
        </table:table-row>
        <table:table-row table:style-name="Table140.1">
          <table:table-cell table:style-name="Table140.A3" office:value-type="string">
            <text:p text:style-name="P5"><text:span text:style-name="T19">PYTHON</text:span></text:p>
          </table:table-cell>
          <table:table-cell table:style-name="Table140.A3" office:value-type="string">
            <text:p text:style-name="P5"><text:span text:style-name="T18">Spisz skrypty, notebooki i wykresy.</text:span></text:p>
          </table:table-cell>
        </table:table-row>
        <table:table-row table:style-name="Table140.1">
          <table:table-cell table:style-name="Table140.A4" office:value-type="string">
            <text:p text:style-name="P5"><text:span text:style-name="T19">FOOTBALL</text:span></text:p>
          </table:table-cell>
          <table:table-cell table:style-name="Table140.A4" office:value-type="string">
            <text:p text:style-name="P5"><text:span text:style-name="T18">Spisz raporty i wnioski.</text:span></text:p>
          </table:table-cell>
        </table:table-row>
        <table:table-row table:style-name="Table140.1">
          <table:table-cell table:style-name="Table140.A3" office:value-type="string">
            <text:p text:style-name="P5"><text:span text:style-name="T19">GITHUB / PORTFOLIO</text:span></text:p>
          </table:table-cell>
          <table:table-cell table:style-name="Table140.A3" office:value-type="string">
            <text:p text:style-name="P5"><text:span text:style-name="T18">Dodaj proof_of_work.md.</text:span></text:p>
          </table:table-cell>
        </table:table-row>
        <table:table-row table:style-name="Table140.1">
          <table:table-cell table:style-name="Table140.A6" office:value-type="string">
            <text:p text:style-name="P5"><text:span text:style-name="T19">EFEKT DNIA</text:span></text:p>
          </table:table-cell>
          <table:table-cell table:style-name="Table140.A6" office:value-type="string">
            <text:p text:style-name="P5"><text:span text:style-name="T18">Proof of Work.</text:span></text:p>
          </table:table-cell>
        </table:table-row>
        <table:table-row table:style-name="Table140.1">
          <table:table-cell table:style-name="Table140.A7" office:value-type="string">
            <text:p text:style-name="P5"><text:span text:style-name="T19">MINIMUM DNIA</text:span></text:p>
          </table:table-cell>
          <table:table-cell table:style-name="Table140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41" table:style-name="Table141">
        <table:table-column table:style-name="Table141.A"/>
        <table:table-row table:style-name="Table141.1">
          <table:table-cell table:style-name="Table141.A1" office:value-type="string">
            <text:p text:style-name="P5"><text:span text:style-name="T11">NOTATKA DNIA</text:span></text:p>
          </table:table-cell>
        </table:table-row>
        <table:table-row table:style-name="Table141.1">
          <table:table-cell table:style-name="Table141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7"><text:span text:style-name="T16">Day 60/60 <text:s/>■■■■■■■■■■■■■■■■■■■■</text:span></text:p>
      <text:p text:style-name="Standard"><text:span text:style-name="T7">DAY 60</text:span></text:p>
      <text:p text:style-name="Standard"><text:span text:style-name="T17">Tydzień 9 | Cel dnia: Zamknąć FALCON v1.0 i zaplanować kolejne 90 dni.</text:span></text:p>
      <text:p text:style-name="P3"/>
      <table:table table:name="Table142" table:style-name="Table142">
        <table:table-column table:style-name="Table142.A" table:number-columns-repeated="2"/>
        <table:table-row table:style-name="Table142.1">
          <table:table-cell table:style-name="Table142.A1" office:value-type="string">
            <text:p text:style-name="P5"><text:span text:style-name="T15">AI TASKI</text:span></text:p>
          </table:table-cell>
          <table:table-cell table:style-name="Table142.B1" office:value-type="string">
            <text:p text:style-name="P5"><text:span text:style-name="T18">Jeżeli są dostępne: wykonaj je w pierwszej kolejności. Jeżeli zajmą ponad 3 godziny, resztę dnia ogranicz do wersji minimum.</text:span></text:p>
          </table:table-cell>
        </table:table-row>
        <table:table-row table:style-name="Table142.1">
          <table:table-cell table:style-name="Table142.A2" office:value-type="string">
            <text:p text:style-name="P5"><text:span text:style-name="T19">SQL</text:span></text:p>
          </table:table-cell>
          <table:table-cell table:style-name="Table142.A2" office:value-type="string">
            <text:p text:style-name="P5"><text:span text:style-name="T18">Podsumuj SQL: co umiesz, co dalej.</text:span></text:p>
          </table:table-cell>
        </table:table-row>
        <table:table-row table:style-name="Table142.1">
          <table:table-cell table:style-name="Table142.A3" office:value-type="string">
            <text:p text:style-name="P5"><text:span text:style-name="T19">PYTHON</text:span></text:p>
          </table:table-cell>
          <table:table-cell table:style-name="Table142.A3" office:value-type="string">
            <text:p text:style-name="P5"><text:span text:style-name="T18">Podsumuj Python: co umiesz, co dalej.</text:span></text:p>
          </table:table-cell>
        </table:table-row>
        <table:table-row table:style-name="Table142.1">
          <table:table-cell table:style-name="Table142.A4" office:value-type="string">
            <text:p text:style-name="P5"><text:span text:style-name="T19">FOOTBALL</text:span></text:p>
          </table:table-cell>
          <table:table-cell table:style-name="Table142.A4" office:value-type="string">
            <text:p text:style-name="P5"><text:span text:style-name="T18">Podsumuj Football Analytics: co powstało, co dalej.</text:span></text:p>
          </table:table-cell>
        </table:table-row>
        <table:table-row table:style-name="Table142.1">
          <table:table-cell table:style-name="Table142.A3" office:value-type="string">
            <text:p text:style-name="P5"><text:span text:style-name="T19">GITHUB / PORTFOLIO</text:span></text:p>
          </table:table-cell>
          <table:table-cell table:style-name="Table142.A3" office:value-type="string">
            <text:p text:style-name="P5"><text:span text:style-name="T18">Zrób backup całego folderu FALCON.</text:span></text:p>
          </table:table-cell>
        </table:table-row>
        <table:table-row table:style-name="Table142.1">
          <table:table-cell table:style-name="Table142.A6" office:value-type="string">
            <text:p text:style-name="P5"><text:span text:style-name="T19">EFEKT DNIA</text:span></text:p>
          </table:table-cell>
          <table:table-cell table:style-name="Table142.A6" office:value-type="string">
            <text:p text:style-name="P5"><text:span text:style-name="T18">Final Review + FALCON v2.0 plan.</text:span></text:p>
          </table:table-cell>
        </table:table-row>
        <table:table-row table:style-name="Table142.1">
          <table:table-cell table:style-name="Table142.A7" office:value-type="string">
            <text:p text:style-name="P5"><text:span text:style-name="T19">MINIMUM DNIA</text:span></text:p>
          </table:table-cell>
          <table:table-cell table:style-name="Table142.A7" office:value-type="string">
            <text:p text:style-name="P5"><text:span text:style-name="T18">Zrób przynajmniej jeden mały ślad pracy: 15 minut nauki, jedna notatka, jedno ćwiczenie albo jeden commit/backup.</text:span></text:p>
          </table:table-cell>
        </table:table-row>
      </table:table>
      <text:p text:style-name="Standard"/>
      <text:p text:style-name="Standard"><text:span text:style-name="T10">CHECKLISTA</text:span></text:p>
      <text:p text:style-name="P8"><text:span text:style-name="T18">[ ] AI taski sprawdzone lub wykonane</text:span></text:p>
      <text:p text:style-name="P8"><text:span text:style-name="T18">[ ] SQL zrobione</text:span></text:p>
      <text:p text:style-name="P8"><text:span text:style-name="T18">[ ] Python zrobiony</text:span></text:p>
      <text:p text:style-name="P8"><text:span text:style-name="T18">[ ] Football Analytics ruszone</text:span></text:p>
      <text:p text:style-name="P8"><text:span text:style-name="T18">[ ] Plik/notatka/commit/backup zapisany</text:span></text:p>
      <text:p text:style-name="P8"><text:span text:style-name="T18">[ ] Krótki wpis: co dziś poszło dobrze</text:span></text:p>
      <text:p text:style-name="Standard"/>
      <table:table table:name="Table143" table:style-name="Table143">
        <table:table-column table:style-name="Table143.A"/>
        <table:table-row table:style-name="Table143.1">
          <table:table-cell table:style-name="Table143.A1" office:value-type="string">
            <text:p text:style-name="P5"><text:span text:style-name="T11">NOTATKA DNIA</text:span></text:p>
          </table:table-cell>
        </table:table-row>
        <table:table-row table:style-name="Table143.1">
          <table:table-cell table:style-name="Table143.A1" office:value-type="string">
            <text:p text:style-name="P5"><text:span text:style-name="T12">Co zrobiłem? Co było trudne? Co jutro poprawię? <text:s/>________________________________________________________________</text:span></text:p>
          </table:table-cell>
        </table:table-row>
      </table:table>
      <text:p text:style-name="Standard"/>
      <text:p text:style-name="P2"><text:span text:style-name="T7">FINAL REVIEW - DAY 60</text:span></text:p>
      <text:p text:style-name="P3"/>
      <text:p text:style-name="P4"><text:span text:style-name="T9">To nie jest koniec kariery. To koniec pierwszego etapu. FALCON v1.0 ma dać fundament: lepsze CV, GitHub, portfolio, podstawy SQL/Python i pierwsze materiały Football Analytics.</text:span></text:p>
      <table:table table:name="Table144" table:style-name="Table144">
        <table:table-column table:style-name="Table144.A" table:number-columns-repeated="2"/>
        <table:table-row table:style-name="Table144.1">
          <table:table-cell table:style-name="Table144.A1" office:value-type="string">
            <text:p text:style-name="P5"><text:span text:style-name="T13">Najważniejszy efekt</text:span></text:p>
          </table:table-cell>
          <table:table-cell table:style-name="Table144.B1" office:value-type="string">
            <text:p text:style-name="P5"><text:span text:style-name="T12">Co powstało, czego wcześniej nie było?</text:span></text:p>
          </table:table-cell>
        </table:table-row>
        <table:table-row table:style-name="Table144.1">
          <table:table-cell table:style-name="Table144.A2" office:value-type="string">
            <text:p text:style-name="P5"><text:span text:style-name="T13">Największa poprawa</text:span></text:p>
          </table:table-cell>
          <table:table-cell table:style-name="Table144.B1" office:value-type="string">
            <text:p text:style-name="P5"><text:span text:style-name="T12">W czym jestem wyraźnie lepszy niż 60 dni temu?</text:span></text:p>
          </table:table-cell>
        </table:table-row>
        <table:table-row table:style-name="Table144.1">
          <table:table-cell table:style-name="Table144.A1" office:value-type="string">
            <text:p text:style-name="P5"><text:span text:style-name="T13">Największy problem</text:span></text:p>
          </table:table-cell>
          <table:table-cell table:style-name="Table144.B1" office:value-type="string">
            <text:p text:style-name="P5"><text:span text:style-name="T12">Co dalej hamuje rozwój?</text:span></text:p>
          </table:table-cell>
        </table:table-row>
        <table:table-row table:style-name="Table144.1">
          <table:table-cell table:style-name="Table144.A2" office:value-type="string">
            <text:p text:style-name="P5"><text:span text:style-name="T13">Najlepszy projekt</text:span></text:p>
          </table:table-cell>
          <table:table-cell table:style-name="Table144.B1" office:value-type="string">
            <text:p text:style-name="P5"><text:span text:style-name="T12">Który materiał najchętniej pokażę rekruterowi?</text:span></text:p>
          </table:table-cell>
        </table:table-row>
        <table:table-row table:style-name="Table144.1">
          <table:table-cell table:style-name="Table144.A1" office:value-type="string">
            <text:p text:style-name="P5"><text:span text:style-name="T13">Następny cel</text:span></text:p>
          </table:table-cell>
          <table:table-cell table:style-name="Table144.B1" office:value-type="string">
            <text:p text:style-name="P5"><text:span text:style-name="T12">Co musi powstać w FALCON v2.0?</text:span></text:p>
          </table:table-cell>
        </table:table-row>
      </table:table>
      <text:p text:style-name="Standard"><text:span text:style-name="T10">Plan następnych 90 dni</text:span></text:p>
      <text:list text:style-name="WWNum1">
        <text:list-item>
          <text:p text:style-name="P9"><text:span text:style-name="T21">Rozwinąć Football Analytics portfolio.</text:span></text:p>
        </text:list-item>
        <text:list-item>
          <text:p text:style-name="P9"><text:span text:style-name="T21">Dodać 2-3 mocniejsze projekty danych.</text:span></text:p>
        </text:list-item>
        <text:list-item>
          <text:p text:style-name="P9"><text:span text:style-name="T21">Regularnie aplikować na AI/Data/QA role.</text:span></text:p>
        </text:list-item>
        <text:list-item>
          <text:p text:style-name="P9"><text:span text:style-name="T21">Poprawić LinkedIn i GitHub.</text:span></text:p>
        </text:list-item>
        <text:list-item>
          <text:p text:style-name="P9"><text:span text:style-name="T21">Zbudować pierwszy dashboard lub stronę portfolio.</text:span></text:p>
        </text:list-item>
      </text:list>
      <table:table table:name="Table145" table:style-name="Table145">
        <table:table-column table:style-name="Table145.A"/>
        <table:table-row table:style-name="Table145.1">
          <table:table-cell table:style-name="Table145.A1" office:value-type="string">
            <text:p text:style-name="P5"><text:span text:style-name="T11">MOTTO</text:span></text:p>
          </table:table-cell>
        </table:table-row>
        <table:table-row table:style-name="Table145.1">
          <table:table-cell table:style-name="Table145.A1" office:value-type="string">
            <text:p text:style-name="P5"><text:span text:style-name="T12">Nie buduję kariery jednym wielkim krokiem. Buduję ją jednym dobrze wykonanym dniem.</text:span></text:p>
          </table:table-cell>
        </table:table-row>
      </table:table>
      <text:p text:style-name="Standard"/>
      <text:p text:style-name="P2"><text:span text:style-name="T7">FALCON v2.0 - KOLEJNY ETAP</text:span></text:p>
      <text:p text:style-name="P3"/>
      <text:p text:style-name="P4"><text:span text:style-name="T9">Po wykonaniu tego planu nie zaczynam od zera. Następny etap bazuje na tym, co powstało przez 60 dni.</text:span></text:p>
      <table:table table:name="Table146" table:style-name="Table146">
        <table:table-column table:style-name="Table146.A" table:number-columns-repeated="2"/>
        <table:table-row table:style-name="Table146.1">
          <table:table-cell table:style-name="Table146.A1" office:value-type="string">
            <text:p text:style-name="P5"><text:span text:style-name="T13">Football Analytics</text:span></text:p>
          </table:table-cell>
          <table:table-cell table:style-name="Table146.B1" office:value-type="string">
            <text:p text:style-name="P5"><text:span text:style-name="T12">Więcej raportów, lepsze dane, bardziej uporządkowany styl analizy.</text:span></text:p>
          </table:table-cell>
        </table:table-row>
        <table:table-row table:style-name="Table146.1">
          <table:table-cell table:style-name="Table146.A2" office:value-type="string">
            <text:p text:style-name="P5"><text:span text:style-name="T13">Python</text:span></text:p>
          </table:table-cell>
          <table:table-cell table:style-name="Table146.B1" office:value-type="string">
            <text:p text:style-name="P5"><text:span text:style-name="T12">Więcej pandas, wizualizacji i notebooków.</text:span></text:p>
          </table:table-cell>
        </table:table-row>
        <table:table-row table:style-name="Table146.1">
          <table:table-cell table:style-name="Table146.A1" office:value-type="string">
            <text:p text:style-name="P5"><text:span text:style-name="T13">SQL</text:span></text:p>
          </table:table-cell>
          <table:table-cell table:style-name="Table146.B1" office:value-type="string">
            <text:p text:style-name="P5"><text:span text:style-name="T12">Ćwiczenia na prawdziwszych datasetach i lepsze projekty.</text:span></text:p>
          </table:table-cell>
        </table:table-row>
        <table:table-row table:style-name="Table146.1">
          <table:table-cell table:style-name="Table146.A2" office:value-type="string">
            <text:p text:style-name="P5"><text:span text:style-name="T13">Portfolio</text:span></text:p>
          </table:table-cell>
          <table:table-cell table:style-name="Table146.B1" office:value-type="string">
            <text:p text:style-name="P5"><text:span text:style-name="T12">Jedno miejsce do pokazania rekruterowi.</text:span></text:p>
          </table:table-cell>
        </table:table-row>
        <table:table-row table:style-name="Table146.1">
          <table:table-cell table:style-name="Table146.A1" office:value-type="string">
            <text:p text:style-name="P5"><text:span text:style-name="T13">Kariera</text:span></text:p>
          </table:table-cell>
          <table:table-cell table:style-name="Table146.B1" office:value-type="string">
            <text:p text:style-name="P5"><text:span text:style-name="T12">Aplikacje, rozmowy, feedback, poprawki CV i LinkedIn.</text:span></text:p>
          </table:table-cell>
        </table:table-row>
      </table:table>
      <text:p text:style-name="P6"><text:span text:style-name="T14">FALCON v1.0 nie musi być idealny. Ma być wykonany. Perfekcja to często lenistwo w garniturze, które udaje standard jakośc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  <style:text-properties style:font-name="Liberation Sans" fo:font-family="'Liberation Sans'" style:font-family-generic="roman" style:font-pitch="variable" fo:font-size="9.5pt" style:font-size-asian="9.5pt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6b7280" loext:opacity="100%" style:font-name="Liberation Sans" fo:font-size="8pt" style:font-size-asian="8pt"/>
    </style:style>
    <style:page-layout style:name="Mpm1">
      <style:page-layout-properties fo:page-width="8.2681in" fo:page-height="11.6929in" style:num-format="1" style:print-orientation="portrait" fo:margin-top="0.7in" fo:margin-bottom="0.5in" fo:margin-left="0.7201in" fo:margin-right="0.720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80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ALCON 60-Day Execution Plan v1.0 <text:s/>| <text:s/>Artur Czernek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ALCON 60-Day Execution Plan v1.0</dc:title>
    <meta:initial-creator>OpenAI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2.3.2$Linux_X86_64 LibreOffice_project/520$Build-2</meta:generator>
    <meta:document-statistic meta:table-count="146" meta:image-count="0" meta:object-count="0" meta:page-count="84" meta:paragraph-count="1844" meta:word-count="9440" meta:character-count="63830" meta:non-whitespace-character-count="56117"/>
    <meta:user-defined meta:name="AppVersion">14.0000</meta:user-defined>
    <meta:template xlink:type="simple" xlink:actuate="onRequest" xlink:title="Normal.dotm" xlink:href=""/>
  </office:meta>
</office:document-meta>
</file>